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1.246cm" table:align="left"/>
    </style:style>
    <style:style style:name="Tableau1.A" style:family="table-column">
      <style:table-column-properties style:column-width="1.244cm"/>
    </style:style>
    <style:style style:name="Tableau1.B" style:family="table-column">
      <style:table-column-properties style:column-width="3.122cm"/>
    </style:style>
    <style:style style:name="Tableau1.C" style:family="table-column">
      <style:table-column-properties style:column-width="16.88cm"/>
    </style:style>
    <style:style style:name="P1" style:family="paragraph" style:parent-style-name="Text_20_body">
      <style:text-properties fo:font-size="10pt"/>
    </style:style>
    <style:style style:name="P2" style:family="paragraph" style:parent-style-name="Text_20_body">
      <style:text-properties fo:language="en" fo:country="GB"/>
    </style:style>
    <style:style style:name="P3" style:family="paragraph" style:parent-style-name="Text_20_body">
      <style:text-properties fo:language="de" fo:country="DE"/>
    </style:style>
    <style:style style:name="P4" style:family="paragraph" style:parent-style-name="Text_20_body">
      <style:text-properties style:font-name="Courier New" fo:font-size="10pt"/>
    </style:style>
    <style:style style:name="P5" style:family="paragraph" style:parent-style-name="Text_20_body">
      <style:text-properties style:font-name="Courier New" fo:font-size="10pt" fo:language="nl" fo:country="NL"/>
    </style:style>
    <style:style style:name="P6" style:family="paragraph" style:parent-style-name="Text_20_body">
      <style:text-properties style:font-name="Times New Roman1"/>
    </style:style>
    <style:style style:name="P7" style:family="paragraph" style:parent-style-name="Text_20_body">
      <style:text-properties fo:language="nl" fo:country="NL"/>
    </style:style>
    <style:style style:name="P8" style:family="paragraph" style:parent-style-name="Text_20_body">
      <style:paragraph-properties fo:margin-left="0cm" fo:margin-right="0cm" fo:text-indent="1.249cm" style:auto-text-indent="false"/>
      <style:text-properties fo:font-size="10pt"/>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style:font-name="Times New Roman1"/>
    </style:style>
    <style:style style:name="P11" style:family="paragraph" style:parent-style-name="Text_20_body">
      <style:paragraph-properties fo:break-before="page"/>
      <style:text-properties style:font-name="Courier New" fo:font-size="10pt"/>
    </style:style>
    <style:style style:name="P12" style:family="paragraph" style:parent-style-name="Text_20_body">
      <style:paragraph-properties fo:margin-left="0.635cm" fo:margin-right="0cm" fo:text-indent="-0.635cm" style:auto-text-indent="false"/>
    </style:style>
    <style:style style:name="P13" style:family="paragraph" style:parent-style-name="Text_20_body">
      <style:paragraph-properties fo:margin-left="0.635cm" fo:margin-right="0cm" fo:text-indent="-0.635cm" style:auto-text-indent="false"/>
      <style:text-properties style:font-name="Courier New" fo:font-size="10pt"/>
    </style:style>
    <style:style style:name="P14" style:family="paragraph" style:parent-style-name="Text_20_body">
      <style:paragraph-properties fo:margin-left="0.635cm" fo:margin-right="0cm" fo:text-indent="-0.635cm" style:auto-text-indent="false"/>
      <style:text-properties style:font-name="Courier New" fo:font-size="10pt" fo:language="en" fo:country="GB"/>
    </style:style>
    <style:style style:name="P15" style:family="paragraph" style:parent-style-name="Text_20_body">
      <style:paragraph-properties fo:margin-left="0.635cm" fo:margin-right="0cm" fo:text-indent="-0.635cm" style:auto-text-indent="false"/>
      <style:text-properties style:font-name="Courier New" fo:font-size="10pt" fo:language="de" fo:country="DE"/>
    </style:style>
    <style:style style:name="P16" style:family="paragraph" style:parent-style-name="Text_20_body">
      <style:paragraph-properties fo:margin-left="0.635cm" fo:margin-right="0cm" fo:text-indent="-0.635cm" style:auto-text-indent="false"/>
      <style:text-properties style:font-name="Times New Roman1" fo:font-size="11pt"/>
    </style:style>
    <style:style style:name="P17" style:family="paragraph" style:parent-style-name="Text_20_body">
      <style:paragraph-properties fo:margin-left="0.635cm" fo:margin-right="0cm" fo:text-indent="-0.635cm" style:auto-text-indent="false"/>
      <style:text-properties style:text-underline-style="solid" style:text-underline-width="auto" style:text-underline-color="font-color"/>
    </style:style>
    <style:style style:name="P18" style:family="paragraph" style:parent-style-name="Text_20_body">
      <style:paragraph-properties fo:margin-left="0.635cm" fo:margin-right="0cm" fo:text-indent="-0.635cm" style:auto-text-indent="false" fo:break-before="page"/>
    </style:style>
    <style:style style:name="P19" style:family="paragraph" style:parent-style-name="Text_20_body">
      <style:paragraph-properties fo:margin-left="0.635cm" fo:margin-right="0cm" fo:text-indent="-0.635cm" style:auto-text-indent="false" fo:break-before="page"/>
      <style:text-properties style:font-name="Courier New" fo:font-size="10pt"/>
    </style:style>
    <style:style style:name="P20" style:family="paragraph" style:parent-style-name="Text_20_body">
      <style:paragraph-properties fo:margin-left="0.635cm" fo:margin-right="0cm" fo:text-indent="-0.635cm" style:auto-text-indent="false" fo:break-before="page"/>
      <style:text-properties style:font-name="Courier New" fo:font-size="10pt" fo:language="de" fo:country="DE"/>
    </style:style>
    <style:style style:name="P21" style:family="paragraph" style:parent-style-name="Text_20_body">
      <style:paragraph-properties fo:margin-top="0cm" fo:margin-bottom="0cm"/>
      <style:text-properties style:font-name="Courier New" fo:font-size="10pt"/>
    </style:style>
    <style:style style:name="P22" style:family="paragraph" style:parent-style-name="Heading_20_1">
      <style:paragraph-properties fo:text-align="start" style:justify-single-word="false"/>
    </style:style>
    <style:style style:name="P23" style:family="paragraph" style:parent-style-name="Heading_20_1">
      <style:text-properties style:text-underline-style="solid" style:text-underline-width="auto" style:text-underline-color="font-color"/>
    </style:style>
    <style:style style:name="P24" style:family="paragraph" style:parent-style-name="Heading_20_1">
      <style:paragraph-properties fo:margin-left="0cm" fo:margin-right="0cm" fo:text-align="start" style:justify-single-word="false" fo:text-indent="0cm" style:auto-text-indent="false"/>
      <style:text-properties style:text-underline-style="solid" style:text-underline-width="auto" style:text-underline-color="font-color"/>
    </style:style>
    <style:style style:name="P25" style:family="paragraph" style:parent-style-name="Heading_20_1">
      <style:paragraph-properties fo:margin-left="0cm" fo:margin-right="0cm" fo:text-indent="0cm" style:auto-text-indent="false"/>
      <style:text-properties fo:language="en" fo:country="GB" style:text-underline-style="solid" style:text-underline-width="auto" style:text-underline-color="font-color"/>
    </style:style>
    <style:style style:name="P26" style:family="paragraph" style:parent-style-name="Heading_20_1">
      <style:paragraph-properties fo:text-align="start" style:justify-single-word="false" fo:break-before="page"/>
    </style:style>
    <style:style style:name="P27" style:family="paragraph" style:parent-style-name="Table_20_Contents">
      <style:paragraph-properties fo:margin-top="0cm" fo:margin-bottom="0.499cm" fo:padding="0cm" fo:border="none"/>
      <style:text-properties fo:font-size="10pt" fo:font-weight="bold"/>
    </style:style>
    <style:style style:name="P28" style:family="paragraph" style:parent-style-name="Table_20_Contents">
      <style:paragraph-properties fo:margin-top="0cm" fo:margin-bottom="0.499cm" fo:padding-left="0cm" fo:padding-right="0cm" fo:padding-top="0.049cm" fo:padding-bottom="0.049cm" fo:border-left="none" fo:border-right="none" fo:border-top="0.035cm solid #000000" fo:border-bottom="0.035cm solid #000000"/>
      <style:text-properties fo:font-size="10pt" fo:font-weight="bold"/>
    </style:style>
    <style:style style:name="P29" style:family="paragraph" style:parent-style-name="Table_20_Contents">
      <style:paragraph-properties fo:margin-top="0cm" fo:margin-bottom="0.499cm" fo:padding-left="0.049cm" fo:padding-right="0cm" fo:padding-top="0cm" fo:padding-bottom="0.049cm" fo:border-left="0.035cm solid #000000" fo:border-right="none" fo:border-top="none" fo:border-bottom="0.035cm solid #000000"/>
      <style:text-properties fo:font-size="10pt"/>
    </style:style>
    <style:style style:name="P30" style:family="paragraph" style:parent-style-name="Table_20_Contents">
      <style:paragraph-properties fo:margin-top="0cm" fo:margin-bottom="0.499cm" fo:padding-left="0cm" fo:padding-right="0cm" fo:padding-top="0cm" fo:padding-bottom="0.049cm" fo:border-left="none" fo:border-right="none" fo:border-top="none" fo:border-bottom="0.035cm solid #000000"/>
      <style:text-properties fo:font-size="10pt"/>
    </style:style>
    <style:style style:name="P31" style:family="paragraph" style:parent-style-name="Table_20_Contents">
      <style:paragraph-properties fo:margin-top="0cm" fo:margin-bottom="0.499cm" fo:padding-left="0cm" fo:padding-right="0cm" fo:padding-top="0cm" fo:padding-bottom="0.049cm" fo:border-left="none" fo:border-right="none" fo:border-top="none" fo:border-bottom="0.035cm solid #000000"/>
      <style:text-properties fo:font-size="10pt" fo:font-weight="bold"/>
    </style:style>
    <style:style style:name="P32" style:family="paragraph" style:parent-style-name="Table_20_Contents">
      <style:paragraph-properties fo:margin-top="0cm" fo:margin-bottom="0.499cm" fo:padding-left="0.049cm" fo:padding-right="0.049cm" fo:padding-top="0cm" fo:padding-bottom="0.049cm" fo:border-left="0.035cm solid #000000" fo:border-right="0.035cm solid #000000" fo:border-top="none" fo:border-bottom="0.088cm solid #000000"/>
      <style:text-properties fo:font-size="10pt"/>
    </style:style>
    <style:style style:name="P33" style:family="paragraph" style:parent-style-name="Table_20_Contents">
      <style:paragraph-properties fo:margin-top="0cm" fo:margin-bottom="0.499cm" fo:padding-left="0cm" fo:padding-right="0.049cm" fo:padding-top="0cm" fo:padding-bottom="0.049cm" fo:border-left="none" fo:border-right="0.035cm solid #000000" fo:border-top="none" fo:border-bottom="0.088cm solid #000000"/>
      <style:text-properties fo:font-size="10pt"/>
    </style:style>
    <style:style style:name="P34" style:family="paragraph" style:parent-style-name="Table_20_Contents">
      <style:paragraph-properties fo:margin-top="0cm" fo:margin-bottom="0.499cm" fo:padding-left="0cm" fo:padding-right="0.049cm" fo:padding-top="0cm" fo:padding-bottom="0.049cm" fo:border-left="none" fo:border-right="0.035cm solid #000000" fo:border-top="none" fo:border-bottom="0.088cm solid #000000"/>
      <style:text-properties fo:font-size="10pt" fo:font-weight="bold"/>
    </style:style>
    <style:style style:name="T1" style:family="text">
      <style:text-properties fo:font-variant="normal" fo:text-transform="none"/>
    </style:style>
    <style:style style:name="T2" style:family="text">
      <style:text-properties fo:font-variant="normal" fo:text-transform="none" style:font-name="Courier New" fo:font-size="10pt"/>
    </style:style>
    <style:style style:name="T3" style:family="text">
      <style:text-properties fo:font-size="10pt"/>
    </style:style>
    <style:style style:name="T4" style:family="text">
      <style:text-properties fo:font-size="10pt" style:text-underline-style="solid" style:text-underline-width="auto" style:text-underline-color="font-color" fo:font-weight="bold"/>
    </style:style>
    <style:style style:name="T5" style:family="text">
      <style:text-properties fo:font-weight="bold"/>
    </style:style>
    <style:style style:name="T6" style:family="text">
      <style:text-properties style:text-line-through-style="none" fo:font-size="10pt" style:text-underline-style="none" style:text-blinking="false"/>
    </style:style>
    <style:style style:name="T7" style:family="text">
      <style:text-properties style:font-name="Courier New" fo:font-size="10pt"/>
    </style:style>
    <style:style style:name="T8" style:family="text">
      <style:text-properties style:font-name="Courier New" fo:font-size="10pt" fo:language="en" fo:country="GB"/>
    </style:style>
    <style:style style:name="T9" style:family="text">
      <style:text-properties style:font-name="Courier New" fo:font-size="10pt" fo:language="de" fo:country="DE"/>
    </style:style>
    <style:style style:name="T10" style:family="text">
      <style:text-properties style:font-name="Courier New" fo:font-size="10pt" style:text-underline-style="solid" style:text-underline-width="auto" style:text-underline-color="font-color"/>
    </style:style>
    <style:style style:name="T11" style:family="text">
      <style:text-properties style:font-name="Courier New" fo:font-size="10pt" fo:font-weight="bold"/>
    </style:style>
    <style:style style:name="T12" style:family="text">
      <style:text-properties style:font-name="Courier New" fo:font-size="10pt" fo:font-style="italic" fo:font-weight="bold"/>
    </style:style>
    <style:style style:name="T13" style:family="text">
      <style:text-properties style:font-name="Courier New" fo:font-size="10pt" fo:language="nl" fo:country="NL"/>
    </style:style>
    <style:style style:name="T14" style:family="text">
      <style:text-properties fo:language="en" fo:country="GB"/>
    </style:style>
    <style:style style:name="T15" style:family="text">
      <style:text-properties fo:language="de" fo:country="DE"/>
    </style:style>
    <style:style style:name="T16" style:family="text">
      <style:text-properties fo:font-style="italic"/>
    </style:style>
    <style:style style:name="T17" style:family="text">
      <style:text-properties fo:language="nl" fo:country="N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 text:name="_Toc89775586"/> </text:h>
      <text:h text:style-name="P25" text:outline-level="1">Scripts shell d’administration Unix </text:h>
      <text:h text:style-name="P24" text:outline-level="1"> </text:h>
      <text:h text:style-name="P22" text:outline-level="1">1<text:span text:style-name="T1">         </text:span>Introduction et sommaire du document</text:h>
      <text:p text:style-name="Text_20_body"> </text:p>
      <text:p text:style-name="P8">Tous les scripts shell, dont on donne ici le texte dans ce document, sont des outils d’administration Unix. </text:p>
      <text:p text:style-name="P1">Ce sont des outils utiles pour les développement et la mise au point d'applications informatiques et pour l'administration UNIX. </text:p>
      <text:p text:style-name="Text_20_body"> </text:p>
      <text:p text:style-name="Text_20_body"><text:span text:style-name="T4">Sommaire</text:span> <text:span text:style-name="T3">:</text:span></text:p>
      <text:p text:style-name="Text_20_body"> </text:p>
      <text:p text:style-name="Text_20_body"><text:a xlink:type="simple" xlink:href="http://jardin.secret.pagesperso-orange.fr/Informatique/OUTIL_UX.htm#_Toc89775586"><text:span text:style-name="T3">1</text:span></text:a><text:a xlink:type="simple" xlink:href="http://jardin.secret.pagesperso-orange.fr/Informatique/OUTIL_UX.htm#_Toc89775586"><text:span text:style-name="T6">          </text:span></text:a><text:a xlink:type="simple" xlink:href="http://jardin.secret.pagesperso-orange.fr/Informatique/OUTIL_UX.htm#_Toc89775586"><text:span text:style-name="T3">Introduction et sommaire du document</text:span></text:a></text:p>
      <text:p text:style-name="Text_20_body"><text:a xlink:type="simple" xlink:href="http://jardin.secret.pagesperso-orange.fr/Informatique/OUTIL_UX.htm#_Toc89775587"><text:span text:style-name="T3">2</text:span></text:a><text:a xlink:type="simple" xlink:href="http://jardin.secret.pagesperso-orange.fr/Informatique/OUTIL_UX.htm#_Toc89775587"><text:span text:style-name="T6">          </text:span></text:a><text:a xlink:type="simple" xlink:href="http://jardin.secret.pagesperso-orange.fr/Informatique/OUTIL_UX.htm#_Toc89775587"><text:span text:style-name="T3">Programme de conversion de fichiers DOS -&gt; UNIX : cnvdosux</text:span></text:a></text:p>
      <text:p text:style-name="Text_20_body"><text:a xlink:type="simple" xlink:href="http://jardin.secret.pagesperso-orange.fr/Informatique/OUTIL_UX.htm#_Toc89775588"><text:span text:style-name="T3">3</text:span></text:a><text:a xlink:type="simple" xlink:href="http://jardin.secret.pagesperso-orange.fr/Informatique/OUTIL_UX.htm#_Toc89775588"><text:span text:style-name="T6">          </text:span></text:a><text:a xlink:type="simple" xlink:href="http://jardin.secret.pagesperso-orange.fr/Informatique/OUTIL_UX.htm#_Toc89775588"><text:span text:style-name="T3">Programme de conversion de fichiers UNIX -&gt; DOS : cnvuxdos</text:span></text:a></text:p>
      <text:p text:style-name="Text_20_body"><text:a xlink:type="simple" xlink:href="http://jardin.secret.pagesperso-orange.fr/Informatique/OUTIL_UX.htm#_Toc89775589"><text:span text:style-name="T3">4</text:span></text:a><text:a xlink:type="simple" xlink:href="http://jardin.secret.pagesperso-orange.fr/Informatique/OUTIL_UX.htm#_Toc89775589"><text:span text:style-name="T6">          </text:span></text:a><text:a xlink:type="simple" xlink:href="http://jardin.secret.pagesperso-orange.fr/Informatique/OUTIL_UX.htm#_Toc89775589"><text:span text:style-name="T3">Programme de compilation d'un source "c" : compc</text:span></text:a></text:p>
      <text:p text:style-name="Text_20_body"><text:a xlink:type="simple" xlink:href="http://jardin.secret.pagesperso-orange.fr/Informatique/OUTIL_UX.htm#_Toc89775590"><text:span text:style-name="T3">5</text:span></text:a><text:a xlink:type="simple" xlink:href="http://jardin.secret.pagesperso-orange.fr/Informatique/OUTIL_UX.htm#_Toc89775590"><text:span text:style-name="T6">          </text:span></text:a><text:a xlink:type="simple" xlink:href="http://jardin.secret.pagesperso-orange.fr/Informatique/OUTIL_UX.htm#_Toc89775590"><text:span text:style-name="T3">Programme de recherche d'une chaine et des lignes qui l'entourent dans un groupe de fichiers : contxsch</text:span></text:a></text:p>
      <text:p text:style-name="Text_20_body"><text:a xlink:type="simple" xlink:href="http://jardin.secret.pagesperso-orange.fr/Informatique/OUTIL_UX.htm#_Toc89775591"><text:span text:style-name="T3">6</text:span></text:a><text:a xlink:type="simple" xlink:href="http://jardin.secret.pagesperso-orange.fr/Informatique/OUTIL_UX.htm#_Toc89775591"><text:span text:style-name="T6">          </text:span></text:a><text:a xlink:type="simple" xlink:href="http://jardin.secret.pagesperso-orange.fr/Informatique/OUTIL_UX.htm#_Toc89775591"><text:span text:style-name="T3">Programme liste tous les sous-répertoires d'un répertoire : dir</text:span></text:a></text:p>
      <text:p text:style-name="Text_20_body"><text:a xlink:type="simple" xlink:href="http://jardin.secret.pagesperso-orange.fr/Informatique/OUTIL_UX.htm#_Toc89775592"><text:span text:style-name="T3">7</text:span></text:a><text:a xlink:type="simple" xlink:href="http://jardin.secret.pagesperso-orange.fr/Informatique/OUTIL_UX.htm#_Toc89775592"><text:span text:style-name="T6">          </text:span></text:a><text:a xlink:type="simple" xlink:href="http://jardin.secret.pagesperso-orange.fr/Informatique/OUTIL_UX.htm#_Toc89775592"><text:span text:style-name="T3">Programme liste tous les sous-répertoires d'un répertoire sous forme d'une liste arborescente : dtree</text:span></text:a></text:p>
      <text:p text:style-name="Text_20_body"><text:a xlink:type="simple" xlink:href="http://jardin.secret.pagesperso-orange.fr/Informatique/OUTIL_UX.htm#_Toc89775593"><text:span text:style-name="T3">8</text:span></text:a><text:a xlink:type="simple" xlink:href="http://jardin.secret.pagesperso-orange.fr/Informatique/OUTIL_UX.htm#_Toc89775593"><text:span text:style-name="T6">          </text:span></text:a><text:a xlink:type="simple" xlink:href="http://jardin.secret.pagesperso-orange.fr/Informatique/OUTIL_UX.htm#_Toc89775593"><text:span text:style-name="T3">Programme liste tous les sous-répertoires et les fichiers associées d'un répertoire de façon "identée" : tree</text:span></text:a></text:p>
      <text:p text:style-name="Text_20_body"><text:a xlink:type="simple" xlink:href="http://jardin.secret.pagesperso-orange.fr/Informatique/OUTIL_UX.htm#_Toc89775594"><text:span text:style-name="T3">9</text:span></text:a><text:a xlink:type="simple" xlink:href="http://jardin.secret.pagesperso-orange.fr/Informatique/OUTIL_UX.htm#_Toc89775594"><text:span text:style-name="T6">          </text:span></text:a><text:a xlink:type="simple" xlink:href="http://jardin.secret.pagesperso-orange.fr/Informatique/OUTIL_UX.htm#_Toc89775594"><text:span text:style-name="T3">Programme d'envoi par uucp d'un fichier à une liste de site destinataires : env_sites</text:span></text:a></text:p>
      <text:p text:style-name="Text_20_body"><text:a xlink:type="simple" xlink:href="http://jardin.secret.pagesperso-orange.fr/Informatique/OUTIL_UX.htm#_Toc89775595"><text:span text:style-name="T3">10</text:span></text:a><text:a xlink:type="simple" xlink:href="http://jardin.secret.pagesperso-orange.fr/Informatique/OUTIL_UX.htm#_Toc89775595"><text:span text:style-name="T6">               </text:span></text:a><text:a xlink:type="simple" xlink:href="http://jardin.secret.pagesperso-orange.fr/Informatique/OUTIL_UX.htm#_Toc89775595"><text:span text:style-name="T3">Programme de visualisations des premières lignes d'un fichier  : head</text:span></text:a></text:p>
      <text:p text:style-name="Text_20_body"><text:a xlink:type="simple" xlink:href="http://jardin.secret.pagesperso-orange.fr/Informatique/OUTIL_UX.htm#_Toc89775596"><text:span text:style-name="T3">11</text:span></text:a><text:a xlink:type="simple" xlink:href="http://jardin.secret.pagesperso-orange.fr/Informatique/OUTIL_UX.htm#_Toc89775596"><text:span text:style-name="T6">               </text:span></text:a><text:a xlink:type="simple" xlink:href="http://jardin.secret.pagesperso-orange.fr/Informatique/OUTIL_UX.htm#_Toc89775596"><text:span text:style-name="T3">Programme de suppression d'envoi(s) "uucp" par un utilisateur  : kill_uucp</text:span></text:a></text:p>
      <text:p text:style-name="Text_20_body"><text:a xlink:type="simple" xlink:href="http://jardin.secret.pagesperso-orange.fr/Informatique/OUTIL_UX.htm#_Toc89775597"><text:span text:style-name="T3">12</text:span></text:a><text:a xlink:type="simple" xlink:href="http://jardin.secret.pagesperso-orange.fr/Informatique/OUTIL_UX.htm#_Toc89775597"><text:span text:style-name="T6">               </text:span></text:a><text:a xlink:type="simple" xlink:href="http://jardin.secret.pagesperso-orange.fr/Informatique/OUTIL_UX.htm#_Toc89775597"><text:span text:style-name="T3">Programme listant toute les caractéristiques de tous les fichiers (y compris les fichiers cachés) d'un répertoire : ll</text:span></text:a></text:p>
      <text:p text:style-name="Text_20_body"><text:a xlink:type="simple" xlink:href="http://jardin.secret.pagesperso-orange.fr/Informatique/OUTIL_UX.htm#_Toc89775598"><text:span text:style-name="T3">13</text:span></text:a><text:a xlink:type="simple" xlink:href="http://jardin.secret.pagesperso-orange.fr/Informatique/OUTIL_UX.htm#_Toc89775598"><text:span text:style-name="T6">               </text:span></text:a><text:a xlink:type="simple" xlink:href="http://jardin.secret.pagesperso-orange.fr/Informatique/OUTIL_UX.htm#_Toc89775598"><text:span text:style-name="T3">Programme recherchant une chaine de caractère dans une arborecence de répertoire : pattsch</text:span></text:a></text:p>
      <text:p text:style-name="Text_20_body"><text:a xlink:type="simple" xlink:href="http://jardin.secret.pagesperso-orange.fr/Informatique/OUTIL_UX.htm#_Toc89775599"><text:span text:style-name="T3">14</text:span></text:a><text:a xlink:type="simple" xlink:href="http://jardin.secret.pagesperso-orange.fr/Informatique/OUTIL_UX.htm#_Toc89775599"><text:span text:style-name="T6">               </text:span></text:a><text:a xlink:type="simple" xlink:href="http://jardin.secret.pagesperso-orange.fr/Informatique/OUTIL_UX.htm#_Toc89775599"><text:span text:style-name="T3">Programme de recherche simple d'un fichier a partir d'un répertoire : where</text:span></text:a></text:p>
      <text:p text:style-name="Text_20_body"><text:a xlink:type="simple" xlink:href="http://jardin.secret.pagesperso-orange.fr/Informatique/OUTIL_UX.htm#_Toc89775600"><text:span text:style-name="T3">15</text:span></text:a><text:a xlink:type="simple" xlink:href="http://jardin.secret.pagesperso-orange.fr/Informatique/OUTIL_UX.htm#_Toc89775600"><text:span text:style-name="T6">               </text:span></text:a><text:a xlink:type="simple" xlink:href="http://jardin.secret.pagesperso-orange.fr/Informatique/OUTIL_UX.htm#_Toc89775600"><text:span text:style-name="T3">Programme initialisation de l'environnement de ksh : init_ksh</text:span></text:a></text:p>
      <text:p text:style-name="Text_20_body"><text:a xlink:type="simple" xlink:href="http://jardin.secret.pagesperso-orange.fr/Informatique/OUTIL_UX.htm#_Toc89775601"><text:span text:style-name="T3">16</text:span></text:a><text:a xlink:type="simple" xlink:href="http://jardin.secret.pagesperso-orange.fr/Informatique/OUTIL_UX.htm#_Toc89775601"><text:span text:style-name="T6">           </text:span></text:a><text:a xlink:type="simple" xlink:href="http://jardin.secret.pagesperso-orange.fr/Informatique/OUTIL_UX.htm#_Toc89775601"><text:span text:style-name="T3">Script d'impression : pr2</text:span></text:a></text:p>
      <text:p text:style-name="Text_20_body"><text:a xlink:type="simple" xlink:href="http://jardin.secret.pagesperso-orange.fr/Informatique/OUTIL_UX.htm#_Toc89775602"><text:span text:style-name="T3">17</text:span></text:a><text:a xlink:type="simple" xlink:href="http://jardin.secret.pagesperso-orange.fr/Informatique/OUTIL_UX.htm#_Toc89775602"><text:span text:style-name="T6">               </text:span></text:a><text:a xlink:type="simple" xlink:href="http://jardin.secret.pagesperso-orange.fr/Informatique/OUTIL_UX.htm#_Toc89775602"><text:span text:style-name="T3">Exemple de script d’arrêt de toutes les bases Oracle</text:span></text:a></text:p>
      <text:p text:style-name="Text_20_body"><text:a xlink:type="simple" xlink:href="http://jardin.secret.pagesperso-orange.fr/Informatique/OUTIL_UX.htm#_Toc89775603"><text:span text:style-name="T3">18</text:span></text:a><text:a xlink:type="simple" xlink:href="http://jardin.secret.pagesperso-orange.fr/Informatique/OUTIL_UX.htm#_Toc89775603"><text:span text:style-name="T6">               </text:span></text:a><text:a xlink:type="simple" xlink:href="http://jardin.secret.pagesperso-orange.fr/Informatique/OUTIL_UX.htm#_Toc89775603"><text:span text:style-name="T3">Exemple de script pour se connecter successivement à une liste de machines : cnx_ux</text:span></text:a></text:p>
      <text:p text:style-name="Text_20_body"><text:a xlink:type="simple" xlink:href="http://jardin.secret.pagesperso-orange.fr/Informatique/OUTIL_UX.htm#_Toc89775604"><text:span text:style-name="T3">19</text:span></text:a><text:a xlink:type="simple" xlink:href="http://jardin.secret.pagesperso-orange.fr/Informatique/OUTIL_UX.htm#_Toc89775604"><text:span text:style-name="T6">           </text:span></text:a><text:a xlink:type="simple" xlink:href="http://jardin.secret.pagesperso-orange.fr/Informatique/OUTIL_UX.htm#_Toc89775604"><text:span text:style-name="T3">Script copiant la « crontab » sur une succession de machines</text:span></text:a></text:p>
      <text:p text:style-name="Text_20_body"><text:a xlink:type="simple" xlink:href="http://jardin.secret.pagesperso-orange.fr/Informatique/OUTIL_UX.htm#_Toc89775605"><text:span text:style-name="T3">20</text:span></text:a><text:a xlink:type="simple" xlink:href="http://jardin.secret.pagesperso-orange.fr/Informatique/OUTIL_UX.htm#_Toc89775605"><text:span text:style-name="T6">           </text:span></text:a><text:a xlink:type="simple" xlink:href="http://jardin.secret.pagesperso-orange.fr/Informatique/OUTIL_UX.htm#_Toc89775605"><text:span text:style-name="T3">Script copiant un script d’exploitation sur une succession de machines</text:span></text:a></text:p>
      <text:p text:style-name="Text_20_body"><text:a xlink:type="simple" xlink:href="http://jardin.secret.pagesperso-orange.fr/Informatique/OUTIL_UX.htm#_Toc89775606"><text:span text:style-name="T3">21</text:span></text:a><text:a xlink:type="simple" xlink:href="http://jardin.secret.pagesperso-orange.fr/Informatique/OUTIL_UX.htm#_Toc89775606"><text:span text:style-name="T6">           </text:span></text:a><text:a xlink:type="simple" xlink:href="http://jardin.secret.pagesperso-orange.fr/Informatique/OUTIL_UX.htm#_Toc89775606"><text:span text:style-name="T3">Script calculant l’espace libre sur machine HP : esp_alloue_libre_hp</text:span></text:a></text:p>
      <text:p text:style-name="Text_20_body"><text:a xlink:type="simple" xlink:href="http://jardin.secret.pagesperso-orange.fr/Informatique/OUTIL_UX.htm#_Toc89775607"><text:span text:style-name="T3">22</text:span></text:a><text:a xlink:type="simple" xlink:href="http://jardin.secret.pagesperso-orange.fr/Informatique/OUTIL_UX.htm#_Toc89775607"><text:span text:style-name="T6">           </text:span></text:a><text:a xlink:type="simple" xlink:href="http://jardin.secret.pagesperso-orange.fr/Informatique/OUTIL_UX.htm#_Toc89775607"><text:span text:style-name="T3">Script calculant l’espace libre sur machine SUN : esp_alloue_libre_sun</text:span></text:a></text:p>
      <text:p text:style-name="Text_20_body"><text:a xlink:type="simple" xlink:href="http://jardin.secret.pagesperso-orange.fr/Informatique/OUTIL_UX.htm#_Toc89775608"><text:span text:style-name="T3">23</text:span></text:a><text:a xlink:type="simple" xlink:href="http://jardin.secret.pagesperso-orange.fr/Informatique/OUTIL_UX.htm#_Toc89775608"><text:span text:style-name="T6">           </text:span></text:a><text:a xlink:type="simple" xlink:href="http://jardin.secret.pagesperso-orange.fr/Informatique/OUTIL_UX.htm#_Toc89775608"><text:span text:style-name="T3">Script donnant espace disque libre sur toutes les machines du centre informatique</text:span></text:a></text:p>
      <text:p text:style-name="Text_20_body"><text:a xlink:type="simple" xlink:href="http://jardin.secret.pagesperso-orange.fr/Informatique/OUTIL_UX.htm#_Toc89775609"><text:span text:style-name="T3">24</text:span></text:a><text:a xlink:type="simple" xlink:href="http://jardin.secret.pagesperso-orange.fr/Informatique/OUTIL_UX.htm#_Toc89775609"><text:span text:style-name="T6">           </text:span></text:a><text:a xlink:type="simple" xlink:href="http://jardin.secret.pagesperso-orange.fr/Informatique/OUTIL_UX.htm#_Toc89775609"><text:span text:style-name="T3">Script calculant l’espace non alloué sur machine HP : esp_non_alloue_hp</text:span></text:a></text:p>
      <text:p text:style-name="Text_20_body"><text:a xlink:type="simple" xlink:href="http://jardin.secret.pagesperso-orange.fr/Informatique/OUTIL_UX.htm#_Toc89775610"><text:span text:style-name="T3">25</text:span></text:a><text:a xlink:type="simple" xlink:href="http://jardin.secret.pagesperso-orange.fr/Informatique/OUTIL_UX.htm#_Toc89775610"><text:span text:style-name="T6">           </text:span></text:a><text:a xlink:type="simple" xlink:href="http://jardin.secret.pagesperso-orange.fr/Informatique/OUTIL_UX.htm#_Toc89775610"><text:span text:style-name="T3">script de recherche d'une chaîne de caractères dans tous les fichiers ascii, situés dans une arborecence</text:span></text:a></text:p>
      <text:p text:style-name="Text_20_body"><text:a xlink:type="simple" xlink:href="http://jardin.secret.pagesperso-orange.fr/Informatique/OUTIL_UX.htm#_Toc89775611"><text:span text:style-name="T3">26</text:span></text:a><text:a xlink:type="simple" xlink:href="http://jardin.secret.pagesperso-orange.fr/Informatique/OUTIL_UX.htm#_Toc89775611"><text:span text:style-name="T6">           </text:span></text:a><text:a xlink:type="simple" xlink:href="http://jardin.secret.pagesperso-orange.fr/Informatique/OUTIL_UX.htm#_Toc89775611"><text:span text:style-name="T3">script d’impression sur une seule imprimante des tailles des partitions de chacune des machines du centre</text:span></text:a></text:p>
      <text:p text:style-name="Text_20_body"><text:a xlink:type="simple" xlink:href="http://jardin.secret.pagesperso-orange.fr/Informatique/OUTIL_UX.htm#_Toc89775612"><text:span text:style-name="T3">27</text:span></text:a><text:a xlink:type="simple" xlink:href="http://jardin.secret.pagesperso-orange.fr/Informatique/OUTIL_UX.htm#_Toc89775612"><text:span text:style-name="T6">           </text:span></text:a><text:a xlink:type="simple" xlink:href="http://jardin.secret.pagesperso-orange.fr/Informatique/OUTIL_UX.htm#_Toc89775612"><text:span text:style-name="T3">script listant, dans un fichier unique, tous les scripts developpés pour le centre</text:span></text:a></text:p>
      <text:p text:style-name="Text_20_body"><text:a xlink:type="simple" xlink:href="http://jardin.secret.pagesperso-orange.fr/Informatique/OUTIL_UX.htm#_Toc89775613"><text:span text:style-name="T3">28</text:span></text:a><text:a xlink:type="simple" xlink:href="http://jardin.secret.pagesperso-orange.fr/Informatique/OUTIL_UX.htm#_Toc89775613"><text:span text:style-name="T6">           </text:span></text:a><text:a xlink:type="simple" xlink:href="http://jardin.secret.pagesperso-orange.fr/Informatique/OUTIL_UX.htm#_Toc89775613"><text:span text:style-name="T3">script de lancement de fenêtres ouvertes HPView sur une succession de machines HP</text:span></text:a></text:p>
      <text:p text:style-name="Text_20_body"><text:a xlink:type="simple" xlink:href="http://jardin.secret.pagesperso-orange.fr/Informatique/OUTIL_UX.htm#_Toc89775614"><text:span text:style-name="T3">29</text:span></text:a><text:a xlink:type="simple" xlink:href="http://jardin.secret.pagesperso-orange.fr/Informatique/OUTIL_UX.htm#_Toc89775614"><text:span text:style-name="T6">           </text:span></text:a><text:a xlink:type="simple" xlink:href="http://jardin.secret.pagesperso-orange.fr/Informatique/OUTIL_UX.htm#_Toc89775614"><text:span text:style-name="T3">script fusionnant tous les fichiers hosts des machines, pour obtenir la liste de toutes les adresses IP existantes</text:span></text:a></text:p>
      <text:p text:style-name="Text_20_body"><text:a xlink:type="simple" xlink:href="http://jardin.secret.pagesperso-orange.fr/Informatique/OUTIL_UX.htm#_Toc89775615"><text:span text:style-name="T3">30</text:span></text:a><text:a xlink:type="simple" xlink:href="http://jardin.secret.pagesperso-orange.fr/Informatique/OUTIL_UX.htm#_Toc89775615"><text:span text:style-name="T6">           </text:span></text:a><text:a xlink:type="simple" xlink:href="http://jardin.secret.pagesperso-orange.fr/Informatique/OUTIL_UX.htm#_Toc89775615"><text:span text:style-name="T3">script de copie d’une liste de scripts d’administration, sur les machines du centre</text:span></text:a></text:p>
      <text:p text:style-name="Text_20_body"><text:a xlink:type="simple" xlink:href="http://jardin.secret.pagesperso-orange.fr/Informatique/OUTIL_UX.htm#_Toc89775616"><text:span text:style-name="T3">31</text:span></text:a><text:a xlink:type="simple" xlink:href="http://jardin.secret.pagesperso-orange.fr/Informatique/OUTIL_UX.htm#_Toc89775616"><text:span text:style-name="T6">           </text:span></text:a><text:a xlink:type="simple" xlink:href="http://jardin.secret.pagesperso-orange.fr/Informatique/OUTIL_UX.htm#_Toc89775616"><text:span text:style-name="T3">script de purge des fichiers anciens et temporaires (version pour HP)</text:span></text:a></text:p>
      <text:p text:style-name="Text_20_body"><text:a xlink:type="simple" xlink:href="http://jardin.secret.pagesperso-orange.fr/Informatique/OUTIL_UX.htm#_Toc89775617"><text:span text:style-name="T3">32</text:span></text:a><text:a xlink:type="simple" xlink:href="http://jardin.secret.pagesperso-orange.fr/Informatique/OUTIL_UX.htm#_Toc89775617"><text:span text:style-name="T6">           </text:span></text:a><text:a xlink:type="simple" xlink:href="http://jardin.secret.pagesperso-orange.fr/Informatique/OUTIL_UX.htm#_Toc89775617"><text:span text:style-name="T3">script de purge des fichiers anciens et temporaires (version pour SUN)</text:span></text:a></text:p>
      <text:p text:style-name="Text_20_body"><text:a xlink:type="simple" xlink:href="http://jardin.secret.pagesperso-orange.fr/Informatique/OUTIL_UX.htm#_Toc89775618"><text:span text:style-name="T3">33</text:span></text:a><text:a xlink:type="simple" xlink:href="http://jardin.secret.pagesperso-orange.fr/Informatique/OUTIL_UX.htm#_Toc89775618"><text:span text:style-name="T6">           </text:span></text:a><text:a xlink:type="simple" xlink:href="http://jardin.secret.pagesperso-orange.fr/Informatique/OUTIL_UX.htm#_Toc89775618"><text:span text:style-name="T3">script de purge des fichiers log ou temporaires trop gros</text:span></text:a></text:p>
      <text:p text:style-name="Text_20_body"><text:a xlink:type="simple" xlink:href="http://jardin.secret.pagesperso-orange.fr/Informatique/OUTIL_UX.htm#_Toc89775619"><text:span text:style-name="T3">34</text:span></text:a><text:a xlink:type="simple" xlink:href="http://jardin.secret.pagesperso-orange.fr/Informatique/OUTIL_UX.htm#_Toc89775619"><text:span text:style-name="T6">           </text:span></text:a><text:a xlink:type="simple" xlink:href="http://jardin.secret.pagesperso-orange.fr/Informatique/OUTIL_UX.htm#_Toc89775619"><text:span text:style-name="T3">script de reboot et de rédémarrage automatique (version pour HP)</text:span></text:a></text:p>
      <text:p text:style-name="Text_20_body"><text:a xlink:type="simple" xlink:href="http://jardin.secret.pagesperso-orange.fr/Informatique/OUTIL_UX.htm#_Toc89775620"><text:span text:style-name="T3">35</text:span></text:a><text:a xlink:type="simple" xlink:href="http://jardin.secret.pagesperso-orange.fr/Informatique/OUTIL_UX.htm#_Toc89775620"><text:span text:style-name="T6">           </text:span></text:a><text:a xlink:type="simple" xlink:href="http://jardin.secret.pagesperso-orange.fr/Informatique/OUTIL_UX.htm#_Toc89775620"><text:span text:style-name="T3">script de reboot et de rédémarrage automatique (version pour SUN)</text:span></text:a></text:p>
      <text:p text:style-name="Text_20_body"><text:a xlink:type="simple" xlink:href="http://jardin.secret.pagesperso-orange.fr/Informatique/OUTIL_UX.htm#_Toc89775621"><text:span text:style-name="T3">36</text:span></text:a><text:a xlink:type="simple" xlink:href="http://jardin.secret.pagesperso-orange.fr/Informatique/OUTIL_UX.htm#_Toc89775621"><text:span text:style-name="T6">           </text:span></text:a><text:a xlink:type="simple" xlink:href="http://jardin.secret.pagesperso-orange.fr/Informatique/OUTIL_UX.htm#_Toc89775621"><text:span text:style-name="T3">script de relance des bases Oracle</text:span></text:a></text:p>
      <text:p text:style-name="Text_20_body"><text:a xlink:type="simple" xlink:href="http://jardin.secret.pagesperso-orange.fr/Informatique/OUTIL_UX.htm#_Toc89775622"><text:span text:style-name="T3">37</text:span></text:a><text:a xlink:type="simple" xlink:href="http://jardin.secret.pagesperso-orange.fr/Informatique/OUTIL_UX.htm#_Toc89775622"><text:span text:style-name="T6">               </text:span></text:a><text:a xlink:type="simple" xlink:href="http://jardin.secret.pagesperso-orange.fr/Informatique/OUTIL_UX.htm#_Toc89775622"><text:span text:style-name="T3">Exemple de script de restauration d’une base réseau et fichiers à partir d’une bande</text:span></text:a></text:p>
      <text:p text:style-name="Text_20_body"><text:a xlink:type="simple" xlink:href="http://jardin.secret.pagesperso-orange.fr/Informatique/OUTIL_UX.htm#_Toc89775623"><text:span text:style-name="T3">38</text:span></text:a><text:a xlink:type="simple" xlink:href="http://jardin.secret.pagesperso-orange.fr/Informatique/OUTIL_UX.htm#_Toc89775623"><text:span text:style-name="T6">               </text:span></text:a><text:a xlink:type="simple" xlink:href="http://jardin.secret.pagesperso-orange.fr/Informatique/OUTIL_UX.htm#_Toc89775623"><text:span text:style-name="T3">Exemple de script de restauration par « cpio » à partir d’une bande</text:span></text:a></text:p>
      <text:p text:style-name="Text_20_body"><text:a xlink:type="simple" xlink:href="http://jardin.secret.pagesperso-orange.fr/Informatique/OUTIL_UX.htm#_Toc89775624"><text:span text:style-name="T3">39</text:span></text:a><text:a xlink:type="simple" xlink:href="http://jardin.secret.pagesperso-orange.fr/Informatique/OUTIL_UX.htm#_Toc89775624"><text:span text:style-name="T6">               </text:span></text:a><text:a xlink:type="simple" xlink:href="http://jardin.secret.pagesperso-orange.fr/Informatique/OUTIL_UX.htm#_Toc89775624"><text:span text:style-name="T3">Exemple de script de restauration par « ufsrestore » à partir d’une bande (Sun)</text:span></text:a></text:p>
      <text:p text:style-name="Text_20_body"><text:a xlink:type="simple" xlink:href="http://jardin.secret.pagesperso-orange.fr/Informatique/OUTIL_UX.htm#_Toc89775625"><text:span text:style-name="T3">40</text:span></text:a><text:a xlink:type="simple" xlink:href="http://jardin.secret.pagesperso-orange.fr/Informatique/OUTIL_UX.htm#_Toc89775625"><text:span text:style-name="T6">               </text:span></text:a><text:a xlink:type="simple" xlink:href="http://jardin.secret.pagesperso-orange.fr/Informatique/OUTIL_UX.htm#_Toc89775625"><text:span text:style-name="T3">Exemple de script de savegarde sur bande par « cpio » (HP)</text:span></text:a></text:p>
      <text:p text:style-name="Text_20_body"><text:a xlink:type="simple" xlink:href="http://jardin.secret.pagesperso-orange.fr/Informatique/OUTIL_UX.htm#_Toc89775626"><text:span text:style-name="T3">41</text:span></text:a><text:a xlink:type="simple" xlink:href="http://jardin.secret.pagesperso-orange.fr/Informatique/OUTIL_UX.htm#_Toc89775626"><text:span text:style-name="T6">               </text:span></text:a><text:a xlink:type="simple" xlink:href="http://jardin.secret.pagesperso-orange.fr/Informatique/OUTIL_UX.htm#_Toc89775626"><text:span text:style-name="T3">Exemple de script de savegarde sur bande par « ufsdump » (SUN)</text:span></text:a></text:p>
      <text:p text:style-name="Text_20_body"><text:a xlink:type="simple" xlink:href="http://jardin.secret.pagesperso-orange.fr/Informatique/OUTIL_UX.htm#_Toc89775627"><text:span text:style-name="T3">42</text:span></text:a><text:a xlink:type="simple" xlink:href="http://jardin.secret.pagesperso-orange.fr/Informatique/OUTIL_UX.htm#_Toc89775627"><text:span text:style-name="T6">               </text:span></text:a><text:a xlink:type="simple" xlink:href="http://jardin.secret.pagesperso-orange.fr/Informatique/OUTIL_UX.htm#_Toc89775627"><text:span text:style-name="T3">Exemple de script de savegarde sur bande par « fbackup »</text:span></text:a></text:p>
      <text:p text:style-name="Text_20_body"><text:a xlink:type="simple" xlink:href="http://jardin.secret.pagesperso-orange.fr/Informatique/OUTIL_UX.htm#_Toc89775628"><text:span text:style-name="T3">43</text:span></text:a><text:a xlink:type="simple" xlink:href="http://jardin.secret.pagesperso-orange.fr/Informatique/OUTIL_UX.htm#_Toc89775628"><text:span text:style-name="T6">               </text:span></text:a><text:a xlink:type="simple" xlink:href="http://jardin.secret.pagesperso-orange.fr/Informatique/OUTIL_UX.htm#_Toc89775628"><text:span text:style-name="T3">Exemple de script de savegarde sur bande par « cpio » (SUN)</text:span></text:a></text:p>
      <text:p text:style-name="Text_20_body"><text:a xlink:type="simple" xlink:href="http://jardin.secret.pagesperso-orange.fr/Informatique/OUTIL_UX.htm#_Toc89775629"><text:span text:style-name="T3">44</text:span></text:a><text:a xlink:type="simple" xlink:href="http://jardin.secret.pagesperso-orange.fr/Informatique/OUTIL_UX.htm#_Toc89775629"><text:span text:style-name="T6">               </text:span></text:a><text:a xlink:type="simple" xlink:href="http://jardin.secret.pagesperso-orange.fr/Informatique/OUTIL_UX.htm#_Toc89775629"><text:span text:style-name="T3">Exemple de script de savegarde sur bande par « ufsdump » (SUN)</text:span></text:a></text:p>
      <text:p text:style-name="Text_20_body"><text:a xlink:type="simple" xlink:href="http://jardin.secret.pagesperso-orange.fr/Informatique/OUTIL_UX.htm#_Toc89775630"><text:span text:style-name="T3">45</text:span></text:a><text:a xlink:type="simple" xlink:href="http://jardin.secret.pagesperso-orange.fr/Informatique/OUTIL_UX.htm#_Toc89775630"><text:span text:style-name="T6">               </text:span></text:a><text:a xlink:type="simple" xlink:href="http://jardin.secret.pagesperso-orange.fr/Informatique/OUTIL_UX.htm#_Toc89775630"><text:span text:style-name="T3">Exemple de script de savegarde de la partie système sur bande par « cpio » (SUN)</text:span></text:a></text:p>
      <text:p text:style-name="Text_20_body"><text:a xlink:type="simple" xlink:href="http://jardin.secret.pagesperso-orange.fr/Informatique/OUTIL_UX.htm#_Toc89775631"><text:span text:style-name="T3">46</text:span></text:a><text:a xlink:type="simple" xlink:href="http://jardin.secret.pagesperso-orange.fr/Informatique/OUTIL_UX.htm#_Toc89775631"><text:span text:style-name="T6">               </text:span></text:a><text:a xlink:type="simple" xlink:href="http://jardin.secret.pagesperso-orange.fr/Informatique/OUTIL_UX.htm#_Toc89775631"><text:span text:style-name="T3">Exemple de script de savegarde de la partie système sur bande par « cpio » (HP)</text:span></text:a></text:p>
      <text:p text:style-name="Text_20_body"><text:a xlink:type="simple" xlink:href="http://jardin.secret.pagesperso-orange.fr/Informatique/OUTIL_UX.htm#_Toc89775632"><text:span text:style-name="T3">47</text:span></text:a><text:a xlink:type="simple" xlink:href="http://jardin.secret.pagesperso-orange.fr/Informatique/OUTIL_UX.htm#_Toc89775632"><text:span text:style-name="T6">           </text:span></text:a><text:a xlink:type="simple" xlink:href="http://jardin.secret.pagesperso-orange.fr/Informatique/OUTIL_UX.htm#_Toc89775632"><text:span text:style-name="T3">Autre exemple de script de savegarde de la partie système sur bande par « cpio » (SUN)</text:span></text:a></text:p>
      <text:p text:style-name="Text_20_body"><text:a xlink:type="simple" xlink:href="http://jardin.secret.pagesperso-orange.fr/Informatique/OUTIL_UX.htm#_Toc89775633"><text:span text:style-name="T3">48</text:span></text:a><text:a xlink:type="simple" xlink:href="http://jardin.secret.pagesperso-orange.fr/Informatique/OUTIL_UX.htm#_Toc89775633"><text:span text:style-name="T6">               </text:span></text:a><text:a xlink:type="simple" xlink:href="http://jardin.secret.pagesperso-orange.fr/Informatique/OUTIL_UX.htm#_Toc89775633"><text:span text:style-name="T3">Exemple de script de savegarde de la partie système sur bande par « ufsdump » (SUN)</text:span></text:a></text:p>
      <text:p text:style-name="Text_20_body"><text:a xlink:type="simple" xlink:href="http://jardin.secret.pagesperso-orange.fr/Informatique/OUTIL_UX.htm#_Toc89775634"><text:span text:style-name="T3">49</text:span></text:a><text:a xlink:type="simple" xlink:href="http://jardin.secret.pagesperso-orange.fr/Informatique/OUTIL_UX.htm#_Toc89775634"><text:span text:style-name="T6">               </text:span></text:a><text:a xlink:type="simple" xlink:href="http://jardin.secret.pagesperso-orange.fr/Informatique/OUTIL_UX.htm#_Toc89775634"><text:span text:style-name="T3">Exemple de script de relance d’une base Oracle (on donnant son SID)</text:span></text:a></text:p>
      <text:p text:style-name="Text_20_body"><text:a xlink:type="simple" xlink:href="http://jardin.secret.pagesperso-orange.fr/Informatique/OUTIL_UX.htm#_Toc89775635"><text:span text:style-name="T3">50</text:span></text:a><text:a xlink:type="simple" xlink:href="http://jardin.secret.pagesperso-orange.fr/Informatique/OUTIL_UX.htm#_Toc89775635"><text:span text:style-name="T6">               </text:span></text:a><text:a xlink:type="simple" xlink:href="http://jardin.secret.pagesperso-orange.fr/Informatique/OUTIL_UX.htm#_Toc89775635"><text:span text:style-name="T3">Exemple de script d’arrêt d’une base Oracle (on donnant son SID)</text:span></text:a></text:p>
      <text:p text:style-name="Text_20_body"><text:a xlink:type="simple" xlink:href="http://jardin.secret.pagesperso-orange.fr/Informatique/OUTIL_UX.htm#_Toc89775636"><text:span text:style-name="T3">51</text:span></text:a><text:a xlink:type="simple" xlink:href="http://jardin.secret.pagesperso-orange.fr/Informatique/OUTIL_UX.htm#_Toc89775636"><text:span text:style-name="T6">           </text:span></text:a><text:a xlink:type="simple" xlink:href="http://jardin.secret.pagesperso-orange.fr/Informatique/OUTIL_UX.htm#_Toc89775636"><text:span text:style-name="T3">Script de surveillance de la mémoire (SUN)</text:span></text:a></text:p>
      <text:p text:style-name="Text_20_body"><text:a xlink:type="simple" xlink:href="http://jardin.secret.pagesperso-orange.fr/Informatique/OUTIL_UX.htm#_Toc89775637"><text:span text:style-name="T3">52</text:span></text:a><text:a xlink:type="simple" xlink:href="http://jardin.secret.pagesperso-orange.fr/Informatique/OUTIL_UX.htm#_Toc89775637"><text:span text:style-name="T6">           </text:span></text:a><text:a xlink:type="simple" xlink:href="http://jardin.secret.pagesperso-orange.fr/Informatique/OUTIL_UX.htm#_Toc89775637"><text:span text:style-name="T3">Script de surveillance de la swap (HP)</text:span></text:a></text:p>
      <text:p text:style-name="Text_20_body"><text:a xlink:type="simple" xlink:href="http://jardin.secret.pagesperso-orange.fr/Informatique/OUTIL_UX.htm#_Toc89775638"><text:span text:style-name="T3">53</text:span></text:a><text:a xlink:type="simple" xlink:href="http://jardin.secret.pagesperso-orange.fr/Informatique/OUTIL_UX.htm#_Toc89775638"><text:span text:style-name="T6">               </text:span></text:a><text:a xlink:type="simple" xlink:href="http://jardin.secret.pagesperso-orange.fr/Informatique/OUTIL_UX.htm#_Toc89775638"><text:span text:style-name="T3">surveillance du non dépassement du nombre d’utilisateurs de la licence Oracle</text:span></text:a></text:p>
      <text:p text:style-name="Text_20_body"><text:a xlink:type="simple" xlink:href="http://jardin.secret.pagesperso-orange.fr/Informatique/OUTIL_UX.htm#_Toc89775639"><text:span text:style-name="T3">54</text:span></text:a><text:a xlink:type="simple" xlink:href="http://jardin.secret.pagesperso-orange.fr/Informatique/OUTIL_UX.htm#_Toc89775639"><text:span text:style-name="T6">           </text:span></text:a><text:a xlink:type="simple" xlink:href="http://jardin.secret.pagesperso-orange.fr/Informatique/OUTIL_UX.htm#_Toc89775639"><text:span text:style-name="T3">Script de purges des fichiers log de Lotus Note</text:span></text:a></text:p>
      <text:p text:style-name="Text_20_body"><text:a xlink:type="simple" xlink:href="http://jardin.secret.pagesperso-orange.fr/Informatique/OUTIL_UX.htm#_Toc89775640"><text:span text:style-name="T3">55</text:span></text:a><text:a xlink:type="simple" xlink:href="http://jardin.secret.pagesperso-orange.fr/Informatique/OUTIL_UX.htm#_Toc89775640"><text:span text:style-name="T6">           </text:span></text:a><text:a xlink:type="simple" xlink:href="http://jardin.secret.pagesperso-orange.fr/Informatique/OUTIL_UX.htm#_Toc89775640"><text:span text:style-name="T3">scripts pour surveiller que les droits systèmes de certains fichiers sensibles ne changent pas (version pour HP)</text:span></text:a></text:p>
      <text:p text:style-name="Text_20_body"><text:a xlink:type="simple" xlink:href="http://jardin.secret.pagesperso-orange.fr/Informatique/OUTIL_UX.htm#_Toc89775641"><text:span text:style-name="T3">56</text:span></text:a><text:a xlink:type="simple" xlink:href="http://jardin.secret.pagesperso-orange.fr/Informatique/OUTIL_UX.htm#_Toc89775641"><text:span text:style-name="T6">           </text:span></text:a><text:a xlink:type="simple" xlink:href="http://jardin.secret.pagesperso-orange.fr/Informatique/OUTIL_UX.htm#_Toc89775641"><text:span text:style-name="T3">Script de surveillance de la swap (SUN)</text:span></text:a></text:p>
      <text:p text:style-name="Text_20_body"><text:a xlink:type="simple" xlink:href="http://jardin.secret.pagesperso-orange.fr/Informatique/OUTIL_UX.htm#_Toc89775642"><text:span text:style-name="T3">57</text:span></text:a><text:a xlink:type="simple" xlink:href="http://jardin.secret.pagesperso-orange.fr/Informatique/OUTIL_UX.htm#_Toc89775642"><text:span text:style-name="T6">           </text:span></text:a><text:a xlink:type="simple" xlink:href="http://jardin.secret.pagesperso-orange.fr/Informatique/OUTIL_UX.htm#_Toc89775642"><text:span text:style-name="T3">Script de surveillance de la saturation des disques (HP)</text:span></text:a></text:p>
      <text:p text:style-name="Text_20_body"><text:a xlink:type="simple" xlink:href="http://jardin.secret.pagesperso-orange.fr/Informatique/OUTIL_UX.htm#_Toc89775643"><text:span text:style-name="T3">58</text:span></text:a><text:a xlink:type="simple" xlink:href="http://jardin.secret.pagesperso-orange.fr/Informatique/OUTIL_UX.htm#_Toc89775643"><text:span text:style-name="T6">               </text:span></text:a><text:a xlink:type="simple" xlink:href="http://jardin.secret.pagesperso-orange.fr/Informatique/OUTIL_UX.htm#_Toc89775643"><text:span text:style-name="T3">Exemple de script calculant le top 50 Mo des applications, les plus consommatrices (Sun)</text:span></text:a></text:p>
      <text:p text:style-name="Text_20_body"><text:a xlink:type="simple" xlink:href="http://jardin.secret.pagesperso-orange.fr/Informatique/OUTIL_UX.htm#_Toc89775644"><text:span text:style-name="T3">59</text:span></text:a><text:a xlink:type="simple" xlink:href="http://jardin.secret.pagesperso-orange.fr/Informatique/OUTIL_UX.htm#_Toc89775644"><text:span text:style-name="T6">           </text:span></text:a><text:a xlink:type="simple" xlink:href="http://jardin.secret.pagesperso-orange.fr/Informatique/OUTIL_UX.htm#_Toc89775644"><text:span text:style-name="T3">script pour tester la connexion avec les machines listées dans le fichier hosts</text:span></text:a></text:p>
      <text:p text:style-name="Text_20_body"><text:a xlink:type="simple" xlink:href="http://jardin.secret.pagesperso-orange.fr/Informatique/OUTIL_UX.htm#_Toc89775645"><text:span text:style-name="T3">60</text:span></text:a><text:a xlink:type="simple" xlink:href="http://jardin.secret.pagesperso-orange.fr/Informatique/OUTIL_UX.htm#_Toc89775645"><text:span text:style-name="T6">           </text:span></text:a><text:a xlink:type="simple" xlink:href="http://jardin.secret.pagesperso-orange.fr/Informatique/OUTIL_UX.htm#_Toc89775645"><text:span text:style-name="T3">script de test de la commande mailx sur une machine donnee</text:span></text:a></text:p>
      <text:p text:style-name="Text_20_body"><text:a xlink:type="simple" xlink:href="http://jardin.secret.pagesperso-orange.fr/Informatique/OUTIL_UX.htm#_Toc89775646"><text:span text:style-name="T3">61</text:span></text:a><text:a xlink:type="simple" xlink:href="http://jardin.secret.pagesperso-orange.fr/Informatique/OUTIL_UX.htm#_Toc89775646"><text:span text:style-name="T6">           </text:span></text:a><text:a xlink:type="simple" xlink:href="http://jardin.secret.pagesperso-orange.fr/Informatique/OUTIL_UX.htm#_Toc89775646"><text:span text:style-name="T3">script de vérification du lancement du serveur http Netscape (sur Sun)</text:span></text:a></text:p>
      <text:p text:style-name="Text_20_body"><text:a xlink:type="simple" xlink:href="http://jardin.secret.pagesperso-orange.fr/Informatique/OUTIL_UX.htm#_Toc89775647"><text:span text:style-name="T3">62</text:span></text:a><text:a xlink:type="simple" xlink:href="http://jardin.secret.pagesperso-orange.fr/Informatique/OUTIL_UX.htm#_Toc89775647"><text:span text:style-name="T6">           </text:span></text:a><text:a xlink:type="simple" xlink:href="http://jardin.secret.pagesperso-orange.fr/Informatique/OUTIL_UX.htm#_Toc89775647"><text:span text:style-name="T3">script de vérification du lancement des bases Oracle (sur machine SUN)</text:span></text:a></text:p>
      <text:p text:style-name="Text_20_body"><text:a xlink:type="simple" xlink:href="http://jardin.secret.pagesperso-orange.fr/Informatique/OUTIL_UX.htm#_Toc89775648"><text:span text:style-name="T3">63</text:span></text:a><text:a xlink:type="simple" xlink:href="http://jardin.secret.pagesperso-orange.fr/Informatique/OUTIL_UX.htm#_Toc89775648"><text:span text:style-name="T6">           </text:span></text:a><text:a xlink:type="simple" xlink:href="http://jardin.secret.pagesperso-orange.fr/Informatique/OUTIL_UX.htm#_Toc89775648"><text:span text:style-name="T3">script de vérification du lancement des bases Oracle (sur machine HP)</text:span></text:a></text:p>
      <text:p text:style-name="Text_20_body"><text:a xlink:type="simple" xlink:href="http://jardin.secret.pagesperso-orange.fr/Informatique/OUTIL_UX.htm#_Toc89775649"><text:span text:style-name="T3">64</text:span></text:a><text:a xlink:type="simple" xlink:href="http://jardin.secret.pagesperso-orange.fr/Informatique/OUTIL_UX.htm#_Toc89775649"><text:span text:style-name="T6">           </text:span></text:a><text:a xlink:type="simple" xlink:href="http://jardin.secret.pagesperso-orange.fr/Informatique/OUTIL_UX.htm#_Toc89775649"><text:span text:style-name="T3">script de vérification des processus occupant trop de mémoire et cpu (sur HP)</text:span></text:a></text:p>
      <text:p text:style-name="Text_20_body"><text:a xlink:type="simple" xlink:href="http://jardin.secret.pagesperso-orange.fr/Informatique/OUTIL_UX.htm#_Toc89775650"><text:span text:style-name="T3">65</text:span></text:a><text:a xlink:type="simple" xlink:href="http://jardin.secret.pagesperso-orange.fr/Informatique/OUTIL_UX.htm#_Toc89775650"><text:span text:style-name="T6">           </text:span></text:a><text:a xlink:type="simple" xlink:href="http://jardin.secret.pagesperso-orange.fr/Informatique/OUTIL_UX.htm#_Toc89775650"><text:span text:style-name="T3">script de vérification des processus occupant trop de mémoire et cpu (sur SUN)</text:span></text:a></text:p>
      <text:p text:style-name="Text_20_body"><text:a xlink:type="simple" xlink:href="http://jardin.secret.pagesperso-orange.fr/Informatique/OUTIL_UX.htm#_Toc89775651"><text:span text:style-name="T3">66</text:span></text:a><text:a xlink:type="simple" xlink:href="http://jardin.secret.pagesperso-orange.fr/Informatique/OUTIL_UX.htm#_Toc89775651"><text:span text:style-name="T6">           </text:span></text:a><text:a xlink:type="simple" xlink:href="http://jardin.secret.pagesperso-orange.fr/Informatique/OUTIL_UX.htm#_Toc89775651"><text:span text:style-name="T3">script de vérification de la non saturation des partitions (sur HP)</text:span></text:a></text:p>
      <text:p text:style-name="Text_20_body"><text:a xlink:type="simple" xlink:href="http://jardin.secret.pagesperso-orange.fr/Informatique/OUTIL_UX.htm#_Toc89775652"><text:span text:style-name="T3">67</text:span></text:a><text:a xlink:type="simple" xlink:href="http://jardin.secret.pagesperso-orange.fr/Informatique/OUTIL_UX.htm#_Toc89775652"><text:span text:style-name="T6">           </text:span></text:a><text:a xlink:type="simple" xlink:href="http://jardin.secret.pagesperso-orange.fr/Informatique/OUTIL_UX.htm#_Toc89775652"><text:span text:style-name="T3">script de vérification de la non saturation des partitions (sur SUN)</text:span></text:a></text:p>
      <text:p text:style-name="Text_20_body"><text:a xlink:type="simple" xlink:href="http://jardin.secret.pagesperso-orange.fr/Informatique/OUTIL_UX.htm#_Toc89775653"><text:span text:style-name="T3">68</text:span></text:a><text:a xlink:type="simple" xlink:href="http://jardin.secret.pagesperso-orange.fr/Informatique/OUTIL_UX.htm#_Toc89775653"><text:span text:style-name="T6">               </text:span></text:a><text:a xlink:type="simple" xlink:href="http://jardin.secret.pagesperso-orange.fr/Informatique/OUTIL_UX.htm#_Toc89775653"><text:span text:style-name="T3">Exemple de script de vérification du lancement du serveurs Lotus Notes (sur SUN)</text:span></text:a></text:p>
      <text:p text:style-name="Text_20_body"><text:a xlink:type="simple" xlink:href="http://jardin.secret.pagesperso-orange.fr/Informatique/OUTIL_UX.htm#_Toc89775654"><text:span text:style-name="T3">69</text:span></text:a><text:a xlink:type="simple" xlink:href="http://jardin.secret.pagesperso-orange.fr/Informatique/OUTIL_UX.htm#_Toc89775654"><text:span text:style-name="T6">           </text:span></text:a><text:a xlink:type="simple" xlink:href="http://jardin.secret.pagesperso-orange.fr/Informatique/OUTIL_UX.htm#_Toc89775654"><text:span text:style-name="T3">script permettant de lancer à distance l’outil de gestion de configuration « PVCS »</text:span></text:a></text:p>
      <text:p text:style-name="Text_20_body"><text:a xlink:type="simple" xlink:href="http://jardin.secret.pagesperso-orange.fr/Informatique/OUTIL_UX.htm#_Toc89775655"><text:span text:style-name="T3">70</text:span></text:a><text:a xlink:type="simple" xlink:href="http://jardin.secret.pagesperso-orange.fr/Informatique/OUTIL_UX.htm#_Toc89775655"><text:span text:style-name="T6">               </text:span></text:a><text:a xlink:type="simple" xlink:href="http://jardin.secret.pagesperso-orange.fr/Informatique/OUTIL_UX.htm#_Toc89775655"><text:span text:style-name="T3">Exemple de script de calcul du volume des donnees des applications sur une machine HP</text:span></text:a></text:p>
      <text:p text:style-name="Text_20_body"><text:a xlink:type="simple" xlink:href="http://jardin.secret.pagesperso-orange.fr/Informatique/OUTIL_UX.htm#_Toc89775656"><text:span text:style-name="T3">71</text:span></text:a><text:a xlink:type="simple" xlink:href="http://jardin.secret.pagesperso-orange.fr/Informatique/OUTIL_UX.htm#_Toc89775656"><text:span text:style-name="T6">           </text:span></text:a><text:a xlink:type="simple" xlink:href="http://jardin.secret.pagesperso-orange.fr/Informatique/OUTIL_UX.htm#_Toc89775656"><text:span text:style-name="T3">Script de vérification de la taille des fichiers de contrôle Oracle</text:span></text:a></text:p>
      <text:p text:style-name="Text_20_body"><text:a xlink:type="simple" xlink:href="http://jardin.secret.pagesperso-orange.fr/Informatique/OUTIL_UX.htm#_Toc89775657"><text:span text:style-name="T3">72</text:span></text:a><text:a xlink:type="simple" xlink:href="http://jardin.secret.pagesperso-orange.fr/Informatique/OUTIL_UX.htm#_Toc89775657"><text:span text:style-name="T6">           </text:span></text:a><text:a xlink:type="simple" xlink:href="http://jardin.secret.pagesperso-orange.fr/Informatique/OUTIL_UX.htm#_Toc89775657"><text:span text:style-name="T3">Script de vérification de la taille restante des volumes disque sur une machine HP</text:span></text:a></text:p>
      <text:p text:style-name="Text_20_body"><text:a xlink:type="simple" xlink:href="http://jardin.secret.pagesperso-orange.fr/Informatique/OUTIL_UX.htm#_Toc89775658"><text:span text:style-name="T3">73</text:span></text:a><text:a xlink:type="simple" xlink:href="http://jardin.secret.pagesperso-orange.fr/Informatique/OUTIL_UX.htm#_Toc89775658"><text:span text:style-name="T6">           </text:span></text:a><text:a xlink:type="simple" xlink:href="http://jardin.secret.pagesperso-orange.fr/Informatique/OUTIL_UX.htm#_Toc89775658"><text:span text:style-name="T3">Script de vérification de la taille restante des volumes disque sur une machine Sun</text:span></text:a></text:p>
      <text:p text:style-name="Text_20_body"><text:a xlink:type="simple" xlink:href="http://jardin.secret.pagesperso-orange.fr/Informatique/OUTIL_UX.htm#_Toc89775659"><text:span text:style-name="T3">74</text:span></text:a><text:a xlink:type="simple" xlink:href="http://jardin.secret.pagesperso-orange.fr/Informatique/OUTIL_UX.htm#_Toc89775659"><text:span text:style-name="T6">           </text:span></text:a><text:a xlink:type="simple" xlink:href="http://jardin.secret.pagesperso-orange.fr/Informatique/OUTIL_UX.htm#_Toc89775659"><text:span text:style-name="T3">Script de vérification du fonctionnement d’un processus (utilisable par le « cron »)</text:span></text:a></text:p>
      <text:p text:style-name="Text_20_body"> </text:p>
      <table:table table:name="Tableau1" table:style-name="Tableau1">
        <table:table-column table:style-name="Tableau1.A"/>
        <table:table-column table:style-name="Tableau1.B"/>
        <table:table-column table:style-name="Tableau1.C"/>
        <table:table-row>
          <table:table-cell office:value-type="string">
            <text:p text:style-name="P27">n°</text:p>
          </table:table-cell>
          <table:table-cell office:value-type="string">
            <text:p text:style-name="P28">nom script</text:p>
          </table:table-cell>
          <table:table-cell office:value-type="string">
            <text:p text:style-name="P28">Rôle du programme (script shell)</text:p>
          </table:table-cell>
        </table:table-row>
        <table:table-row>
          <table:table-cell office:value-type="string">
            <text:p text:style-name="P29">1.</text:p>
          </table:table-cell>
          <table:table-cell office:value-type="string">
            <text:p text:style-name="P31">cnvdosux</text:p>
          </table:table-cell>
          <table:table-cell office:value-type="string">
            <text:p text:style-name="P30">conversion de fichiers DOS -&gt; UNIX</text:p>
          </table:table-cell>
        </table:table-row>
        <table:table-row>
          <table:table-cell office:value-type="string">
            <text:p text:style-name="P29">2.</text:p>
          </table:table-cell>
          <table:table-cell office:value-type="string">
            <text:p text:style-name="P31">cnvuxdos</text:p>
          </table:table-cell>
          <table:table-cell office:value-type="string">
            <text:p text:style-name="P30">conversion de fichiers UNIX UNIX</text:p>
          </table:table-cell>
        </table:table-row>
        <table:table-row>
          <table:table-cell office:value-type="string">
            <text:p text:style-name="P29">3.</text:p>
          </table:table-cell>
          <table:table-cell office:value-type="string">
            <text:p text:style-name="P31">compc</text:p>
          </table:table-cell>
          <table:table-cell office:value-type="string">
            <text:p text:style-name="P30">compilation d'un source "c"</text:p>
          </table:table-cell>
        </table:table-row>
        <table:table-row>
          <table:table-cell office:value-type="string">
            <text:p text:style-name="P29">4.</text:p>
          </table:table-cell>
          <table:table-cell office:value-type="string">
            <text:p text:style-name="P31">contxsch</text:p>
          </table:table-cell>
          <table:table-cell office:value-type="string">
            <text:p text:style-name="P30">recherche d'une chaine et les lignes qui l'entourent dans un groupe de fichiers (très utile)</text:p>
          </table:table-cell>
        </table:table-row>
        <table:table-row>
          <table:table-cell office:value-type="string">
            <text:p text:style-name="P29">5.</text:p>
          </table:table-cell>
          <table:table-cell office:value-type="string">
            <text:p text:style-name="P31">dir</text:p>
          </table:table-cell>
          <table:table-cell office:value-type="string">
            <text:p text:style-name="P30">liste tous les sous-répertoires d'un répertoire (très utile)</text:p>
          </table:table-cell>
        </table:table-row>
        <table:table-row>
          <table:table-cell office:value-type="string">
            <text:p text:style-name="P29">6.</text:p>
          </table:table-cell>
          <table:table-cell office:value-type="string">
            <text:p text:style-name="P31">dtree</text:p>
          </table:table-cell>
          <table:table-cell office:value-type="string">
            <text:p text:style-name="P30">liste tous les sous-répertoires d'un répertoire sous forme d'une liste arborescente. (affiche l'arborescence des répertoires situés sous un répertoire donné) (très utile)</text:p>
          </table:table-cell>
        </table:table-row>
        <table:table-row>
          <table:table-cell office:value-type="string">
            <text:p text:style-name="P29">7.</text:p>
          </table:table-cell>
          <table:table-cell office:value-type="string">
            <text:p text:style-name="P31">tree</text:p>
          </table:table-cell>
          <table:table-cell office:value-type="string">
            <text:p text:style-name="P30">liste tous les sous-répertoires et les fichiers associées d'un répertoire de façon "identée"</text:p>
          </table:table-cell>
        </table:table-row>
        <table:table-row>
          <table:table-cell office:value-type="string">
            <text:p text:style-name="P29">8.</text:p>
          </table:table-cell>
          <table:table-cell office:value-type="string">
            <text:p text:style-name="P31">env_reg</text:p>
          </table:table-cell>
          <table:table-cell office:value-type="string">
            <text:p text:style-name="P30">envoi par uucp d'un fichier à une liste de site destinataires</text:p>
          </table:table-cell>
        </table:table-row>
        <table:table-row>
          <table:table-cell office:value-type="string">
            <text:p text:style-name="P29">9.</text:p>
          </table:table-cell>
          <table:table-cell office:value-type="string">
            <text:p text:style-name="P31">head</text:p>
          </table:table-cell>
          <table:table-cell office:value-type="string">
            <text:p text:style-name="P30">affiche les premières lignes d'un fichier ASCII (si <text:span text:style-name="T5">head</text:span> n’existe pas sous cet Unix)</text:p>
          </table:table-cell>
        </table:table-row>
        <table:table-row>
          <table:table-cell office:value-type="string">
            <text:p text:style-name="P29">10.</text:p>
          </table:table-cell>
          <table:table-cell office:value-type="string">
            <text:p text:style-name="P31">kill_uucp </text:p>
          </table:table-cell>
          <table:table-cell office:value-type="string">
            <text:p text:style-name="P30">suppression d'envoi(s) "uucp" par un utilisateur</text:p>
          </table:table-cell>
        </table:table-row>
        <table:table-row>
          <table:table-cell office:value-type="string">
            <text:p text:style-name="P29">11.</text:p>
          </table:table-cell>
          <table:table-cell office:value-type="string">
            <text:p text:style-name="P31">ll </text:p>
          </table:table-cell>
          <table:table-cell office:value-type="string">
            <text:p text:style-name="P30">liste de toutes les caractéristiques de tous les fichiers (y compris les fichiers cachés) d'un répertoire (très utile)</text:p>
          </table:table-cell>
        </table:table-row>
        <table:table-row>
          <table:table-cell office:value-type="string">
            <text:p text:style-name="P29">12.</text:p>
          </table:table-cell>
          <table:table-cell office:value-type="string">
            <text:p text:style-name="P31">pattsch</text:p>
          </table:table-cell>
          <table:table-cell office:value-type="string">
            <text:p text:style-name="P30">recherche d'une chaine de caractère dans une arborecence de répertoire (très utile)</text:p>
          </table:table-cell>
        </table:table-row>
        <table:table-row>
          <table:table-cell office:value-type="string">
            <text:p text:style-name="P29">13.</text:p>
          </table:table-cell>
          <table:table-cell office:value-type="string">
            <text:p text:style-name="P31">where </text:p>
          </table:table-cell>
          <table:table-cell office:value-type="string">
            <text:p text:style-name="P30">recherche simple d'un fichier a partir d'un répertoire.</text:p>
            <text:p text:style-name="P30">permet de rechercher un fichier quelconque dans tous les répertoire de la machine (selon autorisations d'accès). Commande très utile, elle permet d'éviter de retaper toute la commande "find ..." dont la syntaxe n'est pas très conviviale.</text:p>
          </table:table-cell>
        </table:table-row>
        <table:table-row>
          <table:table-cell office:value-type="string">
            <text:p text:style-name="P29">14</text:p>
          </table:table-cell>
          <table:table-cell office:value-type="string">
            <text:p text:style-name="P31">init_ksh</text:p>
          </table:table-cell>
          <table:table-cell office:value-type="string">
            <text:p text:style-name="P30">initialisation de l'environnement de ksh</text:p>
          </table:table-cell>
        </table:table-row>
        <table:table-row>
          <table:table-cell office:value-type="string">
            <text:p text:style-name="P29">15.</text:p>
          </table:table-cell>
          <table:table-cell office:value-type="string">
            <text:p text:style-name="P31">pr2</text:p>
          </table:table-cell>
          <table:table-cell office:value-type="string">
            <text:p text:style-name="P30">impression formattée avec date nom fichier imprimé etc ...</text:p>
          </table:table-cell>
        </table:table-row>
        <table:table-row>
          <table:table-cell office:value-type="string">
            <text:p text:style-name="P32">Etc</text:p>
          </table:table-cell>
          <table:table-cell office:value-type="string">
            <text:p text:style-name="P34">Etc </text:p>
          </table:table-cell>
          <table:table-cell office:value-type="string">
            <text:p text:style-name="P33">etc</text:p>
          </table:table-cell>
        </table:table-row>
      </table:table>
      <text:p text:style-name="Text_20_body"> </text:p>
      <text:p text:style-name="P10">Voici le texte des scripts d’administration listés dans le sommaire ci-avant.</text:p>
      <text:p text:style-name="Text_20_body"> </text:p>
      <text:h text:style-name="P22" text:outline-level="1"><text:bookmark text:name="_Toc89775587"/>2<text:span text:style-name="T1">         </text:span>Programme de conversion de fichiers DOS -&gt; UNIX : cnvdosux</text:h>
      <text:p text:style-name="P12"> </text:p>
      <text:p text:style-name="P13"># ----------------------------------------------------------------------------</text:p>
      <text:p text:style-name="P13"># Nom du script : cnvdosux   Auteur : B. LISAN  Date : 10/3/95                </text:p>
      <text:p text:style-name="P13"># But : Convertir                                                             </text:p>
      <text:p text:style-name="P13">#     . un fichier ascii sequentiel au format DOS (fichier dont les           </text:p>
      <text:p text:style-name="P13">#       lignes se terminent par les caracteres \r\n                           </text:p>
      <text:p text:style-name="P13">#       (retour chariot, nouvelle ligne) ou \015\012 ou ^M^J), en             </text:p>
      <text:p text:style-name="P13">#     . un fichier au format UNIX (fichier dont les lignes se terminent par le</text:p>
      <text:p text:style-name="P13">#       caractere \n (nouvelle ligne ou le caratere qui correspond en ascii a </text:p>
      <text:p text:style-name="P13">#       octal \012 ou ^J)                                                     </text:p>
      <text:p text:style-name="P13"># parametre d'entree : $1 = nom du fichier DOS a convertir                    </text:p>
      <text:p text:style-name="P13"># parametre de sortie: $2 = nom du fichier UNIX resultat de la conversion, si </text:p>
      <text:p text:style-name="P13">#                      $2 vide alors $2=$1, on convertit le fichier en entree.</text:p>
      <text:p text:style-name="P14"># ----------------------------------------------------------------------------</text:p>
      <text:p text:style-name="P14">CR=`echo "\015"` # le retour-chariot ou carriage-return = code octal ascii 015</text:p>
      <text:p text:style-name="P14">if [ "($1)" = "()" ] &amp;&amp; [ "($2)" = "()" ]                                     </text:p>
      <text:p text:style-name="P14">then                                                                          </text:p>
      <text:p text:style-name="P12">   <text:span text:style-name="T7">echo "aucun nom de fichier a convertir precise"                            </text:span></text:p>
      <text:p text:style-name="P12">   <text:span text:style-name="T8">exit                                                                       </text:span></text:p>
      <text:p text:style-name="P14">fi                                                                            </text:p>
      <text:p text:style-name="P12">                                                                              </text:p>
      <text:p text:style-name="P14">if test -z "$2"                                                               </text:p>
      <text:p text:style-name="P14">then                                                                          </text:p>
      <text:p text:style-name="P12">   <text:span text:style-name="T8">fic=$1                                                                     </text:span></text:p>
      <text:p text:style-name="P14">else                                                                          </text:p>
      <text:p text:style-name="P12">   <text:span text:style-name="T8">fic=$2                       </text:span></text:p>
      <text:p text:style-name="P14">fi                              </text:p>
      <text:p text:style-name="P12">                                </text:p>
      <text:p text:style-name="P14">sed -e "1,\$s/$CR\$//" $1 &gt; $fic</text:p>
      <text:p text:style-name="P12"> </text:p>
      <text:p text:style-name="P13">#&gt;&gt;&gt;&gt;&gt;&gt;&gt;&gt;&gt;&gt;&gt;&gt;&gt;&gt;&gt;&gt;&gt;&gt;&gt;&gt;&gt;&gt;&gt;&gt;&gt;&gt;&gt;&gt;&gt;&gt;&gt;&gt;&gt;&gt;&gt;&gt;&gt;&gt;&gt;&gt;&gt;&gt;&gt;&gt;&gt;&gt;&gt;&gt;&gt;&gt;&gt;&gt;&gt;&gt;&gt;&gt;&gt;&gt;&gt;&gt;&gt;&gt;&gt;&gt;&gt;&gt;&gt;&gt;&gt;&gt;&gt;&gt;&gt;&gt;&gt;&gt;&gt;&gt;&gt;&gt;</text:p>
      <text:p text:style-name="Text_20_body"> </text:p>
      <text:h text:style-name="P22" text:outline-level="1"><text:bookmark text:name="_Toc89775588"/>3<text:span text:style-name="T1">         </text:span>Programme de conversion de fichiers UNIX -&gt; DOS : cnvuxdos</text:h>
      <text:p text:style-name="P12"> </text:p>
      <text:p text:style-name="P13"># ----------------------------------------------------------------------------</text:p>
      <text:p text:style-name="P13"># Nom du script : cnvuxdos   Auteur : B. LISAN  Date : 10/3/95                </text:p>
      <text:p text:style-name="P13"># But : Convertir                                                             </text:p>
      <text:p text:style-name="P13">#     . un fichier au format UNIX (fichier dont les lignes se terminent par le</text:p>
      <text:p text:style-name="P13">#       caractere \n (nouvelle ligne ou le caratere qui correspond en ascii a </text:p>
      <text:p text:style-name="P13">#       octal \012 ou ^J)                                                     </text:p>
      <text:p text:style-name="P13">#     . en un fichier ascii sequentiel au format DOS (fichier dont les        </text:p>
      <text:p text:style-name="P13">#       lignes se terminent par les caracteres \r\n                           </text:p>
      <text:p text:style-name="P13">#       (retour chariot, nouvelle ligne) ou \015\012 ou ^M^J),                </text:p>
      <text:p text:style-name="P13"># parametre d'entree : $1 = nom du fichier UNIX a convertir                   </text:p>
      <text:p text:style-name="P13"># parametre de sortie: $2 = nom du fichier DOS resultat de la conversion, si  </text:p>
      <text:p text:style-name="P13">#                      $2 vide alors $2=$1, on convertit le fichier en entree.</text:p>
      <text:p text:style-name="P13"># ----------------------------------------------------------------------------</text:p>
      <text:p text:style-name="P12"> </text:p>
      <text:p text:style-name="P13">CR=`echo "\015"` # le retour-chariot ou carriage-return = code octal ascii 015</text:p>
      <text:p text:style-name="P13">TAB=`echo "\t"`                                                               </text:p>
      <text:p text:style-name="P13">if [ "($1)" = "()" ] &amp;&amp; [ "($2)" = "()" ]                                     </text:p>
      <text:p text:style-name="P13">then                                                                          </text:p>
      <text:p text:style-name="P12">   <text:span text:style-name="T7">echo "aucun nom de fichier a convertir indique"                            </text:span></text:p>
      <text:p text:style-name="P12">   <text:span text:style-name="T8">exit                                                                       </text:span></text:p>
      <text:p text:style-name="P14">fi                                                                            </text:p>
      <text:p text:style-name="P12">                                                                              </text:p>
      <text:p text:style-name="P14">if test -z "$2"                                                               </text:p>
      <text:p text:style-name="P14">then                                                                          </text:p>
      <text:p text:style-name="P12">   <text:span text:style-name="T8">fic=$1</text:span></text:p>
      <text:p text:style-name="P14">else                                                </text:p>
      <text:p text:style-name="P12">   <text:span text:style-name="T8">fic=$2                                           </text:span></text:p>
      <text:p text:style-name="P12">   <text:span text:style-name="T8">cp $1 $fic                                       </text:span></text:p>
      <text:p text:style-name="P14">fi                                                  </text:p>
      <text:p text:style-name="P12">                                                    </text:p>
      <text:p text:style-name="P14">cat $1 | sed -e "1,\$s/.*\$/$CR/" &gt; $$              </text:p>
      <text:p text:style-name="P14">paste $1 $$ | sed -e "1,\$s/$TAB$CR\$/$CR/" &gt; $fic  </text:p>
      <text:p text:style-name="P13">rm $$   </text:p>
      <text:p text:style-name="P12"> </text:p>
      <text:p text:style-name="P13">#&gt;&gt;&gt;&gt;&gt;&gt;&gt;&gt;&gt;&gt;&gt;&gt;&gt;&gt;&gt;&gt;&gt;&gt;&gt;&gt;&gt;&gt;&gt;&gt;&gt;&gt;&gt;&gt;&gt;&gt;&gt;&gt;&gt;&gt;&gt;&gt;&gt;&gt;&gt;&gt;&gt;&gt;&gt;&gt;&gt;&gt;&gt;&gt;&gt;&gt;&gt;&gt;&gt;&gt;&gt;&gt;&gt;&gt;&gt;&gt;&gt;&gt;&gt;&gt;&gt;&gt;&gt;&gt;                                            </text:p>
      <text:p text:style-name="P12"> </text:p>
      <text:h text:style-name="P22" text:outline-level="1"><text:bookmark text:name="_Toc89775589"/>4<text:span text:style-name="T1">         </text:span>Programme de compilation d'un source "c" : compc</text:h>
      <text:p text:style-name="P12"> </text:p>
      <text:p text:style-name="P14">#-------------------------------------------------------------------------------</text:p>
      <text:p text:style-name="P14"># procedure shell-UNIX : compc                                                  </text:p>
      <text:p text:style-name="P13"># procedure de compilation simple d'un programme source c                       </text:p>
      <text:p text:style-name="P14">#-------------------------------------------------------------------------------</text:p>
      <text:p text:style-name="P14">#                                                                               </text:p>
      <text:p text:style-name="P14">if [ $# = 1 ]                                                                   </text:p>
      <text:p text:style-name="P12">  <text:span text:style-name="T8">then                                                                          </text:span></text:p>
      <text:p text:style-name="P12">   <text:span text:style-name="T8">cc -g -I/usr/hsource $1.c  -o $1                                             </text:span></text:p>
      <text:p text:style-name="P14">fi                                                                              </text:p>
      <text:p text:style-name="P14">if [ $# = 2 ]                                                                   </text:p>
      <text:p text:style-name="P12">  <text:span text:style-name="T8">then                                                                          </text:span></text:p>
      <text:p text:style-name="P12">   <text:span text:style-name="T8">if [ "$2" = "c" ]                                                            </text:span></text:p>
      <text:p text:style-name="P12">      <text:span text:style-name="T8">then                                                                      </text:span></text:p>
      <text:p text:style-name="P12">        <text:span text:style-name="T8">cc -g -I/usr/hsource $1.c  -o $1 -lcurses                               </text:span></text:p>
      <text:p text:style-name="P12">      <text:span text:style-name="T7">fi                                                                        </text:span></text:p>
      <text:p text:style-name="P13">fi</text:p>
      <text:p text:style-name="P12"> </text:p>
      <text:p text:style-name="P13">#&gt;&gt;&gt;&gt;&gt;&gt;&gt;&gt;&gt;&gt;&gt;&gt;&gt;&gt;&gt;&gt;&gt;&gt;&gt;&gt;&gt;&gt;&gt;&gt;&gt;&gt;&gt;&gt;&gt;&gt;&gt;&gt;&gt;&gt;&gt;&gt;&gt;&gt;&gt;&gt;&gt;&gt;&gt;&gt;&gt;&gt;&gt;&gt;&gt;&gt;&gt;&gt;&gt;&gt;&gt;&gt;&gt;&gt;&gt;&gt;&gt;&gt;&gt;&gt;&gt;&gt;&gt;&gt;&gt;&gt;&gt;&gt;&gt;&gt;&gt;&gt;&gt;&gt;&gt;&gt;</text:p>
      <text:p text:style-name="Text_20_body"> </text:p>
      <text:h text:style-name="P22" text:outline-level="1"><text:bookmark text:name="_Toc89775590"/>5<text:span text:style-name="T1">         </text:span>Programme de recherche d'une chaine et des lignes qui l'entourent dans un groupe de fichiers : contxsch</text:h>
      <text:p text:style-name="P12"> </text:p>
      <text:p text:style-name="P14">#-----------------------------------------------------------------------------</text:p>
      <text:p text:style-name="P14"># @(#) contxsch  : pattern context search in files (belonging of a same       </text:p>
      <text:p text:style-name="P14">#                  directory)                                                 </text:p>
      <text:p text:style-name="P14"># Nom / Name     : contxsch                                                   </text:p>
      <text:p text:style-name="P14"># Type / Type    : job shell (UNIX)                                           </text:p>
      <text:p text:style-name="P13"># But / Aim      : recherche d'une chaine dans tous les fichiers precises en  </text:p>
      <text:p text:style-name="P13">#                  parametre de contxsch en affichant le la ligne contenant la</text:p>
      <text:p text:style-name="P13">#                  chaine ainsi que la ligne situee avant et la ligne situe   </text:p>
      <text:p text:style-name="P13">#                  apres (ces groupes de 3 lignes etant separees par une ligne</text:p>
      <text:p text:style-name="P13">#                  comportant des points).                                    </text:p>
      <text:p text:style-name="P13"># Auteur / Author: Benjamin LISAN  -&gt;    date creation:  01-AUG-90            </text:p>
      <text:p text:style-name="P13"># Usage / Usage  : "contxsch pattern filename [filename]"                     </text:p>
      <text:p text:style-name="P13"># Exemple / Ex.  : "contxsch 3B2 *"                                           </text:p>
      <text:p text:style-name="P13">#-----------------------------------------------------------------------------</text:p>
      <text:p text:style-name="P13">USAGE="Usage= $0 pattern filename [filename]"                                 </text:p>
      <text:p text:style-name="P14">case $# in                                                                    </text:p>
      <text:p text:style-name="P12">    <text:span text:style-name="T8">0|1) echo $USAGE # &gt; &amp;2                                                   </text:span></text:p>
      <text:p text:style-name="P12">         <text:span text:style-name="T7">exit 1 ;;                                                            </text:span></text:p>
      <text:p text:style-name="P13">esac                                                                          </text:p>
      <text:p text:style-name="P12">                                                                              </text:p>
      <text:p text:style-name="P13">pattern=$1 # stocke la chaine avant decalage</text:p>
      <text:p text:style-name="P12">           <text:span text:style-name="T8"># save pattern before shift                                 </text:span></text:p>
      <text:p text:style-name="P13">shift      # suppression argument contenant la chaine                  </text:p>
      <text:p text:style-name="P12">           <text:span text:style-name="T8"># suppression argument containing pattern                   </text:span></text:p>
      <text:p text:style-name="P12">                                                                       </text:p>
      <text:p text:style-name="P14">for i in $*                # boucle a travers tous les noms de fichier </text:p>
      <text:p text:style-name="P14">do                         # loop threw all the files names            </text:p>
      <text:p text:style-name="P12">     <text:span text:style-name="T8">case $# in                                                        </text:span></text:p>
      <text:p text:style-name="P12">              <text:span text:style-name="T8">1) name="";;       # pas de nom de fichier stocke        </text:span></text:p>
      <text:p text:style-name="P12">                                 <text:span text:style-name="T8"># no file name saved                  </text:span></text:p>
      <text:p text:style-name="P12">              <text:span text:style-name="T8">*) name="$i:  ";;  # stockage du nom de fichier          </text:span></text:p>
      <text:p text:style-name="P12">                                 <text:span text:style-name="T8"># save of the file name               </text:span></text:p>
      <text:p text:style-name="P12">     <text:span text:style-name="T9">esac ;\                                                           </text:span></text:p>
      <text:p text:style-name="P12">     <text:span text:style-name="T9">sed -n -e "/$pattern/{                                            </text:span></text:p>
      <text:p text:style-name="P12">                           <text:span text:style-name="T8">x                                           </text:span></text:p>
      <text:p text:style-name="P12">                           <text:span text:style-name="T8">s!\(.*\)!$name\1!p                          </text:span></text:p>
      <text:p text:style-name="P12">                           <text:span text:style-name="T8">x                                           </text:span></text:p>
      <text:p text:style-name="P12">                           <text:span text:style-name="T8">s!\(.*\)!$name\1!p                          </text:span></text:p>
      <text:p text:style-name="P12">                           <text:span text:style-name="T8">n                                           </text:span></text:p>
      <text:p text:style-name="P12">                           <text:span text:style-name="T8">s!\(.*\)!$name\1!p                          </text:span></text:p>
      <text:p text:style-name="P12">                           <text:span text:style-name="T8">n                                           </text:span></text:p>
      <text:p text:style-name="P12">                           <text:span text:style-name="T8">s!\(.*\)!$name\1!p                          </text:span></text:p>
      <text:p text:style-name="P12">                           <text:span text:style-name="T8">n                                           </text:span></text:p>
      <text:p text:style-name="P12">                           <text:span text:style-name="T8">s!\(.*\)!$name\1!p                          </text:span></text:p>
      <text:p text:style-name="P12">                           <text:span text:style-name="T8">a\\                                         </text:span></text:p>
      <text:p text:style-name="P12">                           <text:span text:style-name="T8">...        </text:span></text:p>
      <text:p text:style-name="P12">                          <text:span text:style-name="T8">}" -e h $i  </text:span></text:p>
      <text:p text:style-name="P14">done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591"/>6<text:span text:style-name="T1">         </text:span>Programme liste tous les sous-répertoires d'un répertoire : dir</text:h>
      <text:p text:style-name="P12"> </text:p>
      <text:p text:style-name="P14">ls -p $1 $2 | grep /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592"/>7<text:span text:style-name="T1">         </text:span>Programme liste tous les sous-répertoires d'un répertoire sous forme d'une liste arborescente : dtree</text:h>
      <text:p text:style-name="P12"> </text:p>
      <text:p text:style-name="P2">#------------------------------------------------------------------------------ </text:p>
      <text:p text:style-name="P2"># @(#) dtree        : Visual display of directory tree                          </text:p>
      <text:p text:style-name="P2"># module name / nom :dtree                                                      </text:p>
      <text:p text:style-name="P2"># module type / type: procedure script shell (UNIX)                             </text:p>
      <text:p text:style-name="Text_20_body"># But / Aim         : Affiche a l'ecran l'arborescence des repertoires et des   </text:p>
      <text:p text:style-name="Text_20_body">#                     sous-repertoires sous la forme d'un arbre                 </text:p>
      <text:p text:style-name="P2"># Auteur/Author     :  ?                date creation / creation date: 07-SEP-90</text:p>
      <text:p text:style-name="P2">#                                                                               </text:p>
      <text:p text:style-name="P2"># Usage / Usage     : dtree [repertoire]                                        </text:p>
      <text:p text:style-name="P2">#                     dtree [starting-directory-name]                           </text:p>
      <text:p text:style-name="P2">#------------------------------------------------------------------------------ </text:p>
      <text:p text:style-name="P2">#                                                                               </text:p>
      <text:p text:style-name="P2">USAGE="Usage: $0 [starting-directory-name]"                                     </text:p>
      <text:p text:style-name="P2">case $# in                                                                      </text:p>
      <text:p text:style-name="Text_20_body">   <text:span text:style-name="T14">0) startdir=".";; # Use current directory                                    </text:span></text:p>
      <text:p text:style-name="Text_20_body">   <text:span text:style-name="T14">1) if [ ! -d $1 ]; then                                                      </text:span></text:p>
      <text:p text:style-name="Text_20_body">         <text:span text:style-name="T14">echo "\"$1\" not a directory." </text:span>&gt;&amp;2                                     </text:p>
      <text:p text:style-name="Text_20_body">         echo $USAGE &gt;&amp;2                                                        </text:p>
      <text:p text:style-name="Text_20_body">         exit 1                                                                 </text:p>
      <text:p text:style-name="Text_20_body">      <text:span text:style-name="T14">fi                                                                        </text:span></text:p>
      <text:p text:style-name="Text_20_body">      <text:span text:style-name="T14">startdir=$1 ;;                                                            </text:span></text:p>
      <text:p text:style-name="Text_20_body">   <text:span text:style-name="T14">*) echo $USAGE &gt;&amp;2                                                           </text:span></text:p>
      <text:p text:style-name="Text_20_body">      <text:span text:style-name="T14">exit 2 ;;                                                                 </text:span></text:p>
      <text:p text:style-name="P2">esac                                                                            </text:p>
      <text:p text:style-name="Text_20_body"> <text:span text:style-name="T14">(cd $startdir; pwd)                                                            </text:span></text:p>
      <text:p text:style-name="P2">find $startdir -type d -print 2&gt; /dev/null | sort -f |                          </text:p>
      <text:p text:style-name="P2">sed -e "s,^$startdir,," \</text:p>
      <text:p text:style-name="P3">-e "/^$/d" \</text:p>
      <text:p text:style-name="P3">-e "s,[^/]*/\([^/]*\)$,\`-----\1," \</text:p>
      <text:p text:style-name="Text_20_body">-e "s,[^/]*/,|      ,g"                                                         </text:p>
      <text:p text:style-name="Text_20_body">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593"/>8<text:span text:style-name="T1">         </text:span>Programme liste tous les sous-répertoires et les fichiers associées d'un répertoire de façon "identée" : tree</text:h>
      <text:p text:style-name="P12"> </text:p>
      <text:p text:style-name="P14">for i in `ls `               </text:p>
      <text:p text:style-name="P12">    <text:span text:style-name="T8">do                       </text:span></text:p>
      <text:p text:style-name="P12">        <text:span text:style-name="T8">if test -d $i        </text:span></text:p>
      <text:p text:style-name="P12">           <text:span text:style-name="T8">then              </text:span></text:p>
      <text:p text:style-name="P12">                <text:span text:style-name="T8">echo "-$i"   </text:span></text:p>
      <text:p text:style-name="P12">           <text:span text:style-name="T8">else              </text:span></text:p>
      <text:p text:style-name="P12">                <text:span text:style-name="T8">echo "    $i"</text:span></text:p>
      <text:p text:style-name="P12">        <text:span text:style-name="T7">fi                   </text:span></text:p>
      <text:p text:style-name="P12">    <text:span text:style-name="T7">done                     </text:span></text:p>
      <text:p text:style-name="P12"> </text:p>
      <text:p text:style-name="P12"> </text:p>
      <text:p text:style-name="P13">#&gt;&gt;&gt;&gt;&gt;&gt;&gt;&gt;&gt;&gt;&gt;&gt;&gt;&gt;&gt;&gt;&gt;&gt;&gt;&gt;&gt;&gt;&gt;&gt;&gt;&gt;&gt;&gt;&gt;&gt;&gt;&gt;&gt;&gt;&gt;&gt;&gt;&gt;&gt;&gt;&gt;&gt;&gt;&gt;&gt;&gt;&gt;&gt;&gt;&gt;&gt;&gt;&gt;&gt;&gt;&gt;&gt;&gt;&gt;&gt;&gt;&gt;&gt;&gt;&gt;&gt;&gt;&gt;&gt;&gt;&gt;&gt;</text:p>
      <text:p text:style-name="P12"> </text:p>
      <text:h text:style-name="Heading_20_1" text:outline-level="1"><text:bookmark text:name="_Toc89775594"/>9<text:span text:style-name="T1">         </text:span>Programme d'envoi par uucp d'un fichier à une liste de site destinataires : env_sites </text:h>
      <text:p text:style-name="P12"> </text:p>
      <text:p text:style-name="P13"># ----------------------------------------------------------------------- # </text:p>
      <text:p text:style-name="P13"># Projet        : PROJ..             Sous-Projet  : ADMIN.                # </text:p>
      <text:p text:style-name="P13"># Auteur        : B. LISAN           Date creation: 29/03/95  17:..       # </text:p>
      <text:p text:style-name="P13"># Nom programme : env_sites          Type Langage : Bourne SHELL          # </text:p>
      <text:p text:style-name="P13"># Objet du trait: envoi d'un fichier Version      : ......                # </text:p>
      <text:p text:style-name="P13">#                 a une liste de sites                                    # </text:p>
      <text:p text:style-name="P13"># Commentaire   : Il vaut mieux etre 'root' pour executer cette commande  # </text:p>
      <text:p text:style-name="P13">#                                                                         # </text:p>
      <text:p text:style-name="P13"># Fic.tmp.crees : $$.tmp env$$       type acces   : seq                   # </text:p>
      <text:p text:style-name="P13"># ----------------------------------------------------------------------- # </text:p>
      <text:p text:style-name="P12"><text:span text:style-name="T7"># Modifications : Auteur : .............     </text:span><text:span text:style-name="T8">Date : jj/mm/aa hh:mn        # </text:span></text:p>
      <text:p text:style-name="P14"># Reference dem.:                                                         # </text:p>
      <text:p text:style-name="P14"># But:                                                                    # </text:p>
      <text:p text:style-name="P14"># desc:                                                                   # </text:p>
      <text:p text:style-name="P14"># ----------------------------------------------------------------------- # </text:p>
      <text:p text:style-name="P14">tput rev                                                                    </text:p>
      <text:p text:style-name="P13">echo "*-----------------------------------------------------------------*"  </text:p>
      <text:p text:style-name="P13">echo "| Debut du programme $0                                      |"       </text:p>
      <text:p text:style-name="P13">echo "| envoi d'un fichier a une liste de sites en regions (depots, DR) |"  </text:p>
      <text:p text:style-name="P14">echo "*-----------------------------------------------------------------*"  </text:p>
      <text:p text:style-name="P14">tput sgr0                                                                   </text:p>
      <text:p text:style-name="P14">#tput rmt0                                                                  </text:p>
      <text:p text:style-name="P12">                                           </text:p>
      <text:p text:style-name="P13"># initialisations                          </text:p>
      <text:p text:style-name="P13"># ---------------                          </text:p>
      <text:p text:style-name="P12">                                           </text:p>
      <text:p text:style-name="P13">TAB=`echo "\t"`                            </text:p>
      <text:p text:style-name="P13">site_ori=`uname`                           </text:p>
      <text:p text:style-name="P13">prg=`basename $0`                          </text:p>
      <text:p text:style-name="P13">site_dev="G60DVP"                          </text:p>
      <text:p text:style-name="P13">fic_adr="/usr/lib/uucp/Systems"            </text:p>
      <text:p text:style-name="P13">#fic_adr="/etc/x25hosts"                   </text:p>
      <text:p text:style-name="P12">                                           </text:p>
      <text:p text:style-name="P13"># verification du login 'root'             </text:p>
      <text:p text:style-name="P14"># ----------------------------             </text:p>
      <text:p text:style-name="P12">                                           </text:p>
      <text:p text:style-name="P14">lognam=`id | cut -d'(' -f2 | cut -d')' -f1`</text:p>
      <text:p text:style-name="P14">if [ "$lognam"  != "root" ]                </text:p>
      <text:p text:style-name="P14">then                                       </text:p>
      <text:p text:style-name="P12">   <text:span text:style-name="T8">echo ""                                 </text:span></text:p>
      <text:p text:style-name="P12">   <text:span text:style-name="T8">tput rev                                </text:span></text:p>
      <text:p text:style-name="P12">   <text:span text:style-name="T7">echo "$prg&gt; vous n'est pas 'root': \c"  </text:span></text:p>
      <text:p text:style-name="P12">   <text:span text:style-name="T8">tput smul                               </text:span></text:p>
      <text:p text:style-name="P12">   <text:span text:style-name="T8">echo "$lognam\c"                        </text:span></text:p>
      <text:p text:style-name="P12">   <text:span text:style-name="T8">tput sgr0                               </text:span></text:p>
      <text:p text:style-name="P12">   <text:span text:style-name="T8">tput rev                                </text:span></text:p>
      <text:p text:style-name="P12">   <text:span text:style-name="T7">echo " -&gt; vos envois peuvent ne pas reussir"                               </text:span></text:p>
      <text:p text:style-name="P12">   <text:span text:style-name="T8">tput sgr0                                                                  </text:span></text:p>
      <text:p text:style-name="P12">   <text:span text:style-name="T8">#exit                                                                      </text:span></text:p>
      <text:p text:style-name="P14">fi                                                                            </text:p>
      <text:p text:style-name="P12">                                                                              </text:p>
      <text:p text:style-name="P13"># saisie de la liste des sites destinataires                                  </text:p>
      <text:p text:style-name="P13"># ------------------------------------------                                  </text:p>
      <text:p text:style-name="P12">                                                                              </text:p>
      <text:p text:style-name="P13">echo ""                                                                       </text:p>
      <text:p text:style-name="P13">echo "$prg&gt; 0) le fichier qui contient la liste des sites destinataires est :"</text:p>
      <text:p text:style-name="P13">echo "$prg&gt;    $fic_adr, si celui-ci vous convient taper Entree,"             </text:p>
      <text:p text:style-name="P13">echo "$prg&gt;    sinon taper le nom du fichier les contenant: \c"               </text:p>
      <text:p text:style-name="P14">read repons                                                                   </text:p>
      <text:p text:style-name="P14">if [ ! -z "$repons" ]                                                         </text:p>
      <text:p text:style-name="P14">then                                                                          </text:p>
      <text:p text:style-name="P12">    <text:span text:style-name="T8">fic_adr="$repons"                                                         </text:span></text:p>
      <text:p text:style-name="P13">fi                                                                            </text:p>
      <text:p text:style-name="P12">                                                                              </text:p>
      <text:p text:style-name="P13"># saisie du nom du fichier a envoyer et du repertoire de destination          </text:p>
      <text:p text:style-name="P14"># ------------------------------------------------------------------          </text:p>
      <text:p text:style-name="P12">                                                                              </text:p>
      <text:p text:style-name="P14">fic_env=""                                                                    </text:p>
      <text:p text:style-name="P14">while [ -z "$fic_env"  ]                                                      </text:p>
      <text:p text:style-name="P13">do                                                                            </text:p>
      <text:p text:style-name="P12">   <text:span text:style-name="T7">echo ""                                                                      </text:span></text:p>
      <text:p text:style-name="P12">   <text:span text:style-name="T7">echo "$prg&gt; 1) Donner le nom et le chemin du fichier que vous voulez envoyer,</text:span></text:p>
      <text:p text:style-name="P14">"                                                                               </text:p>
      <text:p text:style-name="P12">   <text:span text:style-name="T8">echo "$prg&gt;    (exemple: /usr/lib/uucp/Permissions) "                        </text:span></text:p>
      <text:p text:style-name="P12">   <text:span text:style-name="T8">echo "$prg&gt; : \c"                                                            </text:span></text:p>
      <text:p text:style-name="P12">   <text:span text:style-name="T8">read fic_env                                                                 </text:span></text:p>
      <text:p text:style-name="P14">done                                                                            </text:p>
      <text:p text:style-name="P12">                                                                                </text:p>
      <text:p text:style-name="P14">if [ ! -f "$fic_env" ]                                                          </text:p>
      <text:p text:style-name="P13">then                                                                            </text:p>
      <text:p text:style-name="P12">   <text:span text:style-name="T7">echo "$prg&gt; Ce fichier n'existe pas -&gt; sortie du programme"                  </text:span></text:p>
      <text:p text:style-name="P12">   <text:span text:style-name="T8">exit                                                                         </text:span></text:p>
      <text:p text:style-name="P14">fi                                                                              </text:p>
      <text:p text:style-name="P12">                                                                                </text:p>
      <text:p text:style-name="P14">rep_dest=""                                                                     </text:p>
      <text:p text:style-name="P14">while [ -z "$rep_dest"  ]                                                       </text:p>
      <text:p text:style-name="P13">do                                                                              </text:p>
      <text:p text:style-name="P12">   <text:span text:style-name="T7">echo ""                                                                      </text:span></text:p>
      <text:p text:style-name="P12">   <text:span text:style-name="T7">echo "$prg&gt; 2) Donner le nom et le chemin du repertoire de destination,"     </text:span></text:p>
      <text:p text:style-name="P12">   <text:span text:style-name="T8">echo "$prg&gt;    (exemple: /usr/lib/uucp/) "                                   </text:span></text:p>
      <text:p text:style-name="P12">   <text:span text:style-name="T8">echo "$prg&gt; : \c"                                                            </text:span></text:p>
      <text:p text:style-name="P12">   <text:span text:style-name="T8">read rep_dest                                                                </text:span></text:p>
      <text:p text:style-name="P14">done                                                                            </text:p>
      <text:p text:style-name="P14">if [ ! -d "$rep_dest" ]                                                         </text:p>
      <text:p text:style-name="P13">then                                                                            </text:p>
      <text:p text:style-name="P12">   <text:span text:style-name="T7">echo "$prg&gt; Ce repertoire de destination n'existe pas -&gt; sortie du programme"</text:span></text:p>
      <text:p text:style-name="P12">   <text:span text:style-name="T7">exit                                                                         </text:span></text:p>
      <text:p text:style-name="P13">fi                                                                              </text:p>
      <text:p text:style-name="P12">                                                                                </text:p>
      <text:p text:style-name="P13"># elimination des lignes de commentaires                                        </text:p>
      <text:p text:style-name="P13"># remplacement des tabulations par des blancs                                   </text:p>
      <text:p text:style-name="P13"># et on ne garde que la 1ere colonne des noms-alias.                            </text:p>
      <text:p text:style-name="P13"># elimination du site emetteur du fichier dans la liste des sites destinataires </text:p>
      <text:p text:style-name="P13"># ainsi que   le site de developpement.                                         </text:p>
      <text:p text:style-name="P12">                                                                                </text:p>
      <text:p text:style-name="P14">cat $fic_adr                   \                                                </text:p>
      <text:p text:style-name="P14">| sed -e "1,\$s/#.*//g"        \                                                </text:p>
      <text:p text:style-name="P12">      <text:span text:style-name="T9">-e "1,\$s/$TAB/ /g"      \                                                </text:span></text:p>
      <text:p text:style-name="P12">      <text:span text:style-name="T8">-e "1,\$s/$site_ori//g"  \                                                </text:span></text:p>
      <text:p text:style-name="P12">      <text:span text:style-name="T8">-e "1,\$s/$site_dev//g"  \                                                </text:span></text:p>
      <text:p text:style-name="P12">      <text:span text:style-name="T8">-e "1,\$s/  / /g"        \                                                </text:span></text:p>
      <text:p text:style-name="P14">| cut -d" " -f1   &gt;            /tmp/$$.tmp                                      </text:p>
      <text:p text:style-name="P12">                                                                                </text:p>
      <text:p text:style-name="P13"># elimination des lignes blanches                                               </text:p>
      <text:p text:style-name="P12">                                                                                </text:p>
      <text:p text:style-name="P14">&gt; /tmp/env$$                                                                    </text:p>
      <text:p text:style-name="P14">for site in `cat /tmp/$$.tmp`                                                   </text:p>
      <text:p text:style-name="P14">do                                                                      </text:p>
      <text:p text:style-name="P12">   <text:span text:style-name="T8">echo "/usr/bin/uucp $fic_env $site!$rep_dest" &gt;&gt; /tmp/env$$          </text:span></text:p>
      <text:p text:style-name="P12">   <text:span text:style-name="T9">echo "/usr/bin/uustat" &gt;&gt; /tmp/env$$                                 </text:span></text:p>
      <text:p text:style-name="P13">done                                                                    </text:p>
      <text:p text:style-name="P12">                                                                        </text:p>
      <text:p text:style-name="P13">echo ""                                                                 </text:p>
      <text:p text:style-name="P13">echo "$prg&gt; 3) Verification du contenu du script d'envoi du fichier "   </text:p>
      <text:p text:style-name="P14">echo "$prg&gt;    $fic_env"                                                </text:p>
      <text:p text:style-name="P13">echo "$prg&gt;    en region, taper une touche -&gt; \c"                       </text:p>
      <text:p text:style-name="P14">read repons                                                             </text:p>
      <text:p text:style-name="P12">                                                                        </text:p>
      <text:p text:style-name="P14">vi        /tmp/env$$                                                    </text:p>
      <text:p text:style-name="P14">chmod 700 /tmp/env$$                                                    </text:p>
      <text:p text:style-name="P12">                                                                        </text:p>
      <text:p text:style-name="P13"># execution des envois                                                  </text:p>
      <text:p text:style-name="P12">                                                                        </text:p>
      <text:p text:style-name="P13">echo ""                                                                 </text:p>
      <text:p text:style-name="P13">echo "$prg&gt; 4) voulez vous envoyer le fichier vers ses destinataires?"  </text:p>
      <text:p text:style-name="P13">echo "$prg&gt;    si oui taper 'OUI', sinon taper une touche : \c"         </text:p>
      <text:p text:style-name="P14">read repons                                                             </text:p>
      <text:p text:style-name="P14">if [ "$repons" = "OUI" ]                                                </text:p>
      <text:p text:style-name="P14">then                                                                    </text:p>
      <text:p text:style-name="P12">   <text:span text:style-name="T8"># su -a uucp -c "sh -x /tmp/env$$"                                   </text:span></text:p>
      <text:p text:style-name="P12">   <text:span text:style-name="T8">sh -x /tmp/env$$                                                     </text:span></text:p>
      <text:p text:style-name="P12">   <text:span text:style-name="T9">/usr/bin/uustat                                            </text:span></text:p>
      <text:p text:style-name="P15">else                                                          </text:p>
      <text:p text:style-name="P12">   <text:span text:style-name="T7">echo "$prg&gt; Pas d'envoi du fichier vers ses destinataires."</text:span></text:p>
      <text:p text:style-name="P13">fi                                                            </text:p>
      <text:p text:style-name="P12">                                                              </text:p>
      <text:p text:style-name="P13">rm /tmp/$$.tmp /tmp/env$$                                     </text:p>
      <text:p text:style-name="P13">echo "$prg&gt; Fin du programme $prg"                            </text:p>
      <text:p text:style-name="P12"> </text:p>
      <text:p text:style-name="P19">#&gt;&gt;&gt;&gt;&gt;&gt;&gt;&gt;&gt;&gt;&gt;&gt;&gt;&gt;&gt;&gt;&gt;&gt;&gt;&gt;&gt;&gt;&gt;&gt;&gt;&gt;&gt;&gt;&gt;&gt;&gt;&gt;&gt;&gt;&gt;&gt;&gt;&gt;&gt;&gt;&gt;&gt;&gt;&gt;&gt;&gt;&gt;&gt;&gt;&gt;&gt;&gt;&gt;&gt;&gt;&gt;&gt;&gt;&gt;&gt;&gt;&gt;&gt;&gt;&gt;&gt;&gt;&gt;&gt;&gt;&gt;&gt;&gt;&gt;&gt;&gt;&gt;&gt;&gt;&gt;</text:p>
      <text:p text:style-name="Text_20_body"> </text:p>
      <text:h text:style-name="P22" text:outline-level="1"><text:bookmark text:name="_Toc89775595"/>10<text:span text:style-name="T1">     </text:span>Programme de visualisations des premières lignes d'un fichier  : head</text:h>
      <text:p text:style-name="P12"> </text:p>
      <text:p text:style-name="P16">Note : normalement toutes les interprêteurs de commandes shells des systèmes UNIX actuels possèdent cette commande <text:span text:style-name="T5">head</text:span>. Mais ce script peut simuler cette commande.</text:p>
      <text:p text:style-name="P12"> </text:p>
      <text:p text:style-name="P14">sed -n 1,$1p  $2  &gt;$3 </text:p>
      <text:p text:style-name="P12"> </text:p>
      <text:p text:style-name="P13">#&gt;&gt;&gt;&gt;&gt;&gt;&gt;&gt;&gt;&gt;&gt;&gt;&gt;&gt;&gt;&gt;&gt;&gt;&gt;&gt;&gt;&gt;&gt;&gt;&gt;&gt;&gt;&gt;&gt;&gt;&gt;&gt;&gt;&gt;&gt;&gt;&gt;&gt;&gt;&gt;&gt;&gt;&gt;&gt;&gt;&gt;&gt;&gt;&gt;&gt;&gt;&gt;&gt;&gt;&gt;&gt;&gt;&gt;&gt;&gt;&gt;&gt;&gt;&gt;&gt;&gt;&gt;&gt;&gt;&gt;&gt;&gt;&gt;&gt;&gt;&gt;&gt;&gt;&gt;&gt;</text:p>
      <text:p text:style-name="Text_20_body"> </text:p>
      <text:h text:style-name="P22" text:outline-level="1"><text:bookmark text:name="_Toc89775596"/>11<text:span text:style-name="T1">     </text:span>Programme de suppression d'envoi(s) "uucp" par un utilisateur  : kill_uucp</text:h>
      <text:p text:style-name="P12"> </text:p>
      <text:p text:style-name="P16">Note : l’envoi par le protocole X25 (sur par exemples des lignes Transfix), par <text:span text:style-name="T5">uucp</text:span>, devient rare.</text:p>
      <text:p text:style-name="P12"> </text:p>
      <text:p text:style-name="P13"># ----------------------------------------------------------------------- #  </text:p>
      <text:p text:style-name="P13"># Projet        : PROJET             Sous-Projet  : ADMIN.                #  </text:p>
      <text:p text:style-name="P13"># Auteur        : B. LISAN           Date creation: 29/03/95  17:..       #  </text:p>
      <text:p text:style-name="P13"># Nom programme : kill_uucp          Type Langage : Bourne SHELL          #  </text:p>
      <text:p text:style-name="P13"># Objet du trait: tuer la liste de demande de transfert pour uucp faite   #  </text:p>
      <text:p text:style-name="P13">#                 par l'utilisateur qui a lance ces uucp et qui utilise   #  </text:p>
      <text:p text:style-name="P14">#                 cet outil 'kill_uucp'                                   #  </text:p>
      <text:p text:style-name="P14">#                                                                         #  </text:p>
      <text:p text:style-name="P14"># Fic.tmp.crees : /tmp/kiluu$$       type acces   : seq                   #  </text:p>
      <text:p text:style-name="P13"># ----------------------------------------------------------------------- #  </text:p>
      <text:p text:style-name="P13"># Modifications : Auteur : .............     Date : jj/mm/aa hh:mn        #  </text:p>
      <text:p text:style-name="P14"># Reference dem.:                                                         #  </text:p>
      <text:p text:style-name="P14"># But:                                                                    #  </text:p>
      <text:p text:style-name="P14"># desc:                                                                   #  </text:p>
      <text:p text:style-name="P14"># ----------------------------------------------------------------------- #  </text:p>
      <text:p text:style-name="P14">tput rev                                                                     </text:p>
      <text:p text:style-name="P13">echo "*--------------------------------*"                                    </text:p>
      <text:p text:style-name="P13">echo "| Debut du programme $0   |"                                           </text:p>
      <text:p text:style-name="P13">echo "| suppression de vos envois uucp |"                                    </text:p>
      <text:p text:style-name="P14">echo "*--------------------------------*"                                    </text:p>
      <text:p text:style-name="P14">tput sgr0                                                                    </text:p>
      <text:p text:style-name="P14">#tput rmt0                                                                   </text:p>
      <text:p text:style-name="P12">                                                                             </text:p>
      <text:p text:style-name="P14"># initialisations                                                            </text:p>
      <text:p text:style-name="P14"># ---------------                                                   </text:p>
      <text:p text:style-name="P12">                                                                    </text:p>
      <text:p text:style-name="P14">prg=`basename $0`                                                   </text:p>
      <text:p text:style-name="P14">uustat | cut -d" " -f1 | sed -e "1,\$s/^/uustat -k/" &gt; /tmp/kiluu$$ </text:p>
      <text:p text:style-name="P13">echo "$prg&gt; Verification script de suppresion des envois"           </text:p>
      <text:p text:style-name="P14">read repons                                                         </text:p>
      <text:p text:style-name="P12">                                                                    </text:p>
      <text:p text:style-name="P14">vi /tmp/kiluu$$                                                     </text:p>
      <text:p text:style-name="P14">sh /tmp/kiluu$$                                                     </text:p>
      <text:p text:style-name="P14">rm /tmp/kiluu$$                                                     </text:p>
      <text:p text:style-name="P13">echo "$prg&gt; fin du programme"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597"/>12<text:span text:style-name="T1">     </text:span>Programme listant toute les caractéristiques de tous les fichiers (y compris les fichiers cachés) d'un répertoire : ll</text:h>
      <text:p text:style-name="P12"> </text:p>
      <text:p text:style-name="P16"># Note : ll : une commande simple et utile :</text:p>
      <text:p text:style-name="P5">ls -al $* | pg</text:p>
      <text:p text:style-name="P5">#&gt;&gt;&gt;&gt;&gt;&gt;&gt;&gt;&gt;&gt;&gt;&gt;&gt;&gt;&gt;&gt;&gt;&gt;&gt;&gt;&gt;&gt;&gt;&gt;&gt;&gt;&gt;&gt;&gt;&gt;&gt;&gt;&gt;&gt;&gt;&gt;&gt;&gt;&gt;&gt;&gt;&gt;&gt;&gt;&gt;&gt;&gt;&gt;&gt;&gt;&gt;&gt;&gt;&gt;&gt;&gt;&gt;&gt;&gt;&gt;&gt;&gt;&gt;&gt;&gt;&gt;&gt;&gt;&gt;&gt;&gt;&gt;&gt;&gt;&gt;&gt;&gt;&gt;&gt;&gt;</text:p>
      <text:p text:style-name="Text_20_body"> </text:p>
      <text:h text:style-name="P22" text:outline-level="1"><text:bookmark text:name="_Toc89775598"/>13<text:span text:style-name="T1">     </text:span>Programme recherchant une chaine de caractère dans une arborecence de répertoire : pattsch</text:h>
      <text:p text:style-name="P12"> </text:p>
      <text:p text:style-name="P13">#-------------------------------------------------------------------------------</text:p>
      <text:p text:style-name="P13"># @(#) pattsch  : pattern search in directories tree                            </text:p>
      <text:p text:style-name="P13"># nom du module : pattsch                                       Version: V1.0.0 </text:p>
      <text:p text:style-name="P13"># type de module: procedure shell-UNIX                                          </text:p>
      <text:p text:style-name="P13"># But           : cherche une chaine donnee dans les fichiers situes sous un    </text:p>
      <text:p text:style-name="P13">#                 repertoire donnee y compris ceux de repertoires situes sous   </text:p>
      <text:p text:style-name="P13">#                 ce premier repertoire                                         </text:p>
      <text:p text:style-name="P13"># Auteur        : Bejamin LISAN                                                 </text:p>
      <text:p text:style-name="P13">#                                                                               </text:p>
      <text:p text:style-name="P13"># Usage         : pattsch chaine    [nom_rep]                                   </text:p>
      <text:p text:style-name="P13">#                                                                               </text:p>
      <text:p text:style-name="P13"># Arg.INPUT:  chaine      -&gt; Desc: chaine a rechercher                          </text:p>
      <text:p text:style-name="P13">#                            Type: chaine de caracteres                         </text:p>
      <text:p text:style-name="P13">#             num_impr    -&gt; Desc: repertoire dans le quel est recherche le     </text:p>
      <text:p text:style-name="P13">#                                  contenant la chaine                          </text:p>
      <text:p text:style-name="P13">#                            type: chaine de caracteres                         </text:p>
      <text:p text:style-name="P13">#                                                                               </text:p>
      <text:p text:style-name="P13"># 2 utilisations possibles :                                                    </text:p>
      <text:p text:style-name="P13"># usage n0 1) : "pattsch chaine"                                                </text:p>
      <text:p text:style-name="P13"># exemple     : "pattsch autorisation" (ici permet de retrouver tous les        </text:p>
      <text:p text:style-name="P13">#                                  fichiers contenant la chaine: "autorisation" </text:p>
      <text:p text:style-name="P13">#                                  a partir du repertoire racine "/")           </text:p>
      <text:p text:style-name="P13"># usage n0 2) : "pattsch chaine nom_de_repertoire"                              </text:p>
      <text:p text:style-name="P13"># exemple     : "pattsch autorisation INP" (ici permet de retrouver tous les</text:p>
      <text:p text:style-name="P13">#                                 fichiers contenant la chaine: "autorisation"  </text:p>
      <text:p text:style-name="P13">#                                 et qui se trouvent sous le repertoire "INP" ) </text:p>
      <text:p text:style-name="P13">#                                                                               </text:p>
      <text:p text:style-name="P13">#-------------------------------------------------------------------------------</text:p>
      <text:p text:style-name="P12">                                                                                </text:p>
      <text:p text:style-name="P13">USAGE="usage= $0 pattern [ directory ] "                                        </text:p>
      <text:p text:style-name="P12">                                                                                </text:p>
      <text:p text:style-name="P14">if test $# -eq 0                                                                </text:p>
      <text:p text:style-name="P14">then                                                                            </text:p>
      <text:p text:style-name="P12">    <text:span text:style-name="T8">echo $USAGE                                                                 </text:span></text:p>
      <text:p text:style-name="P12">    <text:span text:style-name="T8">exit 1                                                                      </text:span></text:p>
      <text:p text:style-name="P14">fi                                                                              </text:p>
      <text:p text:style-name="P12">                                                                                </text:p>
      <text:p text:style-name="P14">if test $# -gt 2                                                                </text:p>
      <text:p text:style-name="P14">then                                                                            </text:p>
      <text:p text:style-name="P12">    <text:span text:style-name="T8">echo $USAGE                                                                 </text:span></text:p>
      <text:p text:style-name="P12">    <text:span text:style-name="T8">exit 1                                                                      </text:span></text:p>
      <text:p text:style-name="P14">fi                                                                              </text:p>
      <text:p text:style-name="P12">                                                                                </text:p>
      <text:p text:style-name="P14">echo "research of your chain '$1' can be long: to stop research type F5 key"    </text:p>
      <text:p text:style-name="P14">if test $# -eq 1                                                                </text:p>
      <text:p text:style-name="P14">then                                                                            </text:p>
      <text:p text:style-name="P12">    <text:span text:style-name="T8">for fil in `find / -print`                                                  </text:span></text:p>
      <text:p text:style-name="P12">    <text:span text:style-name="T8">do                                                                          </text:span></text:p>
      <text:p text:style-name="P12">         <text:span text:style-name="T8">fgrep -ln $1 $fil     </text:span></text:p>
      <text:p text:style-name="P12">    <text:span text:style-name="T8">done                       </text:span></text:p>
      <text:p text:style-name="P14">fi                             </text:p>
      <text:p text:style-name="P12">                               </text:p>
      <text:p text:style-name="P14">if test $# -eq 2               </text:p>
      <text:p text:style-name="P14">then                           </text:p>
      <text:p text:style-name="P12">    <text:span text:style-name="T8">for fil in `find $2 -print`</text:span></text:p>
      <text:p text:style-name="P12">    <text:span text:style-name="T8">do                         </text:span></text:p>
      <text:p text:style-name="P12">         <text:span text:style-name="T8">fgrep -ln $1 $fil     </text:span></text:p>
      <text:p text:style-name="P12">    <text:span text:style-name="T7">done                       </text:span></text:p>
      <text:p text:style-name="P13">fi                             </text:p>
      <text:p text:style-name="P12"> </text:p>
      <text:p text:style-name="P13">#&gt;&gt;&gt;&gt;&gt;&gt;&gt;&gt;&gt;&gt;&gt;&gt;&gt;&gt;&gt;&gt;&gt;&gt;&gt;&gt;&gt;&gt;&gt;&gt;&gt;&gt;&gt;&gt;&gt;&gt;&gt;&gt;&gt;&gt;&gt;&gt;&gt;&gt;&gt;&gt;&gt;&gt;&gt;&gt;&gt;&gt;&gt;&gt;&gt;&gt;&gt;&gt;&gt;&gt;&gt;&gt;&gt;&gt;&gt;&gt;&gt;&gt;&gt;&gt;&gt;&gt;&gt;&gt;&gt;&gt;&gt;&gt;&gt;&gt;&gt;&gt;&gt;&gt;&gt;&gt;</text:p>
      <text:p text:style-name="Text_20_body"> </text:p>
      <text:h text:style-name="P22" text:outline-level="1"><text:bookmark text:name="_Toc89775599"/>14<text:span text:style-name="T1">     </text:span>Programme de recherche simple d'un fichier a partir d'un répertoire : where</text:h>
      <text:p text:style-name="P12"> </text:p>
      <text:p text:style-name="P16">Note : la commande <text:span text:style-name="T5">where</text:span> existe dans certains systèmes UNIX. Sinon, une commande équivalente : <text:span text:style-name="T5">which</text:span></text:p>
      <text:p text:style-name="P12"> </text:p>
      <text:p text:style-name="P14">#-------------------------------------------------------------------------------</text:p>
      <text:p text:style-name="P14"># @(#) where  : file search in directories                                      </text:p>
      <text:p text:style-name="P14"># nom module  : where                                                           </text:p>
      <text:p text:style-name="P14"># type module : procedure shell-UNIX                                            </text:p>
      <text:p text:style-name="P13"># but         : permet de retrouver facilement un fichier ou un repertoire      </text:p>
      <text:p text:style-name="P13">#              (en donnant ou non son chemin d'acces) a partir du repertoire "/"</text:p>
      <text:p text:style-name="P13">#               si le nom du repertoire n'est pas donne                         </text:p>
      <text:p text:style-name="P13">#               sinon a partir du repertoire qui est percise comme ci-dessous   </text:p>
      <text:p text:style-name="P13"># Auteur      : Benjamin LISAN        date creation : 01-FEB-90                 </text:p>
      <text:p text:style-name="P13">#                                                                               </text:p>
      <text:p text:style-name="P13"># 2 utilisations possibles :                                                    </text:p>
      <text:p text:style-name="P13"># usage n0 1) : "where nom_de_fichier"                                          </text:p>
      <text:p text:style-name="P13"># exemple     : "where *.rpt" (ici permet de retrouver tous les fichiers        </text:p>
      <text:p text:style-name="P13">#                              d'extension : ".rpt")                            </text:p>
      <text:p text:style-name="P13"># usage n0 2) : "where chemin_d_acces nom_de_fichier"                           </text:p>
      <text:p text:style-name="P13"># exemple     : "where INP *.frm" (ici permet de retrouver tous les fichiers    </text:p>
      <text:p text:style-name="P13">#                                  d'extension : ".frm" qui se trouvent sous le </text:p>
      <text:p text:style-name="P14">#                                  repertoire "INP" )                           </text:p>
      <text:p text:style-name="P14">#-------------------------------------------------------------------------------</text:p>
      <text:p text:style-name="P14">#                                                                               </text:p>
      <text:p text:style-name="P14">if test $# -lt 2                                                                </text:p>
      <text:p text:style-name="P14">then                                                                            </text:p>
      <text:p text:style-name="P12">    <text:span text:style-name="T8">echo "research of your file '$1' can be long: to stop research type F5 key" </text:span></text:p>
      <text:p text:style-name="P12">    <text:span text:style-name="T8">find / -name $1 -print 2&gt; /dev/null                                         </text:span></text:p>
      <text:p text:style-name="P14">else                                                                          </text:p>
      <text:p text:style-name="P12">   <text:span text:style-name="T8">echo "research of your file '$2' can be long: to stop research type F5 key"</text:span></text:p>
      <text:p text:style-name="P12">   <text:span text:style-name="T8">find $1 -name $2 -print 2&gt; /dev/null                                       </text:span></text:p>
      <text:p text:style-name="P13">fi </text:p>
      <text:p text:style-name="Text_20_body"> </text:p>
      <text:p text:style-name="P13">#&gt;&gt;&gt;&gt;&gt;&gt;&gt;&gt;&gt;&gt;&gt;&gt;&gt;&gt;&gt;&gt;&gt;&gt;&gt;&gt;&gt;&gt;&gt;&gt;&gt;&gt;&gt;&gt;&gt;&gt;&gt;&gt;&gt;&gt;&gt;&gt;&gt;&gt;&gt;&gt;&gt;&gt;&gt;&gt;&gt;&gt;&gt;&gt;&gt;&gt;&gt;&gt;&gt;&gt;&gt;&gt;&gt;&gt;&gt;&gt;&gt;&gt;&gt;&gt;&gt;&gt;&gt;&gt;&gt;&gt;&gt;&gt;&gt;&gt;&gt;&gt;&gt;&gt;&gt;&gt;</text:p>
      <text:p text:style-name="Text_20_body"> </text:p>
      <text:h text:style-name="P22" text:outline-level="1"><text:bookmark text:name="_Toc89775600"/>15<text:span text:style-name="T1">     </text:span>Programme initialisation de l'environnement de ksh : init_ksh</text:h>
      <text:p text:style-name="P17"> </text:p>
      <text:p text:style-name="P12"><text:span text:style-name="T10">Note:</text:span> <text:span text:style-name="T7">prévu au cas ou dans le fichier </text:span><text:span text:style-name="T11">.profile ,</text:span><text:span text:style-name="T7"> lancé au logging de l'utilisateur, n'existerait pas les variables de "setting" de l'environnement de "ksh" (</text:span><text:span text:style-name="T12">VISUAL</text:span><text:span text:style-name="T7">, surtout les variables : </text:span><text:span text:style-name="T11">HISTFILE</text:span><text:span text:style-name="T7">, </text:span><text:span text:style-name="T11">HISTSIZE</text:span><text:span text:style-name="T7">).</text:span></text:p>
      <text:p text:style-name="P12"> </text:p>
      <text:p text:style-name="P13"># ------------------------------------------------------------ </text:p>
      <text:p text:style-name="P13"># ksh_init</text:p>
      <text:p text:style-name="P13"># a lancer sous le Korn-shell par la commande ". ksh_init"     </text:p>
      <text:p text:style-name="P13"># (le point est obligatoire)                                   </text:p>
      <text:p text:style-name="P14"># ------------------------------------------------------------ </text:p>
      <text:p text:style-name="P14">set -o vi                                                      </text:p>
      <text:p text:style-name="P14">UNAME=`uname`; export UNAME                                    </text:p>
      <text:p text:style-name="P14">PS1='$LOGNAME:$UNAME!$PWD &gt;'</text:p>
      <text:p text:style-name="P12"> </text:p>
      <text:p text:style-name="P4"># Si on n’a pas ksh au login dans son environnement, on peut le lancer par la </text:p>
      <text:p text:style-name="P21"># commande « <text:span text:style-name="T5">ksh –o vi</text:span> ». ksh n’est pas utilisé pour la <text:span text:style-name="T5">crontab</text:span> étant « <text:span text:style-name="T5">root</text:span> ».</text:p>
      <text:p text:style-name="P11">#&gt;&gt;&gt;&gt;&gt;&gt;&gt;&gt;&gt;&gt;&gt;&gt;&gt;&gt;&gt;&gt;&gt;&gt;&gt;&gt;&gt;&gt;&gt;&gt;&gt;&gt;&gt;&gt;&gt;&gt;&gt;&gt;&gt;&gt;&gt;&gt;&gt;&gt;&gt;&gt;&gt;&gt;&gt;&gt;&gt;&gt;&gt;&gt;&gt;&gt;&gt;&gt;&gt;&gt;&gt;&gt;&gt;&gt;&gt;&gt;&gt;&gt;&gt;&gt;&gt;&gt;&gt;&gt;&gt;&gt;&gt;&gt;&gt;&gt;&gt;&gt;&gt;&gt;&gt;&gt;</text:p>
      <text:p text:style-name="P12"> </text:p>
      <text:h text:style-name="P22" text:outline-level="1"><text:bookmark text:name="_Toc89775601"/>16<text:span text:style-name="T1">     </text:span>Script d'impression : pr2 </text:h>
      <text:p text:style-name="P12"> </text:p>
      <text:p text:style-name="P12"><text:span text:style-name="T10">Note</text:span><text:span text:style-name="T7">: ne marche pas sur tous les sites UNIX.</text:span></text:p>
      <text:p text:style-name="P12"> </text:p>
      <text:p text:style-name="P13">#-------------------------------------------------------------------------------</text:p>
      <text:p text:style-name="P13"># nom du module : pr2                                           Version: V1.0.0 </text:p>
      <text:p text:style-name="P13"># type de module: procedure shell-UNIX                                          </text:p>
      <text:p text:style-name="P13"># But: imprime un fichier sur l'imprimante standard (ici qms0)                  </text:p>
      <text:p text:style-name="P13">#      avec impression en en-tete de chaque page du num du fichier imprime      </text:p>
      <text:p text:style-name="P13">#      suivi de la date d'impression et avec une marge de 7 caracteres          </text:p>
      <text:p text:style-name="P13"># Syntaxe: pr2 nom_fichier [num_impr]                                           </text:p>
      <text:p text:style-name="P13"># Arg.INPUT:  nom_fichier -&gt; Desc: nom du fichier a imprimer                    </text:p>
      <text:p text:style-name="P13">#                            Type: chaine de caracteres                         </text:p>
      <text:p text:style-name="P13">#             num_impr    -&gt; Desc: numero d'imprimante                          </text:p>
      <text:p text:style-name="P13">#                            Exemple: hp0                                       </text:p>
      <text:p text:style-name="P13">#                            type: int                                          </text:p>
      <text:p text:style-name="P14">#-------------------------------------------------------------------------------</text:p>
      <text:p text:style-name="P14">if [ $# = 2 ]                                                                   </text:p>
      <text:p text:style-name="P14">then                                                                            </text:p>
      <text:p text:style-name="P12">      <text:span text:style-name="T8">if [ "$2" = "hp0" ]                                                       </text:span></text:p>
      <text:p text:style-name="P12">               <text:span text:style-name="T7">then         # cas de la hp0 (Imprimante Hewlett-Packard)         </text:span></text:p>
      <text:p text:style-name="P12">                 <text:span text:style-name="T13">pr -o7 -f $1 | lp -op:l -d$2                                   </text:span></text:p>
      <text:p text:style-name="P12">               <text:span text:style-name="T8">else                                                             </text:span></text:p>
      <text:p text:style-name="P12">                 <text:span text:style-name="T8">pr -o7 -f $1 | lp -d$2                                         </text:span></text:p>
      <text:p text:style-name="P12">               <text:span text:style-name="T8">fi                                                               </text:span></text:p>
      <text:p text:style-name="P14">else                                                                            </text:p>
      <text:p text:style-name="P12">  <text:span text:style-name="T7">pr -o7 -f $1 | lp                                                             </text:span></text:p>
      <text:p text:style-name="P13">fi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02"/>17<text:span text:style-name="T1">     </text:span>Exemple de script d’arrêt de toutes les bases Oracle</text:h>
      <text:p text:style-name="P12"> </text:p>
      <text:p text:style-name="Text_20_body">#!/sbin/sh</text:p>
      <text:p text:style-name="Text_20_body">#-----------------------------------------------------------------------------</text:p>
      <text:p text:style-name="Text_20_body"># @(#) arret_toutes_bases</text:p>
      <text:p text:style-name="Text_20_body"># Nom / Name     : arret_toutes_bases oracle</text:p>
      <text:p text:style-name="P2"># Type / Type    : job shell (UNIX)                                           </text:p>
      <text:p text:style-name="Text_20_body"># But / Aim      : arret  de toutes les bases</text:p>
      <text:p text:style-name="Text_20_body"># Auteur / Author: Benjamin LISAN  -&gt;    date creation:  01-AUG-90            </text:p>
      <text:p text:style-name="Text_20_body">#                                                                             </text:p>
      <text:p text:style-name="Text_20_body"># Usage / Usage  : arret_toutes_bases</text:p>
      <text:p text:style-name="Text_20_body"># Contexte / Co. : etre logue 'oracle'</text:p>
      <text:p text:style-name="Text_20_body"># Commentaires   : version pour oracle 7.3.4</text:p>
      <text:p text:style-name="P2">#-----------------------------------------------------------------------------</text:p>
      <text:p text:style-name="P2">cd /logiciel/oracle</text:p>
      <text:p text:style-name="P2">for dirora in `ls -d oracle_[a-zA-Z]*|grep -v oracle_util`</text:p>
      <text:p text:style-name="P2">do</text:p>
      <text:p text:style-name="Text_20_body">   <text:span text:style-name="T14">sid=`echo $dirora | sed "s:oracle_::"`</text:span></text:p>
      <text:p text:style-name="Text_20_body">   # arret de la base $sid</text:p>
      <text:p text:style-name="Text_20_body">   <text:span text:style-name="T14">test -d $dirora &amp;&amp; test -f /logiciel/oracle/$dirora/LOCK \</text:span></text:p>
      <text:p text:style-name="Text_20_body">       <text:span text:style-name="T14">&amp;&amp; stop_bd $sid</text:span></text:p>
      <text:p text:style-name="Text_20_body">   test $? -eq 0 &amp;&amp; touch /logiciel/oracle/$dirora/indiclock # positionne indic :base ayant ete lancee</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03"/>18<text:span text:style-name="T1">     </text:span>Exemple de script pour se connecter successivement à une liste de machines : cnx_ux</text:h>
      <text:p text:style-name="P12"> </text:p>
      <text:p text:style-name="Text_20_body"># cnx_ux : script pour se connecter a toutes les machines UX suivantes :</text:p>
      <text:p text:style-name="Text_20_body">liste="</text:p>
      <text:p text:style-name="Text_20_body">bali  </text:p>
      <text:p text:style-name="Text_20_body">barbade</text:p>
      <text:p text:style-name="Text_20_body">cervin      </text:p>
      <text:p text:style-name="Text_20_body">sumatra</text:p>
      <text:p text:style-name="Text_20_body">hawaii</text:p>
      <text:p text:style-name="Text_20_body">olga</text:p>
      <text:p text:style-name="Text_20_body">olga2</text:p>
      <text:p text:style-name="P2">olga160     </text:p>
      <text:p text:style-name="P2">pgi_mlb</text:p>
      <text:p text:style-name="P2">mayotte</text:p>
      <text:p text:style-name="P2">strmlbibm</text:p>
      <text:p text:style-name="P2">tahiti</text:p>
      <text:p text:style-name="P2">an2m</text:p>
      <text:p text:style-name="P2">"</text:p>
      <text:p text:style-name="Text_20_body"> </text:p>
      <text:p text:style-name="P2">for mach in $liste</text:p>
      <text:p text:style-name="P2">do</text:p>
      <text:p text:style-name="Text_20_body">  echo "Voulez-vous vous connexer vers la machine $mach (O/N) ? : \c"</text:p>
      <text:p text:style-name="Text_20_body">  <text:span text:style-name="T14">read repons</text:span></text:p>
      <text:p text:style-name="Text_20_body">  <text:span text:style-name="T14">case $repons in</text:span></text:p>
      <text:p text:style-name="Text_20_body">     <text:span text:style-name="T17">[Oo][Uu][Ii]|[Oo]) rlogin $mach ;;</text:span></text:p>
      <text:p text:style-name="Text_20_body">      *) : ;;</text:p>
      <text:p text:style-name="Text_20_body">  esac</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04"/>19<text:span text:style-name="T1">     </text:span>Script copiant la « crontab » sur une succession de machines </text:h>
      <text:p text:style-name="P6">(dont la liste est précisées dans un fichier)</text:p>
      <text:p text:style-name="P12"> </text:p>
      <text:p text:style-name="Text_20_body"># nom du script : cop_cron</text:p>
      <text:p text:style-name="Text_20_body">for mach in `cat <text:span text:style-name="T16">ls_mach</text:span>` # ls_mach : ce fichier contient la liste des machines</text:p>
      <text:p text:style-name="P2">do</text:p>
      <text:p text:style-name="P2">echo "$mach"</text:p>
      <text:p text:style-name="P2">rcp -p $mach:/usr/spool/cron/crontabs/root /usr/local/divers/ls_cron/$mach</text:p>
      <text:p text:style-name="Text_20_body">done</text:p>
      <text:p text:style-name="P12"> </text:p>
      <text:p text:style-name="P4">#&gt;&gt;&gt;&gt;&gt;&gt;&gt;&gt;&gt;&gt;&gt;&gt;&gt;&gt;&gt;&gt;&gt;&gt;&gt;&gt;&gt;&gt;&gt;&gt;&gt;&gt;&gt;&gt;&gt;&gt;&gt;&gt;&gt;&gt;&gt;&gt;&gt;&gt;&gt;&gt;&gt;&gt;&gt;&gt;&gt;&gt;&gt;&gt;&gt;&gt;&gt;&gt;&gt;&gt;&gt;&gt;&gt;&gt;&gt;&gt;&gt;&gt;&gt;&gt;&gt;&gt;&gt;&gt;&gt;&gt;&gt;&gt;&gt;&gt;&gt;&gt;&gt;&gt;&gt;&gt;</text:p>
      <text:p text:style-name="Text_20_body"> </text:p>
      <text:h text:style-name="P22" text:outline-level="1"><text:bookmark text:name="_Toc89775605"/>20<text:span text:style-name="T1">     </text:span>Script copiant un script d’exploitation sur une succession de machines </text:h>
      <text:p text:style-name="P12"> </text:p>
      <text:p text:style-name="Text_20_body"># nom du script : cop_script_exploit</text:p>
      <text:p text:style-name="P2">nom_fic="$1"</text:p>
      <text:p text:style-name="P2">if [ $# -eq 0 ]</text:p>
      <text:p text:style-name="P2">then</text:p>
      <text:p text:style-name="Text_20_body">   <text:span text:style-name="T14">while [ -z "$nom_fic" ]</text:span></text:p>
      <text:p text:style-name="Text_20_body">   do</text:p>
      <text:p text:style-name="Text_20_body">      echo "donner le nom du fichier a envoyer : \c"</text:p>
      <text:p text:style-name="Text_20_body">      <text:span text:style-name="T14">read nom_fic</text:span></text:p>
      <text:p text:style-name="Text_20_body">   <text:span text:style-name="T14">done</text:span></text:p>
      <text:p text:style-name="P2">fi</text:p>
      <text:p text:style-name="P2">for machine in `cat &lt;&lt; %%</text:p>
      <text:p text:style-name="P2">hawaii</text:p>
      <text:p text:style-name="P2">cervin</text:p>
      <text:p text:style-name="P2">barbade</text:p>
      <text:p text:style-name="P2">pgimlb</text:p>
      <text:p text:style-name="P2">olga</text:p>
      <text:p text:style-name="P2">olga2</text:p>
      <text:p text:style-name="P2">olga160</text:p>
      <text:p text:style-name="P2">sumatra</text:p>
      <text:p text:style-name="P2">mayotte</text:p>
      <text:p text:style-name="P3">an2m</text:p>
      <text:p text:style-name="P3">bali</text:p>
      <text:p text:style-name="P3">tahiti</text:p>
      <text:p text:style-name="P3">%%` </text:p>
      <text:p text:style-name="Text_20_body">do</text:p>
      <text:p text:style-name="Text_20_body">    echo "copie du fichier '$nom_fic' vers la machine: $machine"</text:p>
      <text:p text:style-name="Text_20_body">    rcp -p /usr/local/bin/$nom_fic $machine:/usr/local/bin/</text:p>
      <text:p text:style-name="Text_20_body">done</text:p>
      <text:p text:style-name="Text_20_body">#barbade</text:p>
      <text:p text:style-name="P12"> </text:p>
      <text:p text:style-name="P13">#&gt;&gt;&gt;&gt;&gt;&gt;&gt;&gt;&gt;&gt;&gt;&gt;&gt;&gt;&gt;&gt;&gt;&gt;&gt;&gt;&gt;&gt;&gt;&gt;&gt;&gt;&gt;&gt;&gt;&gt;&gt;&gt;&gt;&gt;&gt;&gt;&gt;&gt;&gt;&gt;&gt;&gt;&gt;&gt;&gt;&gt;&gt;&gt;&gt;&gt;&gt;&gt;&gt;&gt;&gt;&gt;&gt;&gt;&gt;&gt;&gt;&gt;&gt;&gt;&gt;&gt;&gt;&gt;&gt;&gt;&gt;&gt;&gt;&gt;&gt;&gt;&gt;&gt;&gt;&gt;</text:p>
      <text:p text:style-name="P13"># variante du script ci-avant</text:p>
      <text:p text:style-name="P2"># cop_script_expl</text:p>
      <text:p text:style-name="Text_20_body"> </text:p>
      <text:p text:style-name="P2">if [ "$#" -eq 0 ]</text:p>
      <text:p text:style-name="Text_20_body">then</text:p>
      <text:p text:style-name="Text_20_body">  echo "ce script copie le fichier, dont le nom est passe en"</text:p>
      <text:p text:style-name="Text_20_body">  echo "argument sur toutes les machines du centre"</text:p>
      <text:p text:style-name="Text_20_body">  echo "exemple: cop_script_hp script_exemple"</text:p>
      <text:p text:style-name="Text_20_body">  exit 1</text:p>
      <text:p text:style-name="Text_20_body">fi</text:p>
      <text:p text:style-name="Text_20_body">echo "copie du script $1 vers les machines du centre informatique"</text:p>
      <text:p text:style-name="P2">for machine in `cat &lt;&lt; %%</text:p>
      <text:p text:style-name="P2">barbade</text:p>
      <text:p text:style-name="P2">cervin</text:p>
      <text:p text:style-name="P2">olga</text:p>
      <text:p text:style-name="P2">olga2</text:p>
      <text:p text:style-name="P2">olga160</text:p>
      <text:p text:style-name="P2">sumatra</text:p>
      <text:p text:style-name="P2">mayotte</text:p>
      <text:p text:style-name="P2">seychell</text:p>
      <text:p text:style-name="Text_20_body">dpli1</text:p>
      <text:p text:style-name="Text_20_body">%%` </text:p>
      <text:p text:style-name="Text_20_body">do</text:p>
      <text:p text:style-name="Text_20_body">    echo "copie du fichier '$1' vers la machine: $machine"</text:p>
      <text:p text:style-name="Text_20_body">    <text:span text:style-name="T15">rcp /usr/local/bin/$1 $machine:/usr/local/bin/</text:span></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3"># variante du script ci-avant</text:p>
      <text:p text:style-name="Text_20_body"># cop_script_selon_os</text:p>
      <text:p text:style-name="Text_20_body">if [ "$#" -eq 0 ]</text:p>
      <text:p text:style-name="Text_20_body">then</text:p>
      <text:p text:style-name="Text_20_body">  echo "ce script copie le fichier, dont le nom est passe en"</text:p>
      <text:p text:style-name="Text_20_body">  echo "argument sur toutes les machines HP et SUN du centre"</text:p>
      <text:p text:style-name="Text_20_body">  echo "exemple: cop_script_selon_os vol_tot_vg"</text:p>
      <text:p text:style-name="Text_20_body">  exit 1</text:p>
      <text:p text:style-name="Text_20_body">fi</text:p>
      <text:p text:style-name="Text_20_body">echo "1) copie des scripts pour OS HP"</text:p>
      <text:p text:style-name="P2">for machine in `cat &lt;&lt; %%</text:p>
      <text:p text:style-name="P2">hawaii</text:p>
      <text:p text:style-name="P2">cervin</text:p>
      <text:p text:style-name="P2">pgimlb</text:p>
      <text:p text:style-name="P2">olgaopti</text:p>
      <text:p text:style-name="P2">olga</text:p>
      <text:p text:style-name="P2">olga2</text:p>
      <text:p text:style-name="P2">olga160</text:p>
      <text:p text:style-name="P2">sumatra</text:p>
      <text:p text:style-name="Text_20_body">mayotte</text:p>
      <text:p text:style-name="Text_20_body">%%` </text:p>
      <text:p text:style-name="Text_20_body">do</text:p>
      <text:p text:style-name="Text_20_body">    echo "copie du fichier '$1' vers la machine: $machine"</text:p>
      <text:p text:style-name="Text_20_body">    rcp /usr/local/bin/$1.hp $machine:/usr/local/bin/</text:p>
      <text:p text:style-name="Text_20_body">done</text:p>
      <text:p text:style-name="Text_20_body">echo "2) copie des scripts pour OS SUN"</text:p>
      <text:p text:style-name="Text_20_body">for machine in `cat &lt;&lt; %%</text:p>
      <text:p text:style-name="P3">bali</text:p>
      <text:p text:style-name="P3">tahiti</text:p>
      <text:p text:style-name="P3">an2m</text:p>
      <text:p text:style-name="P3">%%` </text:p>
      <text:p text:style-name="Text_20_body">do</text:p>
      <text:p text:style-name="Text_20_body">    echo "copie du fichier '$1' vers la machine: $machine"</text:p>
      <text:p text:style-name="Text_20_body">    rcp /usr/local/bin/$1.sun $machine:/usr/local/bin/</text:p>
      <text:p text:style-name="Text_20_body">done</text:p>
      <text:p text:style-name="Text_20_body">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06"/>21<text:span text:style-name="T1">     </text:span>Script calculant l’espace libre sur machine HP : esp_alloue_libre_hp</text:h>
      <text:p text:style-name="P12"> </text:p>
      <text:p text:style-name="Text_20_body">#!/sbin/sh</text:p>
      <text:p text:style-name="Text_20_body">#-----------------------------------------------------------</text:p>
      <text:p text:style-name="Text_20_body"># @(#) esp_alloue_libre_hp</text:p>
      <text:p text:style-name="Text_20_body"># Nom / Name     : esp_alloue_libre pour HP</text:p>
      <text:p text:style-name="P2"># Type / Type    : job shell (UNIX)           </text:p>
      <text:p text:style-name="Text_20_body"># But / Aim      : calcule espace libre alloue</text:p>
      <text:p text:style-name="Text_20_body"># Auteur / Author: Benjamin LISAN  date creation: 10/01/2000</text:p>
      <text:p text:style-name="Text_20_body"># Usage / Usage  : esp_alloue_libre_hp</text:p>
      <text:p text:style-name="Text_20_body"># Exemple / Ex.  : esp_alloue_libre_hp</text:p>
      <text:p text:style-name="Text_20_body"># Contexte utili.: cron</text:p>
      <text:p text:style-name="Text_20_body"># Comment.       : version pour HPUX 10.20 et &gt;</text:p>
      <text:p text:style-name="Text_20_body">#-----------------------------------------------------------</text:p>
      <text:p text:style-name="Text_20_body">#rm -f  /tmp/esp_alloue_libre[0-9]* 2&gt; /dev/null</text:p>
      <text:p text:style-name="Text_20_body">echo "--------------------------------------"</text:p>
      <text:p text:style-name="Text_20_body">echo "Epace alloue libre machine HP `uname -n` le `date '+%d/%m/%Y'` \n"</text:p>
      <text:p text:style-name="Text_20_body">echo "partition\tlibre (Mo)\tDisque/applica."</text:p>
      <text:p text:style-name="P3">echo "---------\t----------\t---------------"</text:p>
      <text:p text:style-name="Text_20_body"># raison du grep -v workdir : suppression liens NFS sur SUMATRA</text:p>
      <text:p text:style-name="P2">df -b|sed "s:/dev::"|grep -v workdir|\</text:p>
      <text:p text:style-name="P2">awk -v mac=`uname -n` 'BEGIN {sum=0}</text:p>
      <text:p text:style-name="P2">{if($5/1024 &gt; 1000)</text:p>
      <text:p text:style-name="Text_20_body">        <text:span text:style-name="T14">{</text:span></text:p>
      <text:p text:style-name="Text_20_body">           <text:span text:style-name="T14">{sum+=$5/1024}</text:span></text:p>
      <text:p text:style-name="Text_20_body">           <text:span text:style-name="T14">{printf("%s\t%s\t\t%s)\n",$1,$5/1024,$2)}</text:span></text:p>
      <text:p text:style-name="Text_20_body">        }</text:p>
      <text:p text:style-name="Text_20_body">} </text:p>
      <text:p text:style-name="Text_20_body">END {printf("\nPlace totale allouee libre (Mo) sur %s : %s\n",mac, sum)}'</text:p>
      <text:p text:style-name="P12"> </text:p>
      <text:p text:style-name="P19">#&gt;&gt;&gt;&gt;&gt;&gt;&gt;&gt;&gt;&gt;&gt;&gt;&gt;&gt;&gt;&gt;&gt;&gt;&gt;&gt;&gt;&gt;&gt;&gt;&gt;&gt;&gt;&gt;&gt;&gt;&gt;&gt;&gt;&gt;&gt;&gt;&gt;&gt;&gt;&gt;&gt;&gt;&gt;&gt;&gt;&gt;&gt;&gt;&gt;&gt;&gt;&gt;&gt;&gt;&gt;&gt;&gt;&gt;&gt;&gt;&gt;&gt;&gt;&gt;&gt;&gt;&gt;&gt;&gt;&gt;&gt;&gt;&gt;&gt;&gt;&gt;&gt;&gt;&gt;&gt;</text:p>
      <text:h text:style-name="P22" text:outline-level="1"><text:bookmark text:name="_Toc89775607"/>22<text:span text:style-name="T1">     </text:span>Script calculant l’espace libre sur machine SUN : esp_alloue_libre_sun</text:h>
      <text:p text:style-name="P12"> </text:p>
      <text:p text:style-name="P12"> </text:p>
      <text:p text:style-name="Text_20_body">#!/sbin/sh</text:p>
      <text:p text:style-name="Text_20_body">#-----------------------------------------------------------</text:p>
      <text:p text:style-name="Text_20_body"># @(#) esp_alloue_libre_sun</text:p>
      <text:p text:style-name="Text_20_body"># Nom / Name     : esp_alloue_libre pour SUN</text:p>
      <text:p text:style-name="P2"># Type / Type    : job shell (UNIX)           </text:p>
      <text:p text:style-name="Text_20_body"># But / Aim      : calcule espace libre alloue</text:p>
      <text:p text:style-name="Text_20_body"># Auteur / Author: Benjamin LISAN  date creation: 10/01/2000</text:p>
      <text:p text:style-name="Text_20_body"># Usage / Usage  : esp_alloue_libre_sun</text:p>
      <text:p text:style-name="Text_20_body"># Exemple / Ex.  : esp_alloue_libre_sun</text:p>
      <text:p text:style-name="Text_20_body"># Contexte utili.: cron</text:p>
      <text:p text:style-name="Text_20_body"># Comment.       : version pour SUN 2.5 et &gt;</text:p>
      <text:p text:style-name="Text_20_body">#-----------------------------------------------------------</text:p>
      <text:p text:style-name="Text_20_body">#rm -f  /tmp/esp_alloue_libre[0-9]* 2&gt; /dev/null</text:p>
      <text:p text:style-name="Text_20_body">echo "------------------------------------------------------"</text:p>
      <text:p text:style-name="Text_20_body">echo "Epace alloue libre machine SUN `uname -n` le `date '+%d/%m/%Y'` \n"</text:p>
      <text:p text:style-name="Text_20_body">echo "Nom partition phys.\tlibre (Mo)\tPartition "</text:p>
      <text:p text:style-name="P3">echo "-------------------\t----------\t----------"</text:p>
      <text:p text:style-name="P3">df -k|grep -v Filesystem|grep -v proc|grep -v fd|grep -v swap|\</text:p>
      <text:p text:style-name="P3">/usr/xpg4/bin/awk -v mac=`uname -n` 'BEGIN {sum=0}</text:p>
      <text:p text:style-name="P3">{if($4/1024 &gt; 1000)</text:p>
      <text:p text:style-name="Text_20_body">        <text:span text:style-name="T14">{</text:span></text:p>
      <text:p text:style-name="Text_20_body">           <text:span text:style-name="T14">{sum+=$4/1024}</text:span></text:p>
      <text:p text:style-name="Text_20_body">           <text:span text:style-name="T14">{printf("%s\t%s\t\t%s\n",$1,$4/1024,$6)}</text:span></text:p>
      <text:p text:style-name="Text_20_body">        }</text:p>
      <text:p text:style-name="Text_20_body">}</text:p>
      <text:p text:style-name="Text_20_body">END {printf("\nPlace totale allouee libre (Mo) sur %s : %s\n",mac, sum)}'</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08"/>23<text:span text:style-name="T1">     </text:span>Script donnant espace disque libre sur toutes les machines du centre informatique</text:h>
      <text:p text:style-name="Text_20_body"> </text:p>
      <text:p text:style-name="Text_20_body">#!/sbin/sh</text:p>
      <text:p text:style-name="Text_20_body">#------------------------------------------------------------------</text:p>
      <text:p text:style-name="Text_20_body"># @(#) esp_dsk_libre_centre</text:p>
      <text:p text:style-name="Text_20_body"># Nom / Name     : esp_dsk_libre_centre</text:p>
      <text:p text:style-name="P2"># Type / Type    : job shell (UNIX)                                           </text:p>
      <text:p text:style-name="Text_20_body"># But / Aim      : donne espace disque libre (alloue ou non alloue)</text:p>
      <text:p text:style-name="Text_20_body">#                  sur toutes les machines du centre informatique</text:p>
      <text:p text:style-name="Text_20_body"># Auteur / Author: Benjamin LISAN date creation: 01/11/99</text:p>
      <text:p text:style-name="Text_20_body"># Usage / Usage  : esp_dsk_libre_centre</text:p>
      <text:p text:style-name="Text_20_body"># Exemple / Ex.  : esp_dsk_libre_centre</text:p>
      <text:p text:style-name="Text_20_body"># Contexte / Co. : cron</text:p>
      <text:p text:style-name="Text_20_body"># Commentaires   : version pour HPUX 10.20</text:p>
      <text:p text:style-name="Text_20_body">#------------------------------------------------------------------</text:p>
      <text:p text:style-name="Text_20_body"># script pour obtenir l espace non alloue de toutes les machines du centre info</text:p>
      <text:p text:style-name="Text_20_body">fic=/usr/local/divers/esp_non_alloue_centre.res</text:p>
      <text:p text:style-name="P2">rm $fic 2&gt; /dev/null</text:p>
      <text:p text:style-name="Text_20_body">liste="</text:p>
      <text:p text:style-name="Text_20_body">barbade</text:p>
      <text:p text:style-name="Text_20_body">cervin      </text:p>
      <text:p text:style-name="Text_20_body">sumatra</text:p>
      <text:p text:style-name="Text_20_body">hawaii</text:p>
      <text:p text:style-name="Text_20_body">olga</text:p>
      <text:p text:style-name="Text_20_body">olga160     </text:p>
      <text:p text:style-name="P2">pgi_mlb</text:p>
      <text:p text:style-name="P2">mayotte</text:p>
      <text:p text:style-name="P2">"</text:p>
      <text:p text:style-name="Text_20_body"> </text:p>
      <text:p text:style-name="P2">for mach in $liste</text:p>
      <text:p text:style-name="P2">do</text:p>
      <text:p text:style-name="Text_20_body"> <text:span text:style-name="T14">remsh $mach -n 'sh /usr/local/bin/esp_non_alloue_hp'|tee -a $fic</text:span></text:p>
      <text:p text:style-name="Text_20_body"> <text:span text:style-name="T14">remsh $mach -n 'sh /usr/local/bin/esp_alloue_libre_hp'|tee -a $fic</text:span></text:p>
      <text:p text:style-name="Text_20_body">done</text:p>
      <text:p text:style-name="Text_20_body"> </text:p>
      <text:p text:style-name="Text_20_body">liste="</text:p>
      <text:p text:style-name="Text_20_body">bali</text:p>
      <text:p text:style-name="Text_20_body">java</text:p>
      <text:p text:style-name="P2">tahiti</text:p>
      <text:p text:style-name="P2">"</text:p>
      <text:p text:style-name="P2">for mach in $liste</text:p>
      <text:p text:style-name="P2">do</text:p>
      <text:p text:style-name="Text_20_body"> <text:span text:style-name="T14">remsh $mach -n '/usr/local/bin/esp_non_alloue_sun'|tee -a $fic</text:span></text:p>
      <text:p text:style-name="Text_20_body"> <text:span text:style-name="T14">remsh $mach -n '/usr/local/bin/esp_alloue_libre_sun'|tee -a $fic</text:span></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09"/>24<text:span text:style-name="T1">     </text:span>Script calculant l’espace non alloué sur machine HP : esp_non_alloue_hp</text:h>
      <text:p text:style-name="P12"> </text:p>
      <text:p text:style-name="P12"> </text:p>
      <text:p text:style-name="Text_20_body">#!/sbin/sh</text:p>
      <text:p text:style-name="Text_20_body">#-----------------------------------------------------------------------------</text:p>
      <text:p text:style-name="Text_20_body"># @(#) esp_non_alloue_hp</text:p>
      <text:p text:style-name="Text_20_body"># Nom / Name     : esp_non_alloue_hp</text:p>
      <text:p text:style-name="P2"># Type / Type    : job shell (UNIX)                                           </text:p>
      <text:p text:style-name="Text_20_body"># But / Aim      : statistique sur la place disque restante sur les disques</text:p>
      <text:p text:style-name="Text_20_body"># Auteur / Author: Benjamin LISAN  -&gt;    date creation:  01/12/99</text:p>
      <text:p text:style-name="Text_20_body">#                                                                             </text:p>
      <text:p text:style-name="Text_20_body"># Usage / Usage  : esp_non_alloue_hp</text:p>
      <text:p text:style-name="Text_20_body"># Exemple / Ex.  : "esp_non_alloue_hp"                                           </text:p>
      <text:p text:style-name="Text_20_body"># Contexte / Co. : cron</text:p>
      <text:p text:style-name="Text_20_body"># Commentaires   : version pour HPUX 10.20 avec LVM</text:p>
      <text:p text:style-name="P2">#-----------------------------------------------------------------------------</text:p>
      <text:p text:style-name="P2">tot_free=0</text:p>
      <text:p text:style-name="P2">echo "======================================================================="</text:p>
      <text:p text:style-name="Text_20_body">echo "Epace disque non alloue machine HP `uname -n` le `date '+%d/%m/%Y'` \n"</text:p>
      <text:p text:style-name="Text_20_body">echo "Disque \tEspace libre (Mo)"</text:p>
      <text:p text:style-name="P2">echo "-------\t-----------------"</text:p>
      <text:p text:style-name="Text_20_body"> </text:p>
      <text:p text:style-name="P2">for vg in `ls -d /dev/vg*`</text:p>
      <text:p text:style-name="P2">do</text:p>
      <text:p text:style-name="Text_20_body">  <text:span text:style-name="T14">free_PE=`/sbin/vgdisplay $vg | grep "Free PE"| sed -e "s:Free PE::" -e "s: ::g"`</text:span></text:p>
      <text:p text:style-name="Text_20_body">  <text:span text:style-name="T14">size_PE=`/sbin/vgdisplay $vg | grep "PE Size (Mbytes)" | sed -e "s:PE Size (Mbytes)::" -e "s: ::g"`</text:span></text:p>
      <text:p text:style-name="Text_20_body"> <text:span text:style-name="T14"># echo "free_PE='$free_PE' size_PE='$size_PE'"</text:span></text:p>
      <text:p text:style-name="Text_20_body">  <text:span text:style-name="T14">vol_free=`expr $free_PE \* $size_PE`</text:span></text:p>
      <text:p text:style-name="Text_20_body">  <text:span text:style-name="T14">echo "`basename $vg`\t$vol_free"</text:span></text:p>
      <text:p text:style-name="Text_20_body">  <text:span text:style-name="T14">tot_free2=$tot_free</text:span></text:p>
      <text:p text:style-name="Text_20_body">  <text:span text:style-name="T14">tot_free=`expr $tot_free2 + $vol_free`</text:span></text:p>
      <text:p text:style-name="Text_20_body">done</text:p>
      <text:p text:style-name="Text_20_body">echo "\nTotal place libre disque non alloue sur `uname -n`\t : $tot_free Mo"</text:p>
      <text:p text:style-name="P3">echo "-------------------------------------------------------------------"</text:p>
      <text:p text:style-name="P12"> </text:p>
      <text:p text:style-name="P20">#&gt;&gt;&gt;&gt;&gt;&gt;&gt;&gt;&gt;&gt;&gt;&gt;&gt;&gt;&gt;&gt;&gt;&gt;&gt;&gt;&gt;&gt;&gt;&gt;&gt;&gt;&gt;&gt;&gt;&gt;&gt;&gt;&gt;&gt;&gt;&gt;&gt;&gt;&gt;&gt;&gt;&gt;&gt;&gt;&gt;&gt;&gt;&gt;&gt;&gt;&gt;&gt;&gt;&gt;&gt;&gt;&gt;&gt;&gt;&gt;&gt;&gt;&gt;&gt;&gt;&gt;&gt;&gt;&gt;&gt;&gt;&gt;&gt;&gt;&gt;&gt;&gt;&gt;&gt;&gt;</text:p>
      <text:p text:style-name="P12"> </text:p>
      <text:p text:style-name="P3">#!/bin/sh</text:p>
      <text:p text:style-name="P3"># @esp_non_alloue_sun</text:p>
      <text:p text:style-name="Text_20_body"># Determine l'espace disque non alloue sur les disques.</text:p>
      <text:p text:style-name="Text_20_body"># Commentaire : marche sur machine SUN (Solaris 2.5 et &gt; )</text:p>
      <text:p text:style-name="Text_20_body"> </text:p>
      <text:p text:style-name="P2">tot_free=0</text:p>
      <text:p text:style-name="P2">echo "======================================================================="</text:p>
      <text:p text:style-name="Text_20_body">echo "Epace disque non alloue machine SUN `uname -n` le `date '+%d/%m/%Y'` \n"</text:p>
      <text:p text:style-name="Text_20_body">echo "disque\tEspace libre en Mo"</text:p>
      <text:p text:style-name="Text_20_body">echo "------\t------------------"</text:p>
      <text:p text:style-name="Text_20_body"> </text:p>
      <text:p text:style-name="Text_20_body"># Pour chaque disque sur la machine</text:p>
      <text:p text:style-name="P2">for disk in `format &lt; /dev/null|awk '{print $2}'|grep c|grep d|grep t`</text:p>
      <text:p text:style-name="P2">do</text:p>
      <text:p text:style-name="Text_20_body">  <text:span text:style-name="T14">blocks_free=`prtvtoc -f /dev/rdsk/${disk}s2 \</text:span></text:p>
      <text:p text:style-name="Text_20_body">  <text:span text:style-name="T14">|awk '{FS="="}{print $3}' | awk '{print $1}'`</text:span></text:p>
      <text:p text:style-name="Text_20_body">  <text:span text:style-name="T14">kb_free=`expr $blocks_free / 2`</text:span></text:p>
      <text:p text:style-name="Text_20_body">  <text:span text:style-name="T14">Mb_free=`expr $kb_free / 1024`</text:span></text:p>
      <text:p text:style-name="Text_20_body">  <text:span text:style-name="T14">echo "$disk\t$Mb_free"</text:span></text:p>
      <text:p text:style-name="Text_20_body">  <text:span text:style-name="T14">tot_free=`expr $Mb_free + $tot_free`</text:span></text:p>
      <text:p text:style-name="Text_20_body">done</text:p>
      <text:p text:style-name="Text_20_body">echo "\nTotal place libre disques non alloue sur `uname -n`\t : $tot_free Mo"</text:p>
      <text:p text:style-name="Text_20_body">echo "--------------------------------------------------------------------"</text:p>
      <text:p text:style-name="P12"> </text:p>
      <text:p text:style-name="P13">#&gt;&gt;&gt;&gt;&gt;&gt;&gt;&gt;&gt;&gt;&gt;&gt;&gt;&gt;&gt;&gt;&gt;&gt;&gt;&gt;&gt;&gt;&gt;&gt;&gt;&gt;&gt;&gt;&gt;&gt;&gt;&gt;&gt;&gt;&gt;&gt;&gt;&gt;&gt;&gt;&gt;&gt;&gt;&gt;&gt;&gt;&gt;&gt;&gt;&gt;&gt;&gt;&gt;&gt;&gt;&gt;&gt;&gt;&gt;&gt;&gt;&gt;&gt;&gt;&gt;&gt;&gt;&gt;&gt;&gt;&gt;&gt;&gt;&gt;&gt;&gt;&gt;&gt;&gt;&gt;</text:p>
      <text:h text:style-name="P26" text:outline-level="1"><text:bookmark text:name="_Toc89775610"/>25<text:span text:style-name="T1">     </text:span>script de recherche d'une chaîne de caractères dans tous les fichiers ascii, situés dans une arborecence</text:h>
      <text:p text:style-name="P12"> </text:p>
      <text:p text:style-name="P2">#!/bin/sh</text:p>
      <text:p text:style-name="P2">#-----------------------------------------------------------------------------</text:p>
      <text:p text:style-name="P2"># @(#) find_text : pattern search in files, belonging to a same root directory</text:p>
      <text:p text:style-name="P2"># Type / Type    : job shell (UNIX)                                           </text:p>
      <text:p text:style-name="Text_20_body"># But / Aim      : recherche d'une chaine de caracteres dans tous les fichiers </text:p>
      <text:p text:style-name="Text_20_body">#                  ascii, situes dans l'arborecence d'un repertoire</text:p>
      <text:p text:style-name="P2"># Auteur / Author: BL                            date creation:  01-AUG-98            </text:p>
      <text:p text:style-name="P2"># Usage / Usage  : "find_text directory pattern</text:p>
      <text:p text:style-name="Text_20_body"># Exemple / Ex.  : "find_text /etc 255.255.255.0"                                           </text:p>
      <text:p text:style-name="P2">#-----------------------------------------------------------------------------</text:p>
      <text:p text:style-name="P2">if [ $# -ne 2 ]</text:p>
      <text:p text:style-name="P2">then</text:p>
      <text:p text:style-name="Text_20_body">   <text:span text:style-name="T14">echo "usage : `basename $0` search_dir search_text"</text:span></text:p>
      <text:p text:style-name="Text_20_body">   exit 1</text:p>
      <text:p text:style-name="Text_20_body">fi</text:p>
      <text:p text:style-name="Text_20_body">dir_dep="$1"</text:p>
      <text:p text:style-name="P2">text_rech="$2"</text:p>
      <text:p text:style-name="P2">export dir_dep text_rech</text:p>
      <text:p text:style-name="Text_20_body"> </text:p>
      <text:p text:style-name="P2">for fic in `find $dir_dep`</text:p>
      <text:p text:style-name="P2">do</text:p>
      <text:p text:style-name="Text_20_body">  <text:span text:style-name="T14">file $fic | grep text &gt; /dev/null</text:span></text:p>
      <text:p text:style-name="Text_20_body">  <text:span text:style-name="T14">Ret="$?"</text:span></text:p>
      <text:p text:style-name="Text_20_body">  <text:span text:style-name="T14">if [ "$Ret" = "0" ]</text:span></text:p>
      <text:p text:style-name="Text_20_body">  <text:span text:style-name="T14">then</text:span></text:p>
      <text:p text:style-name="Text_20_body">    <text:span text:style-name="T14">grep -l  $text_rech $fic</text:span></text:p>
      <text:p text:style-name="Text_20_body">   <text:span text:style-name="T14">[ $? -eq 0 ] &amp;&amp; echo " ================"</text:span></text:p>
      <text:p text:style-name="Text_20_body">    <text:span text:style-name="T14">grep $text_rech $fic</text:span></text:p>
      <text:p text:style-name="Text_20_body">  fi</text:p>
      <text:p text:style-name="Text_20_body">done</text:p>
      <text:p text:style-name="P12">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1"/><text:span text:style-name="T7">26</text:span><text:span text:style-name="T2">      </text:span>script d’impression sur une seule imprimante des tailles des partitions de chacune des machines du centre</text:h>
      <text:p text:style-name="P12"> </text:p>
      <text:p text:style-name="P2"># imp_partition_size_of_each_mach : </text:p>
      <text:p text:style-name="Text_20_body"># script pour se conncter a toutes les machines UX suivantes </text:p>
      <text:p text:style-name="Text_20_body"># et imprimer les tailles des partitions de ces machines, sur une seule imprimante :</text:p>
      <text:p text:style-name="Text_20_body">liste="</text:p>
      <text:p text:style-name="Text_20_body">cervin      </text:p>
      <text:p text:style-name="Text_20_body">sumatra</text:p>
      <text:p text:style-name="Text_20_body">hawaii</text:p>
      <text:p text:style-name="Text_20_body">olga</text:p>
      <text:p text:style-name="Text_20_body">olga2</text:p>
      <text:p text:style-name="Text_20_body">olga160     </text:p>
      <text:p text:style-name="Text_20_body">pgi_mlb</text:p>
      <text:p text:style-name="Text_20_body">mayotte</text:p>
      <text:p text:style-name="P2">"</text:p>
      <text:p text:style-name="Text_20_body"> </text:p>
      <text:p text:style-name="P2">for mach in $liste</text:p>
      <text:p text:style-name="P2">do</text:p>
      <text:p text:style-name="Text_20_body">  echo "impression sur KYOCERA1 des tailles des partitions de la machine $mach"</text:p>
      <text:p text:style-name="Text_20_body">  <text:span text:style-name="T15">remsh $mach -n '(</text:span></text:p>
      <text:p text:style-name="Text_20_body">  <text:span text:style-name="T15">mach=`uname -n`;</text:span></text:p>
      <text:p text:style-name="Text_20_body"> <text:span text:style-name="T14">bdf | sed -e "/Filesystem/{</text:span></text:p>
      <text:p text:style-name="P2">i\\</text:p>
      <text:p text:style-name="P2">$mach</text:p>
      <text:p text:style-name="P2">}" | lp -dKYOCERA1</text:p>
      <text:p text:style-name="P2">)'</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2"/>27<text:span text:style-name="T1">     </text:span>script listant, dans un fichier unique, tous les scripts developpés pour le centre</text:h>
      <text:p text:style-name="P12"> </text:p>
      <text:p text:style-name="P2">#!/sbin/sh</text:p>
      <text:p text:style-name="P2">#-----------------------------------------------------------------------------</text:p>
      <text:p text:style-name="P2"># @(#) inv_local_bin</text:p>
      <text:p text:style-name="P2"># Nom / Name     : inv_local_bin</text:p>
      <text:p text:style-name="P2"># Type / Type    : job shell (UNIX)                                           </text:p>
      <text:p text:style-name="Text_20_body"># But / Aim      : liste dans un fichier unique de tous les scripts developpes</text:p>
      <text:p text:style-name="Text_20_body">#                  pour le centre. Puis impression (a la demande)</text:p>
      <text:p text:style-name="Text_20_body"># Auteur / Author: Benjamin LISAN  -&gt;    date creation:  15/5/00</text:p>
      <text:p text:style-name="Text_20_body">#                                                                             </text:p>
      <text:p text:style-name="Text_20_body"># Usage / Usage  : inv_local_bin</text:p>
      <text:p text:style-name="Text_20_body"># Exemple / Ex.  : "inv_local_bin"                                           </text:p>
      <text:p text:style-name="Text_20_body"># Contexte / Co. : cron</text:p>
      <text:p text:style-name="Text_20_body"># Commentaires   : version pour HPUX 10.20</text:p>
      <text:p text:style-name="P2">#-----------------------------------------------------------------------------</text:p>
      <text:p text:style-name="P2">ls /usr/local/bin/*|grep -v old|grep -v makedepend|grep -v ess \</text:p>
      <text:p text:style-name="Text_20_body">       <text:span text:style-name="T14">&gt; /usr/local/divers/local_bin.inv  #|grep -v $0</text:span></text:p>
      <text:p text:style-name="Text_20_body"># modif. eventuelle de la liste</text:p>
      <text:p text:style-name="Text_20_body">vi /usr/local/divers/local_bin.inv</text:p>
      <text:p text:style-name="Text_20_body"> </text:p>
      <text:p text:style-name="Text_20_body">&gt; /usr/local/divers/script_loc_bin.txt # raz de l inventaire</text:p>
      <text:p text:style-name="Text_20_body">for fic in `cat /usr/local/divers/local_bin.inv`</text:p>
      <text:p text:style-name="P2">do</text:p>
      <text:p text:style-name="Text_20_body">   <text:span text:style-name="T14">cat $fic &gt;&gt; /usr/local/divers/script_loc_bin.txt</text:span></text:p>
      <text:p text:style-name="Text_20_body">   <text:span text:style-name="T14">echo "\f#====================================================================" \</text:span></text:p>
      <text:p text:style-name="Text_20_body">                            <text:span text:style-name="T14">&gt;&gt; /usr/local/divers/script_loc_bin.txt</text:span></text:p>
      <text:p text:style-name="P2">done</text:p>
      <text:p text:style-name="P2">reponse=""</text:p>
      <text:p text:style-name="P2">while [ -z "$reponse" ]</text:p>
      <text:p text:style-name="Text_20_body">do </text:p>
      <text:p text:style-name="Text_20_body">   echo "Voulez vous verifier le fichier contenant le texte des scripts developpes au CENTRE ? :\c"</text:p>
      <text:p text:style-name="Text_20_body">   <text:span text:style-name="T14">read reponse</text:span></text:p>
      <text:p text:style-name="Text_20_body">   <text:span text:style-name="T14">case $reponse in</text:span></text:p>
      <text:p text:style-name="Text_20_body">       O|o|OUI|Oui|oui) vi /usr/local/divers/script_loc_bin.txt ;;</text:p>
      <text:p text:style-name="Text_20_body">       <text:span text:style-name="T14">*) : ;;</text:span></text:p>
      <text:p text:style-name="Text_20_body">   <text:span text:style-name="T14">esac</text:span></text:p>
      <text:p text:style-name="P2">done</text:p>
      <text:p text:style-name="P2">reponse=""</text:p>
      <text:p text:style-name="P2">while [ -z "$reponse" ]</text:p>
      <text:p text:style-name="Text_20_body">do </text:p>
      <text:p text:style-name="Text_20_body">   echo "Voulez vous imprimer le texte des scripts developpes au centre ? :\c"</text:p>
      <text:p text:style-name="Text_20_body">   <text:span text:style-name="T14">read reponse</text:span></text:p>
      <text:p text:style-name="Text_20_body">   <text:span text:style-name="T14">case $reponse in</text:span></text:p>
      <text:p text:style-name="Text_20_body">       <text:span text:style-name="T14">O|o|OUI|Oui|oui) lp -d suzuk_gos /usr/local/divers/script_loc_bin.txt ;;</text:span></text:p>
      <text:p text:style-name="Text_20_body">       *) : ;;</text:p>
      <text:p text:style-name="Text_20_body">   esac</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Text_20_body"> </text:p>
      <text:p text:style-name="P13">#&gt;&gt;&gt;&gt;&gt;&gt;&gt;&gt;&gt;&gt;&gt;&gt;&gt;&gt;&gt;&gt;&gt;&gt;&gt;&gt;&gt;&gt;&gt;&gt;&gt;&gt;&gt;&gt;&gt;&gt;&gt;&gt;&gt;&gt;&gt;&gt;&gt;&gt;&gt;&gt;&gt;&gt;&gt;&gt;&gt;&gt;&gt;&gt;&gt;&gt;&gt;&gt;&gt;&gt;&gt;&gt;&gt;&gt;&gt;&gt;&gt;&gt;&gt;&gt;&gt;&gt;&gt;&gt;&gt;&gt;&gt;&gt;&gt;&gt;&gt;&gt;&gt;&gt;&gt;&gt;</text:p>
      <text:p text:style-name="Text_20_body"> </text:p>
      <text:h text:style-name="P22" text:outline-level="1"><text:bookmark text:name="_Toc89775613"/>28<text:span text:style-name="T1">     </text:span>script de lancement de fenêtres ouvertes HPView sur une succession de machines HP</text:h>
      <text:p text:style-name="Text_20_body"> </text:p>
      <text:p text:style-name="Text_20_body"># lancement de fenêtres ouvertes HPView sur toutes les machines HP suivantes </text:p>
      <text:p text:style-name="Text_20_body"> </text:p>
      <text:p text:style-name="P2">hpterm -name sumatra &amp;</text:p>
      <text:p text:style-name="P2">hpterm -name bali &amp;</text:p>
      <text:p text:style-name="P2">hpterm -name mayotte &amp;</text:p>
      <text:p text:style-name="P2">hpterm -name an2m &amp;</text:p>
      <text:p text:style-name="P2">hpterm -name seychell &amp;</text:p>
      <text:p text:style-name="P13">#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4"/>29<text:span text:style-name="T1">     </text:span>script fusionnant tous les fichiers hosts des machines, pour obtenir la liste de toutes les adresses IP existantes</text:h>
      <text:p text:style-name="P12"> </text:p>
      <text:p text:style-name="P13"># liste des addresses IP de toutes les machines suivantes</text:p>
      <text:p text:style-name="P2">rm /tmp/ls_adr_ip.txt</text:p>
      <text:p text:style-name="Text_20_body">liste="</text:p>
      <text:p text:style-name="Text_20_body">barbade</text:p>
      <text:p text:style-name="Text_20_body">cervin      </text:p>
      <text:p text:style-name="Text_20_body">sumatra</text:p>
      <text:p text:style-name="Text_20_body">hawaii</text:p>
      <text:p text:style-name="Text_20_body">olga</text:p>
      <text:p text:style-name="Text_20_body">olga2</text:p>
      <text:p text:style-name="P2">olga160     </text:p>
      <text:p text:style-name="P2">pgi_mlb</text:p>
      <text:p text:style-name="P2">mayotte</text:p>
      <text:p text:style-name="P2">tahiti</text:p>
      <text:p text:style-name="P2">bali</text:p>
      <text:p text:style-name="P2">java</text:p>
      <text:p text:style-name="P2">"</text:p>
      <text:p text:style-name="Text_20_body"> </text:p>
      <text:p text:style-name="P2">for mach in $liste</text:p>
      <text:p text:style-name="P2">do</text:p>
      <text:p text:style-name="Text_20_body">  <text:span text:style-name="T14">remsh $mach -n 'cat /etc/hosts' |grep -v "^#" \</text:span></text:p>
      <text:p text:style-name="Text_20_body"> <text:span text:style-name="T14">| grep -v "^$"|grep -v "^impression" \</text:span></text:p>
      <text:p text:style-name="Text_20_body"> <text:span text:style-name="T14">&gt;&gt; /usr/local/divers/ls_adr_ip.txt</text:span></text:p>
      <text:p text:style-name="P2">done</text:p>
      <text:p text:style-name="P2">sort -u /usr/local/divers/ls_adr_ip.txt &gt; /usr/local/divers/lst_adr_ip.txt</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5"/>30<text:span text:style-name="T1">     </text:span>script de copie d’une liste de scripts d’administration, sur les machines du centre</text:h>
      <text:p text:style-name="P12"> </text:p>
      <text:p text:style-name="P13"># outils de copie d’une liste de scripts d’administration, sur les machines du centre </text:p>
      <text:p text:style-name="Text_20_body"> </text:p>
      <text:p text:style-name="P3">cd /usr/local/bin</text:p>
      <text:p text:style-name="Text_20_body">ls_fic='SAUVE_JOUR_BANDE</text:p>
      <text:p text:style-name="Text_20_body">SAUVE_SYS_TAPE</text:p>
      <text:p text:style-name="Text_20_body">arret_toutes_bases</text:p>
      <text:p text:style-name="Text_20_body">cnvdosux</text:p>
      <text:p text:style-name="Text_20_body">cnvuxdos</text:p>
      <text:p text:style-name="Text_20_body">cnx_mac</text:p>
      <text:p text:style-name="P2">compc</text:p>
      <text:p text:style-name="P2">contxsch</text:p>
      <text:p text:style-name="P2">count_C.sql</text:p>
      <text:p text:style-name="Text_20_body">dir</text:p>
      <text:p text:style-name="Text_20_body">dtree</text:p>
      <text:p text:style-name="Text_20_body">esp_alloue_libre_hp</text:p>
      <text:p text:style-name="Text_20_body">esp_non_alloue_hp</text:p>
      <text:p text:style-name="P2">find_text</text:p>
      <text:p text:style-name="P2">head1</text:p>
      <text:p text:style-name="P2">imp_bdf_mac</text:p>
      <text:p text:style-name="P2">imp_df_mac</text:p>
      <text:p text:style-name="P2">imp_host</text:p>
      <text:p text:style-name="P2">kill_uucp</text:p>
      <text:p text:style-name="P2">ls_adr_ip</text:p>
      <text:p text:style-name="P3">ls_mach</text:p>
      <text:p text:style-name="P3">lsfic_cache</text:p>
      <text:p text:style-name="P2">makedepend</text:p>
      <text:p text:style-name="P2">pattsch</text:p>
      <text:p text:style-name="P2">purge_fic_old_tmp.hp</text:p>
      <text:p text:style-name="P2">purge_gros_fic</text:p>
      <text:p text:style-name="P2">reboot_auto.hp</text:p>
      <text:p text:style-name="Text_20_body">relance_des_bases</text:p>
      <text:p text:style-name="Text_20_body">surv_mem</text:p>
      <text:p text:style-name="P2">surv_mem_swap.hp</text:p>
      <text:p text:style-name="P2">surv_nb_usr_ora</text:p>
      <text:p text:style-name="P2">tet</text:p>
      <text:p text:style-name="P2">top_50_dsk.hp</text:p>
      <text:p text:style-name="P2">tree</text:p>
      <text:p text:style-name="P2">tstcnx</text:p>
      <text:p text:style-name="P2">tstmail</text:p>
      <text:p text:style-name="P2">verif_occup_cpu.hp</text:p>
      <text:p text:style-name="P2">verif_parti_full.hp</text:p>
      <text:p text:style-name="P2">vm2</text:p>
      <text:p text:style-name="P2">vol_ora</text:p>
      <text:p text:style-name="P7">vol_orasys</text:p>
      <text:p text:style-name="P7">vol_restanthp</text:p>
      <text:p text:style-name="P2">where'</text:p>
      <text:p text:style-name="P2">for fic in `echo $ls_fic`</text:p>
      <text:p text:style-name="P2">do</text:p>
      <text:p text:style-name="Text_20_body">  <text:span text:style-name="T14">echo "rcp $fic seychell:/usr/local/bin"</text:span></text:p>
      <text:p text:style-name="Text_20_body">  <text:span text:style-name="T14">rcp -p $fic seychell:/usr/local/bin</text:span></text:p>
      <text:p text:style-name="Text_20_body">done</text:p>
      <text:p text:style-name="Text_20_body">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6"/>31<text:span text:style-name="T1">     </text:span>script de purge des fichiers anciens et temporaires (version pour HP)</text:h>
      <text:p text:style-name="P12"> </text:p>
      <text:p text:style-name="P2">#!/bin/sh</text:p>
      <text:p text:style-name="P2">#-----------------------------------------------------------------------------</text:p>
      <text:p text:style-name="P2"># @(#) purge_fic_old_tmp</text:p>
      <text:p text:style-name="P2"># Nom / Name     : purge_fic_old_tmp</text:p>
      <text:p text:style-name="P2"># Type / Type    : job shell (UNIX)                                           </text:p>
      <text:p text:style-name="Text_20_body"># But / Aim      : supprimer tous les fichiers temporaires anciens</text:p>
      <text:p text:style-name="Text_20_body">#                  (afin de faire de la place sur la machine)</text:p>
      <text:p text:style-name="Text_20_body"># Auteur / Author: Benjamin LISAN  -&gt;    date creation:  01-AUG-90            </text:p>
      <text:p text:style-name="Text_20_body"># Usage / Usage  : purge_fic</text:p>
      <text:p text:style-name="Text_20_body"># Exemple / Ex.  : "purge_fic"                                           </text:p>
      <text:p text:style-name="Text_20_body"># Contexte / Co. : cron</text:p>
      <text:p text:style-name="Text_20_body"># Commentaires   : version pour HPUX 10.20</text:p>
      <text:p text:style-name="P2">#-----------------------------------------------------------------------------</text:p>
      <text:p text:style-name="P2">find /usr/tmp -type f -mtime +7 -exec rm {} \;</text:p>
      <text:p text:style-name="P2">find /tmp -type f -mtime +7 -exec rm {} \;</text:p>
      <text:p text:style-name="P2">find /lost+found -type f -mtime +7 -exec rm {} \;</text:p>
      <text:p text:style-name="P2">find /usr/lost+found -type f -mtime +7 -exec rm {} \;</text:p>
      <text:p text:style-name="P2">find /var/lost+found -type f -mtime +7 -exec rm {} \;</text:p>
      <text:p text:style-name="P2">find /var/adm/sw/queue/logfiles -type f -mtime +7 -exec rm {} \;</text:p>
      <text:p text:style-name="P2">find /var/adm/syslog -type f -mtime +7 -exec rm {} \;</text:p>
      <text:p text:style-name="P2">find /var/opt/hparray/log -type f -mtime +7 -exec rm {} \;</text:p>
      <text:p text:style-name="P2">find /var/adm/log -type f -mtime +7 -exec rm {} \;</text:p>
      <text:p text:style-name="P2">find /var/sam/log -type f -mtime +7 -exec rm {} \;</text:p>
      <text:p text:style-name="P2">#find /usr/sam/log -type f -mtime +7 -exec rm {} \;</text:p>
      <text:p text:style-name="P2">find /var/X11/Xserver/logs -type f -mtime +7 -exec rm {} \;</text:p>
      <text:p text:style-name="P2">find /appli -name core -type f -mtime +1 -exec rm {} \;</text:p>
      <text:p text:style-name="P2"># find /intg -name core -type f -mtime +1 -exec rm {} \;</text:p>
      <text:p text:style-name="P2">find /appli -name toto -type f -mtime +7 -exec rm {} \;</text:p>
      <text:p text:style-name="P2"># find /intg -name toto -type f -mtime +7 -exec rm {} \;</text:p>
      <text:p text:style-name="P2">find /usr/spool/sockets -type f -mtime +7 -exec rm {} \;</text:p>
      <text:p text:style-name="P2">find /usr/spool/lp/request -type f -mtime +7 -exec rm {} \;</text:p>
      <text:p text:style-name="P2">find /logiciel/mqm/var/mqm/qmgrs/FRRUM000/@ipcc/ssem/ -name "socket*" -type f -mtime +7 -exec rm {} \;</text:p>
      <text:p text:style-name="P2">find /logiciel/cft/fillog -type f -mtime +7 -exec rm {} \;</text:p>
      <text:p text:style-name="P2">find /logiciel/oracle/oracle_7162/rdbms/log -type f -mtime +7 -exec rm {} \;</text:p>
      <text:p text:style-name="P2">find /logiciel/oracle/oracle_7162/rdbms/log -type f -mtime +7 -exec rm {} \;</text:p>
      <text:p text:style-name="P2">find /logiciel/oracle/oracle_7162/tcp/log -type f -mtime +7 -exec rm {} \;</text:p>
      <text:p text:style-name="P2">find /logiciel/oracle/oracle_7162/network/log -type f -mtime +7 -exec rm {} \;</text:p>
      <text:p text:style-name="P2">find /logiciel/oracle/oracle_734/network/log -type f -mtime +7 -exec rm {} \;</text:p>
      <text:p text:style-name="P2">find /logiciel/oracle/oracle_734/rdbms/log -type f -mtime +7 -exec rm {} \;</text:p>
      <text:p text:style-name="P2">find /logiciel/tuxedo/tuxedo_decoupe/logs -type f -mtime +7 -exec rm {} \;</text:p>
      <text:p text:style-name="Text_20_body">find /logiciel/dm/dba/log -type f -mtime +7 -exec rm {}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7"/>32<text:span text:style-name="T1">     </text:span>script de purge des fichiers anciens et temporaires (version pour SUN)</text:h>
      <text:p text:style-name="Text_20_body"> </text:p>
      <text:p text:style-name="P2">#!/bin/sh</text:p>
      <text:p text:style-name="P2">#-----------------------------------------------------------------------------</text:p>
      <text:p text:style-name="P2"># @(#) purge_fic_old_tmp</text:p>
      <text:p text:style-name="P2"># Nom / Name     : purge_fic_old_tmp</text:p>
      <text:p text:style-name="P2"># Type / Type    : job shell (UNIX)                                           </text:p>
      <text:p text:style-name="Text_20_body"># But / Aim      : supprimer tous les fichiers temperoires anciens</text:p>
      <text:p text:style-name="Text_20_body">#                  faire de la place sur la machine</text:p>
      <text:p text:style-name="Text_20_body"># Auteur / Author: Benjamin LISAN  -&gt;    date creation:  01-AUG-90            </text:p>
      <text:p text:style-name="Text_20_body"># Usage / Usage  : purge_fic</text:p>
      <text:p text:style-name="Text_20_body"># Exemple / Ex.  : "purge_fic"                                           </text:p>
      <text:p text:style-name="Text_20_body"># Contexte / Co. : cron</text:p>
      <text:p text:style-name="Text_20_body"># Commentaires   : version pour Solaris 2.5 et 2.6</text:p>
      <text:p text:style-name="P2">#-----------------------------------------------------------------------------</text:p>
      <text:p text:style-name="P2">find /usr/tmp -type f -mtime +7 -exec rm {} \;</text:p>
      <text:p text:style-name="P2">find /lost+found -type f -mtime +7 -exec rm {} \;</text:p>
      <text:p text:style-name="P2">find /usr/lost+found -type f -mtime +7 -exec rm {} \;</text:p>
      <text:p text:style-name="P2">find /var/lost+found -type f -mtime +7 -exec rm {} \;</text:p>
      <text:p text:style-name="P2">find /intg -name core -type f -mtime +1 -exec rm {} \;</text:p>
      <text:p text:style-name="P2">find /intg -name toto -type f -mtime +7 -exec rm {} \;</text:p>
      <text:p text:style-name="P2">find /logiciel/oracle/oracle_734/network/log -type f -mtime +7 -exec rm {} \;</text:p>
      <text:p text:style-name="P2">find /logiciel/oracle/oracle_734/rdbms/log -type f -mtime +7 -exec rm {} \;</text:p>
      <text:p text:style-name="P2">find /logiciel/tuxedo/tuxedo_carnets/tux_usi/logs -type f -mtime +7 -exec rm {} \;</text:p>
      <text:p text:style-name="P2">find /logiciel/tuxedo/tuxedo_carnets/tux_fch/logs -type f -mtime +7 -exec rm {} \;</text:p>
      <text:p text:style-name="P2">find /logiciel/tuxedo/tuxedo_carnets/tux_abe/logs -type f -mtime +7 -exec rm {} \;</text:p>
      <text:p text:style-name="P2">find /logiciel/tuxedo/tuxedo_carnets/tux_bug/logs -type f -mtime +7 -exec rm {} \;</text:p>
      <text:p text:style-name="P2">find /logiciel/tuxedo/tuxedo_carnets/tux_esz/logs -type f -mtime +7 -exec rm {} \;</text:p>
      <text:p text:style-name="P2">find /logiciel/tuxedo/tuxedo_carnets/tux_mer/logs -type f -mtime +7 -exec rm {} \;</text:p>
      <text:p text:style-name="P2">find /logiciel/tuxedo/tuxedo_carnets/tux_jan/logs -type f -mtime +7 -exec rm {} \;</text:p>
      <text:p text:style-name="P2">find /logiciel/tuxedo/tuxedo_carnets/tux_epo/logs -type f -mtime +7 -exec rm {} \;</text:p>
      <text:p text:style-name="P2">find /logiciel/tuxedo/tuxedo_carnets/tux_sok/logs -type f -mtime +7 -exec rm {} \;</text:p>
      <text:p text:style-name="P2">find /logiciel/tuxedo/tuxedo_decoupe/tux_wma/logs -type f -mtime +7 -exec rm {} \;</text:p>
      <text:p text:style-name="Text_20_body">find /logiciel/tuxedo/tuxedo_decoupe/tux_rec/logs -type f -mtime +7 -exec rm {}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8"/>33<text:span text:style-name="T1">     </text:span>script de purge des fichiers log ou temporaires trop gros</text:h>
      <text:p text:style-name="P12"> </text:p>
      <text:p text:style-name="P2">#!/bin/sh</text:p>
      <text:p text:style-name="P2">#-----------------------------------------------------------------------------</text:p>
      <text:p text:style-name="P2"># @(#) purge_gros_fic</text:p>
      <text:p text:style-name="P2"># Nom / Name     : purge_gros_fic</text:p>
      <text:p text:style-name="P2"># Type / Type    : job shell (UNIX)                                           </text:p>
      <text:p text:style-name="Text_20_body"># But / Aim      : 1) raccourcir les fichiers temporaires ou log trop gros</text:p>
      <text:p text:style-name="Text_20_body">#                  2) deplacer les fichiers .Z .z .gz .tar .cpio trop gros</text:p>
      <text:p text:style-name="Text_20_body">#                     dans /export/depot</text:p>
      <text:p text:style-name="Text_20_body">#                     afin de faire de la place dans /logiciel</text:p>
      <text:p text:style-name="Text_20_body"># Auteur / Author: Benjamin LISAN  -&gt;    date creation:  15/12/99</text:p>
      <text:p text:style-name="Text_20_body"># Usage / Usage  : purge_gros_fic</text:p>
      <text:p text:style-name="Text_20_body"># Exemple / Ex.  : purge_gros_fic                                           </text:p>
      <text:p text:style-name="Text_20_body"># Contexte / Co. : cron</text:p>
      <text:p text:style-name="Text_20_body"># Commentaires   : version pour HPUX 10.20</text:p>
      <text:p text:style-name="Text_20_body">#-----------------------------------------------------------------------------</text:p>
      <text:p text:style-name="Text_20_body">echo "1/ raccourcir les fichiers log ou tmp, trop long, au 500 derniers enr"</text:p>
      <text:p text:style-name="P2">for fic in `find /logiciel -size +1000000c -type f \( -name *.tmp -o -name *.log \)`</text:p>
      <text:p text:style-name="P2">do</text:p>
      <text:p text:style-name="Text_20_body">   <text:span text:style-name="T14">ls -l $fic</text:span></text:p>
      <text:p text:style-name="Text_20_body">   <text:span text:style-name="T14">head -3   $fic &gt;  /tmp/fic_a_racourc$$</text:span></text:p>
      <text:p text:style-name="Text_20_body">   <text:span text:style-name="T14">tail -500 $fic &gt;&gt; /tmp/fic_a_racourc$$</text:span></text:p>
      <text:p text:style-name="Text_20_body">   <text:span text:style-name="T14">mv /tmp/fic_a_racourc$$ $fic</text:span></text:p>
      <text:p text:style-name="P2">done</text:p>
      <text:p text:style-name="Text_20_body"> </text:p>
      <text:p text:style-name="Text_20_body">echo "2/ deplacer les fichiers .Z .z .gz .tar ou .cpio, trop gros, dans /export/depot"</text:p>
      <text:p text:style-name="P2">test ! -d /export       &amp;&amp; mkdir /export       2&gt; /dev/null</text:p>
      <text:p text:style-name="P2">test ! -d /export/depot &amp;&amp; mkdir /export/depot 2&gt; /dev/null</text:p>
      <text:p text:style-name="P2">for fic in `find /logiciel -size +1000000c -type f \</text:p>
      <text:p text:style-name="Text_20_body"> <text:span text:style-name="T14">\( -name *.Z -o -name *.z -o -name *.gz -o -name *.tar -o -name *.cpio \)`</text:span></text:p>
      <text:p text:style-name="P2">do</text:p>
      <text:p text:style-name="Text_20_body">   <text:span text:style-name="T14">ls -l $fic</text:span></text:p>
      <text:p text:style-name="Text_20_body">   <text:span text:style-name="T14">mv $fic /export/depot</text:span></text:p>
      <text:p text:style-name="P2">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19"/>34<text:span text:style-name="T1">     </text:span>script de reboot et de rédémarrage automatique (version pour HP)</text:h>
      <text:p text:style-name="P12"> </text:p>
      <text:p text:style-name="P3">#!/bin/ksh</text:p>
      <text:p text:style-name="P3"># -------------------------------------------------------------------------- #</text:p>
      <text:p text:style-name="P3"># Auteur  : B.LISAN</text:p>
      <text:p text:style-name="Text_20_body"># Date    : 25 fevrier 1999 </text:p>
      <text:p text:style-name="Text_20_body"># Objet   : REBOOT et REDEMARRAGE AUTOMATIQUE                </text:p>
      <text:p text:style-name="Text_20_body"># Comment : version pour HP</text:p>
      <text:p text:style-name="P7"># -------------------------------------------------------------------------- #</text:p>
      <text:p text:style-name="P7">log=/var/adm/log/reboot.log; export log                         </text:p>
      <text:p text:style-name="Text_20_body">echo `date` "REBOOT DE LA MACHINE: `uname -n`"| tee -a $log</text:p>
      <text:p text:style-name="Text_20_body">cd /</text:p>
      <text:p text:style-name="Text_20_body"> </text:p>
      <text:p text:style-name="Text_20_body"># on ne reboot pas s'il a encore des usagers.</text:p>
      <text:p text:style-name="P2">#/usr/local/bin/verif_users</text:p>
      <text:p text:style-name="P2">Retour="$?"</text:p>
      <text:p text:style-name="P2">if [ "$Retour" = "0" ]</text:p>
      <text:p text:style-name="Text_20_body">then</text:p>
      <text:p text:style-name="Text_20_body">    echo "plus d'utilisateurs -&gt; on peut lancer le reboot" | tee -a $log</text:p>
      <text:p text:style-name="Text_20_body">    # pour eviter que le shutdown soit le fils d'un produit d'admin. ITO...</text:p>
      <text:p text:style-name="Text_20_body">    # kill ITO par le shutdown, on kill aussi le fils.</text:p>
      <text:p text:style-name="Text_20_body">    # (at lui cree un job lie au cron donc au noyau)</text:p>
      <text:p text:style-name="Text_20_body">    <text:span text:style-name="T14">rm -f /tmp/shut[0-9]* &gt; /dev/null 2&gt; /dev/null</text:span></text:p>
      <text:p text:style-name="Text_20_body">    # cette solution avec at est en prevision ou les batchs seraient</text:p>
      <text:p text:style-name="Text_20_body">    # plannifies au niveau d'ITO et plus au niveau du cron</text:p>
      <text:p text:style-name="Text_20_body">    echo "nohup /etc/shutdown -r -y 0  &amp; " &gt;&gt; /tmp/shut$$</text:p>
      <text:p text:style-name="Text_20_body">    <text:span text:style-name="T14">at -f /tmp/shut$$ now</text:span></text:p>
      <text:p text:style-name="Text_20_body">else</text:p>
      <text:p text:style-name="Text_20_body">    echo "encore des utilisateurs actifs -&gt; on ne peut lancer le reboot" | \</text:p>
      <text:p text:style-name="Text_20_body">    <text:span text:style-name="T14">tee -a $log</text:span></text:p>
      <text:p text:style-name="P2">fi</text:p>
      <text:p text:style-name="Text_20_body">exit $Retour</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0"/><text:soft-page-break/>35<text:span text:style-name="T1">     </text:span>script de reboot et de rédémarrage automatique (version pour SUN)</text:h>
      <text:p text:style-name="Text_20_body"> </text:p>
      <text:p text:style-name="P3">#!/bin/ksh</text:p>
      <text:p text:style-name="P3"># -------------------------------------------------------------------------- #</text:p>
      <text:p text:style-name="P3"># Auteur  : B.LISAN</text:p>
      <text:p text:style-name="Text_20_body"># Date    : 25 fevrier 1999 </text:p>
      <text:p text:style-name="Text_20_body"># Objet   : REBOOT et REDEMARRAGE AUTOMATIQUE                </text:p>
      <text:p text:style-name="Text_20_body"># Comment : version pour SUN </text:p>
      <text:p text:style-name="P7"># -------------------------------------------------------------------------- #</text:p>
      <text:p text:style-name="P7">log=/var/adm/log/reboot.log; export log                         </text:p>
      <text:p text:style-name="Text_20_body">echo `date` "REBOOT DE LA MACHINE: `uname -n`"| tee -a $log</text:p>
      <text:p text:style-name="Text_20_body">cd /</text:p>
      <text:p text:style-name="Text_20_body"> </text:p>
      <text:p text:style-name="Text_20_body"># on ne reboot pas s'il a encore des usagers.</text:p>
      <text:p text:style-name="P2">#/usr/local/bin/verif_users</text:p>
      <text:p text:style-name="Text_20_body"> </text:p>
      <text:p text:style-name="P2">Retour="$?"</text:p>
      <text:p text:style-name="P2">if [ "$Retour" = "0" ]</text:p>
      <text:p text:style-name="Text_20_body">then</text:p>
      <text:p text:style-name="Text_20_body">    echo "plus d'utilisateurs -&gt; on peut lancer le reboot" | tee -a $log</text:p>
      <text:p text:style-name="Text_20_body">    # pour eviter que le shutdown soit le fils d'un produit d'admin. ITO...</text:p>
      <text:p text:style-name="Text_20_body">    # kill ITO par le shutdown, on kill aussi le fils.</text:p>
      <text:p text:style-name="Text_20_body">    # (at lui cree un job lie au cron donc au noyau)</text:p>
      <text:p text:style-name="Text_20_body">    <text:span text:style-name="T14">rm -f /tmp/shut[0-9]* &gt; /dev/null 2&gt; /dev/null</text:span></text:p>
      <text:p text:style-name="Text_20_body">    # cette solution avec at est en prevision ou les batchs seraient</text:p>
      <text:p text:style-name="Text_20_body">    # plannifies au niveau d'ITO et plus au niveau du cron</text:p>
      <text:p text:style-name="Text_20_body">    echo "nohup /usr/sbin/reboot &amp; " &gt;&gt; /tmp/shut$$</text:p>
      <text:p text:style-name="Text_20_body">    <text:span text:style-name="T14">at -f /tmp/shut$$ now</text:span></text:p>
      <text:p text:style-name="Text_20_body">else</text:p>
      <text:p text:style-name="Text_20_body">    echo "encore des utilisateurs actifs -&gt; on ne peut lancer le reboot" | \</text:p>
      <text:p text:style-name="Text_20_body">    <text:span text:style-name="T14">tee -a $log</text:span></text:p>
      <text:p text:style-name="P2">fi</text:p>
      <text:p text:style-name="Text_20_body">exit $Retour</text:p>
      <text:p text:style-name="P12"> </text:p>
      <text:p text:style-name="P13">#&gt;&gt;&gt;&gt;&gt;&gt;&gt;&gt;&gt;&gt;&gt;&gt;&gt;&gt;&gt;&gt;&gt;&gt;&gt;&gt;&gt;&gt;&gt;&gt;&gt;&gt;&gt;&gt;&gt;&gt;&gt;&gt;&gt;&gt;&gt;&gt;&gt;&gt;&gt;&gt;&gt;&gt;&gt;&gt;&gt;&gt;&gt;&gt;&gt;&gt;&gt;&gt;&gt;&gt;&gt;&gt;&gt;&gt;&gt;&gt;&gt;&gt;&gt;&gt;&gt;&gt;&gt;&gt;&gt;&gt;&gt;&gt;&gt;&gt;&gt;&gt;&gt;&gt;&gt;&gt;</text:p>
      <text:h text:style-name="P26" text:outline-level="1"><text:bookmark text:name="_Toc89775621"/>36<text:span text:style-name="T1">     </text:span>script de relance des bases Oracle</text:h>
      <text:p text:style-name="P12"> </text:p>
      <text:p text:style-name="Text_20_body">#!/sbin/sh</text:p>
      <text:p text:style-name="Text_20_body">#-----------------------------------------------------------------------------</text:p>
      <text:p text:style-name="Text_20_body"># @(#) relance_des_bases</text:p>
      <text:p text:style-name="Text_20_body"># Nom / Name     : relance_des_bases oracle</text:p>
      <text:p text:style-name="P2"># Type / Type    : job shell (UNIX)                                           </text:p>
      <text:p text:style-name="Text_20_body"># But / Aim      : relance des bases</text:p>
      <text:p text:style-name="Text_20_body"># Auteur / Author: Benjamin LISAN  -&gt;    date creation:  09-NOV-99</text:p>
      <text:p text:style-name="Text_20_body"># Usage / Usage  : relance_des_bases</text:p>
      <text:p text:style-name="Text_20_body"># Contexte / Co. : etre logue 'oracle'</text:p>
      <text:p text:style-name="Text_20_body"># Commentaires   : version pour oracle 7.3.4</text:p>
      <text:p text:style-name="Text_20_body">#                  Ne sont relances que les bases qui etait lance avant le</text:p>
      <text:p text:style-name="Text_20_body">#                  le lancement du script arret_toutes_bases</text:p>
      <text:p text:style-name="P2">#-----------------------------------------------------------------------------</text:p>
      <text:p text:style-name="P2">cd /logiciel/oracle</text:p>
      <text:p text:style-name="P2">for dirora in `ls -d oracle_[a-zA-Z]*|grep -v oracle_util`</text:p>
      <text:p text:style-name="P2">do</text:p>
      <text:p text:style-name="Text_20_body">   <text:span text:style-name="T14">sid=`echo $dirora | sed "s:oracle_::"`</text:span></text:p>
      <text:p text:style-name="Text_20_body">   <text:span text:style-name="T14">test -d $dirora &amp;&amp; \</text:span></text:p>
      <text:p text:style-name="Text_20_body">   # relance de la base $sid</text:p>
      <text:p text:style-name="Text_20_body">   <text:span text:style-name="T14">test -f /logiciel/oracle/$dirora/indiclock \</text:span></text:p>
      <text:p text:style-name="Text_20_body">    <text:span text:style-name="T14">&amp;&amp; start_bd $sid</text:span></text:p>
      <text:p text:style-name="Text_20_body">   <text:span text:style-name="T14">rm -f /logiciel/oracle/$dirora/indiclock &gt; /dev/null 2&gt; /dev/null</text:span></text:p>
      <text:p text:style-name="P2">done</text:p>
      <text:p text:style-name="Text_20_body"> </text:p>
      <text:p text:style-name="Text_20_body"> </text:p>
      <text:p text:style-name="Text_20_body">   <text:span text:style-name="T14">#OK=`cat /var/opt/oracle/oratab | grep -v "#"|grep -v "^$"|grep $sid | awk -F':' '{print $3}'`</text:span></text:p>
      <text:p text:style-name="Text_20_body">   <text:span text:style-name="T14">#test -d $dirora &amp;&amp; test ! -f /logiciel/oracle/$dirora/LOCK &amp;&amp; test $OK = 'Y' &amp;&amp; start_bd $sid</text:span></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2"/>37<text:span text:style-name="T1">     </text:span>Exemple de script de restauration d’une base réseau et fichiers à partir d’une bande</text:h>
      <text:p text:style-name="P12"> </text:p>
      <text:p text:style-name="Text_20_body"># ------------------------------------------------------------------------- #</text:p>
      <text:p text:style-name="Text_20_body"># Projet        : PROJET                 Sous-Projet  : sauv/resto          #</text:p>
      <text:p text:style-name="Text_20_body"># Auteur        : B. LISAN               Date creation: 03/08/95  ..:..     #</text:p>
      <text:p text:style-name="Text_20_body"># Nom programme : RESTO_DSK_BASE_CENTRE  Type Langage : Bourne SHELL        #</text:p>
      <text:p text:style-name="Text_20_body"># Objet du trait:                        Version      : 1.1                 #</text:p>
      <text:p text:style-name="Text_20_body">#           restauration fichier base et hors base + fichiers variables     #</text:p>
      <text:p text:style-name="Text_20_body">#           de type .seq et .txt                                            #</text:p>
      <text:p text:style-name="Text_20_body"># Commentaire   :                                                           #</text:p>
      <text:p text:style-name="Text_20_body"># ------------------------------------------------------------------------- #</text:p>
      <text:p text:style-name="Text_20_body">#ident "@(#)RESTO_DSK_BASE_CENTRE  Vers.1.1  03 Aout 1995 SMTT SRC"</text:p>
      <text:p text:style-name="P2">decompress()</text:p>
      <text:p text:style-name="P2">{</text:p>
      <text:p text:style-name="P2">if test -f $DIR_SUP_SAUV/svg_*.Z ; then</text:p>
      <text:p text:style-name="Text_20_body">   echo "$nom_pg : decompression fichiers sauvegarde disque svg_*.Z ?"</text:p>
      <text:p text:style-name="Text_20_body">   echo "          cela prend 5 mn (O: oui, N: non): \c"</text:p>
      <text:p text:style-name="Text_20_body">   <text:span text:style-name="T14">read repons</text:span></text:p>
      <text:p text:style-name="Text_20_body">   <text:span text:style-name="T14">case "$repons" in</text:span></text:p>
      <text:p text:style-name="Text_20_body">   <text:span text:style-name="T14">O|o|OUI|oui)</text:span></text:p>
      <text:p text:style-name="Text_20_body">       echo "$nom_pg: decompression des fichiers sauvg.disque svg_*.Z";</text:p>
      <text:p text:style-name="Text_20_body">       uncompress -f $DIR_SUP_SAUV/svg_projet.Z 2&gt; /dev/null;</text:p>
      <text:p text:style-name="Text_20_body">       uncompress -f $DIR_SUP_SAUV/svg_seq.Z    2&gt; /dev/null;</text:p>
      <text:p text:style-name="Text_20_body">       <text:span text:style-name="T14">uncompress -f $DIR_SUP_SAUV/svg_fap.Z    2&gt; /dev/null;</text:span></text:p>
      <text:p text:style-name="Text_20_body">       <text:span text:style-name="T14">uncompress -f $DIR_SUP_SAUV/svg_oscar.Z  2&gt; /dev/null;</text:span></text:p>
      <text:p text:style-name="Text_20_body">       <text:span text:style-name="T14">uncompress -f $DIR_SUP_SAUV/svg_fic.Z    2&gt; /dev/null;</text:span></text:p>
      <text:p text:style-name="Text_20_body">    ;;</text:p>
      <text:p text:style-name="Text_20_body">     *) :</text:p>
      <text:p text:style-name="Text_20_body">        ;;</text:p>
      <text:p text:style-name="Text_20_body">   esac</text:p>
      <text:p text:style-name="Text_20_body">fi</text:p>
      <text:p text:style-name="Text_20_body">}</text:p>
      <text:p text:style-name="Text_20_body"> </text:p>
      <text:p text:style-name="Text_20_body">liste_connectes()</text:p>
      <text:p text:style-name="Text_20_body">{</text:p>
      <text:p text:style-name="Text_20_body">   # 1) extraction par  wc du nombre de lignes de finger</text:p>
      <text:p text:style-name="Text_20_body"> </text:p>
      <text:p text:style-name="Text_20_body">   nb_enr_finger=`finger 2&gt; /dev/null| grep -v "Login" |wc -l`</text:p>
      <text:p text:style-name="Text_20_body"> </text:p>
      <text:p text:style-name="Text_20_body">   num_enr=1</text:p>
      <text:p text:style-name="Text_20_body">   while [ "$num_enr" -lt "$nb_enr_finger" ]</text:p>
      <text:p text:style-name="Text_20_body">   do</text:p>
      <text:p text:style-name="Text_20_body">      # 2) extraction du contenu de chaque enregistrement</text:p>
      <text:p text:style-name="Text_20_body">      #    et calcul de la longueur de chaque enregistrement</text:p>
      <text:p text:style-name="Text_20_body"> </text:p>
      <text:p text:style-name="Text_20_body">      contenu_enr=\</text:p>
      <text:p text:style-name="Text_20_body">`finger 2&gt;/dev/null | sort | grep -v Login | head -n "$num_enr" | tail -n 1`</text:p>
      <text:p text:style-name="Text_20_body">      contenu_enr2=`who -u | head -n "$num_enr" | tail -n 1`</text:p>
      <text:p text:style-name="Text_20_body">      chp1=`echo "$contenu_enr" | cut -c10-30`</text:p>
      <text:p text:style-name="Text_20_body">      <text:span text:style-name="T14">chp2=`echo "$contenu_enr" | cut -c67-72`</text:span></text:p>
      <text:p text:style-name="Text_20_body">      <text:span text:style-name="T14">test -z "$chp2" &amp;&amp; chp2="?????"</text:span></text:p>
      <text:p text:style-name="Text_20_body">      <text:span text:style-name="T14">chp3=`echo "$contenu_enr" | cut -c1-8`</text:span></text:p>
      <text:p text:style-name="Text_20_body">      <text:span text:style-name="T14">chp4=`echo "$contenu_enr2" | cut -c12-36`</text:span></text:p>
      <text:p text:style-name="Text_20_body">      <text:span text:style-name="T14">chp5=`echo "$contenu_enr2" | cut -c52-66`</text:span></text:p>
      <text:p text:style-name="Text_20_body">      <text:span text:style-name="T14">echo "$chp1 $chp2 $chp3 $chp4 $chp5"</text:span></text:p>
      <text:p text:style-name="Text_20_body">      <text:span text:style-name="T15">num_enr=`expr $num_enr + 1`</text:span></text:p>
      <text:p text:style-name="Text_20_body">   <text:span text:style-name="T14">done</text:span></text:p>
      <text:p text:style-name="P2">}</text:p>
      <text:p text:style-name="P2">test_KSBASE_histo()</text:p>
      <text:p text:style-name="P2">{</text:p>
      <text:p text:style-name="P2">KSto=/appli/projet/data/DSK/dico/KSBASE.histo</text:p>
      <text:p text:style-name="Text_20_body">etat_base=`cat $KSto`</text:p>
      <text:p text:style-name="P2">if [ "$etat_base" != "0" ]; then</text:p>
      <text:p text:style-name="Text_20_body">    echo "fichiers KSBASE.histo contenant la valeur: $etat_base \c"</text:p>
      <text:p text:style-name="Text_20_body">    echo "(il devrait etre a 0)"</text:p>
      <text:p text:style-name="Text_20_body">    echo "-&gt; vous ne pouvez pas relancer la base"</text:p>
      <text:p text:style-name="Text_20_body">    echo "(KSBASE.histo a 1 veut dire: base lance, arretee brutalement ou"</text:p>
      <text:p text:style-name="Text_20_body">    echo " dernier recouvrement mal termine)"</text:p>
      <text:p text:style-name="Text_20_body">    echo "Voulez-vous remettre cet indicateur a 0? O: oui, N: non: \c"</text:p>
      <text:p text:style-name="Text_20_body">    <text:span text:style-name="T14">read repons</text:span></text:p>
      <text:p text:style-name="Text_20_body">    <text:span text:style-name="T14">case "$repons" in</text:span></text:p>
      <text:p text:style-name="Text_20_body">    <text:span text:style-name="T14">O|o|OUI|oui) echo "0" &gt; $KSto;</text:span></text:p>
      <text:p text:style-name="Text_20_body">       echo "reset a 0 de KSBASE.histo (valeur: `cat $KSto`)"</text:p>
      <text:p text:style-name="Text_20_body">       ;;</text:p>
      <text:p text:style-name="Text_20_body">    *) echo "Vous ne pouvez pas relancer la base";</text:p>
      <text:p text:style-name="Text_20_body">       <text:span text:style-name="T14">echo "\007"; # bip</text:span></text:p>
      <text:p text:style-name="Text_20_body">       <text:span text:style-name="T14">exit 1</text:span></text:p>
      <text:p text:style-name="Text_20_body">       <text:span text:style-name="T14">;;</text:span></text:p>
      <text:p text:style-name="Text_20_body">    <text:span text:style-name="T14">esac</text:span></text:p>
      <text:p text:style-name="P2">fi</text:p>
      <text:p text:style-name="P2">}</text:p>
      <text:p text:style-name="P2"># --------------------------------------------------------------------------</text:p>
      <text:p text:style-name="P2">debug()</text:p>
      <text:p text:style-name="P2">{</text:p>
      <text:p text:style-name="Text_20_body">    <text:span text:style-name="T14">if [ "$DBG" = "Y" ] ; then</text:span></text:p>
      <text:p text:style-name="Text_20_body">       echo "$nom_pg: taper une touche pour continuer (Retour=$Retour): \c"</text:p>
      <text:p text:style-name="Text_20_body">       <text:span text:style-name="T14">read repons</text:span></text:p>
      <text:p text:style-name="Text_20_body">    <text:span text:style-name="T14">fi</text:span></text:p>
      <text:p text:style-name="P2">}</text:p>
      <text:p text:style-name="Text_20_body"># --------------------------------------------------------------------------</text:p>
      <text:p text:style-name="Text_20_body">DBG="N" # mode debugging : Y : mode debug active, N : mode desactive</text:p>
      <text:p text:style-name="P2">nom_pg=`basename $0`</text:p>
      <text:p text:style-name="P2">debug()</text:p>
      <text:p text:style-name="P2">{</text:p>
      <text:p text:style-name="Text_20_body">    <text:span text:style-name="T14">if [ "$DBG" = "Y" ]; then</text:span></text:p>
      <text:p text:style-name="Text_20_body">       echo "$nom_pg: taper une touche pour continuer (Retour=$Retour): \c"</text:p>
      <text:p text:style-name="Text_20_body">       <text:span text:style-name="T14">read repons</text:span></text:p>
      <text:p text:style-name="Text_20_body">    <text:span text:style-name="T14">fi</text:span></text:p>
      <text:p text:style-name="P2">}</text:p>
      <text:p text:style-name="Text_20_body"># --------------------------------------------------------------------------</text:p>
      <text:p text:style-name="Text_20_body"># Debut  du programme principal</text:p>
      <text:p text:style-name="Text_20_body"># --------------------------------------------------------------------------</text:p>
      <text:p text:style-name="Text_20_body">DBG="N" # mode debut : Y : mode active , N : mode deactive</text:p>
      <text:p text:style-name="Text_20_body">nom_pg=`basename $0`</text:p>
      <text:p text:style-name="Text_20_body">ESP_SUP_SAUV=/appli/svgbase/svg_projet</text:p>
      <text:p text:style-name="Text_20_body">export ESP_SUP_SAUV</text:p>
      <text:p text:style-name="Text_20_body">DIR_SUP_SAUV=`dirname $ESP_SUP_SAUV`</text:p>
      <text:p text:style-name="Text_20_body">export DIR_SUP_SAUV</text:p>
      <text:p text:style-name="P2">PATH_DICO=/appli/projet/data/DSK/dico/</text:p>
      <text:p text:style-name="P2">export PATH_DICO</text:p>
      <text:p text:style-name="P2">ESPX_SAUV_R=O</text:p>
      <text:p text:style-name="Text_20_body">export ESPX_SAUV_R</text:p>
      <text:p text:style-name="Text_20_body">cd /</text:p>
      <text:p text:style-name="Text_20_body"> </text:p>
      <text:p text:style-name="Text_20_body">echo "$nom_pg: Debut de la restauration disque des donnees de PROJET"</text:p>
      <text:p text:style-name="Text_20_body">echo "$nom_pg: -----------------------------------------------------"</text:p>
      <text:p text:style-name="P2">if [ "$LOGNAME" != "projet" ]; then</text:p>
      <text:p text:style-name="Text_20_body">   echo "$nom_pg: il faut etre loggue 'projet' pour lancer ce programme"</text:p>
      <text:p text:style-name="Text_20_body">   echo "$nom_pg: votre loggin n est pas 'projet' -&gt; sortie du programme"</text:p>
      <text:p text:style-name="Text_20_body">   echo "\007"; # bip</text:p>
      <text:p text:style-name="Text_20_body">   exit 1</text:p>
      <text:p text:style-name="Text_20_body">fi</text:p>
      <text:p text:style-name="Text_20_body">echo "$nom_pg: date de debut sauveg. : `date`"</text:p>
      <text:p text:style-name="Text_20_body">echo "$nom_pg: support de sauvegarde : $ESP_SUP_SAUV"</text:p>
      <text:p text:style-name="Text_20_body">echo "$nom_pg: sauv.relative ?       : $ESPX_SAUV_R"</text:p>
      <text:p text:style-name="Text_20_body">echo "$nom_pg: dictionnaire donnees  : $PATH_DICO"</text:p>
      <text:p text:style-name="Text_20_body">echo "$nom_pg: repertoire de la base : $meteor/espace"</text:p>
      <text:p text:style-name="Text_20_body">echo "$nom_pg:votre repertoire actuel: `pwd`"</text:p>
      <text:p text:style-name="Text_20_body">echo "$nom_pg: rep.fichiers hors base: $opr"</text:p>
      <text:p text:style-name="Text_20_body">echo "$nom_pg: Note : ce script doit etre lance avec le login : projet"</text:p>
      <text:p text:style-name="Text_20_body">echo "$nom_pg: votre loggin          : $LOGNAME"</text:p>
      <text:p text:style-name="Text_20_body">echo "\nCes parametres vous conviennent?"</text:p>
      <text:p text:style-name="Text_20_body">echo "si Oui taper la touche Entree, sinon ensemble les touches Ctrl et C: \c"</text:p>
      <text:p text:style-name="P2">read repons</text:p>
      <text:p text:style-name="P2">echo "$nom_pg: `finger 2&gt;/dev/null | grep -v "Login" | wc -l` \c"</text:p>
      <text:p text:style-name="Text_20_body">echo "utilisateurs encore actifs : "</text:p>
      <text:p text:style-name="Text_20_body">echo "Nom Utilisateur       Tel   Login    Num.Terminal Date connect Adresse IP</text:p>
      <text:p text:style-name="P2">--------------------- ----- -------- ------------ ------------ ---------------"</text:p>
      <text:p text:style-name="P2">liste_connectes</text:p>
      <text:p text:style-name="P2">echo "taper Entree : \c"</text:p>
      <text:p text:style-name="P2">read repons</text:p>
      <text:p text:style-name="Text_20_body">echo "$nom_pg: `etat | wc -l` programmes LEM encore actifs : "</text:p>
      <text:p text:style-name="P2">etat | grep -v "A    "</text:p>
      <text:p text:style-name="Text_20_body"> </text:p>
      <text:p text:style-name="P2">decompress</text:p>
      <text:p text:style-name="Text_20_body"> </text:p>
      <text:p text:style-name="Text_20_body">echo "$nom_pg: verification presence fichiers de sauvegarde disque :"</text:p>
      <text:p text:style-name="Text_20_body">echo "$nom_pg: (il doit y avoir au minimum le fichier suivant : svg_projet"</text:p>
      <text:p text:style-name="Text_20_body">echo "$nom_pg: sinon il peut y avoir jusqu'a 5 fichiers:"</text:p>
      <text:p text:style-name="Text_20_body">echo "$nom_pg: svg_projet svg_seq svg_fap svg_oscar svg_fic)"</text:p>
      <text:p text:style-name="P2">if test ! -f $ESP_SUP_SAUV ; then</text:p>
      <text:p text:style-name="Text_20_body">  echo "$nom_pg: pas de presence du fichier disque de sauvegarde des fichiers"</text:p>
      <text:p text:style-name="Text_20_body">  echo "$nom_pg: base et hors base (svg_projet) -&gt; sortie du script !!!!!"</text:p>
      <text:p text:style-name="Text_20_body">  echo "\007"; # bip</text:p>
      <text:p text:style-name="Text_20_body">  exit 1</text:p>
      <text:p text:style-name="Text_20_body">fi</text:p>
      <text:p text:style-name="Text_20_body">ls -l $DIR_SUP_SAUV/svg_*</text:p>
      <text:p text:style-name="Text_20_body">echo "Est-ce que cela vous convient? si Oui taper touche Entree, sinon ^C: \c"</text:p>
      <text:p text:style-name="Text_20_body">read repons</text:p>
      <text:p text:style-name="Text_20_body"> </text:p>
      <text:p text:style-name="Text_20_body"> </text:p>
      <text:p text:style-name="Text_20_body">echo "$nom_pg: sauvegarde fichiers non traces, fich. Masques KV0099 et POINTS"</text:p>
      <text:p text:style-name="P2">for fic in `cat $PATH_DICO/HORSLOG`</text:p>
      <text:p text:style-name="P2">do</text:p>
      <text:p text:style-name="Text_20_body">   <text:span text:style-name="T14">mkdir $meteor/REF 2&gt; /dev/null</text:span></text:p>
      <text:p text:style-name="Text_20_body">   <text:span text:style-name="T14">test -f $opr/${fic}.dat &amp;&amp; cp -p $opr/${fic}.dat $meteor/REF/.</text:span></text:p>
      <text:p text:style-name="Text_20_body">   <text:span text:style-name="T14">test -f $opr/${fic}.idx &amp;&amp; cp -p $opr/${fic}.idx $meteor/REF/.</text:span></text:p>
      <text:p text:style-name="Text_20_body">done</text:p>
      <text:p text:style-name="Text_20_body"> </text:p>
      <text:p text:style-name="Text_20_body"># test presence du programme de traitement des commandes Minitel : KP39</text:p>
      <text:p text:style-name="P2">if ps -ef | grep "KP39" | grep -v "grep" ; then</text:p>
      <text:p text:style-name="Text_20_body">   echo "$nom_pg:\007 minitel lancee"</text:p>
      <text:p text:style-name="Text_20_body">   echo "demander l'arret du minitel, aux pilotes"</text:p>
      <text:p text:style-name="Text_20_body">   exit 1</text:p>
      <text:p text:style-name="Text_20_body">fi</text:p>
      <text:p text:style-name="Text_20_body"> </text:p>
      <text:p text:style-name="Text_20_body"># test presence du programme de reception des envois des depots Gold : SF0C</text:p>
      <text:p text:style-name="P2">if ps -ef | grep "SF0C" | grep -v "grep" ; then</text:p>
      <text:p text:style-name="Text_20_body">   <text:span text:style-name="T14">echo "$nom_pg:\007 Reception gold active"</text:span></text:p>
      <text:p text:style-name="Text_20_body">   echo "demander l'arret de gold, aux pilotes"</text:p>
      <text:p text:style-name="Text_20_body">   <text:span text:style-name="T14">exit 1</text:span></text:p>
      <text:p text:style-name="P2">fi</text:p>
      <text:p text:style-name="Text_20_body"> </text:p>
      <text:p text:style-name="P2"># test presence de programme(s) LEM lance(s)</text:p>
      <text:p text:style-name="P2">nb_pg=`etat | wc -l`</text:p>
      <text:p text:style-name="P2">if [ "$nb_pg" != "0" ] ; then</text:p>
      <text:p text:style-name="Text_20_body">   echo "$nom_pg: `date`: $nb_pg programmes LEM actifs \007 :"</text:p>
      <text:p text:style-name="Text_20_body">   etat</text:p>
      <text:p text:style-name="Text_20_body">   echo "demander aux utilisateurs, d'arreter leur programmes"</text:p>
      <text:p text:style-name="Text_20_body">   exit 1</text:p>
      <text:p text:style-name="Text_20_body">fi</text:p>
      <text:p text:style-name="Text_20_body"> </text:p>
      <text:p text:style-name="Text_20_body"># test presence de la base lancee</text:p>
      <text:p text:style-name="P2">if ps -ef | grep "runesp" | grep -v "grep" ; then</text:p>
      <text:p text:style-name="Text_20_body">   echo "$nom_pg: `date`: base lancee \007"</text:p>
      <text:p text:style-name="Text_20_body">   echo "demander l'arret de la base PROJET aux pilotes\007"</text:p>
      <text:p text:style-name="Text_20_body">   <text:span text:style-name="T14">exit 1</text:span></text:p>
      <text:p text:style-name="P2">fi</text:p>
      <text:p text:style-name="Text_20_body"> </text:p>
      <text:p text:style-name="P2">if test -f $ESP_SUP_SAUV ; then</text:p>
      <text:p text:style-name="Text_20_body">  echo "$nom_pg: Nettoyages des fichiers SI de la base et SI hors base ?"</text:p>
      <text:p text:style-name="Text_20_body">  echo "$nom_pg: \c"</text:p>
      <text:p text:style-name="Text_20_body">  <text:span text:style-name="T14">tput rev</text:span></text:p>
      <text:p text:style-name="Text_20_body">  <text:span text:style-name="T14">tput smul</text:span></text:p>
      <text:p text:style-name="Text_20_body">  echo "Cette etape est OBLIGATOIRE!\c"</text:p>
      <text:p text:style-name="Text_20_body">  tput sgr0</text:p>
      <text:p text:style-name="Text_20_body">  echo " (O: oui, N: non): \c"</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debut nettoyage fichiers de la base";</text:p>
      <text:p text:style-name="Text_20_body">     <text:span text:style-name="T14">find $meteor/espace \( -name "*.dat" -o -name "*.idx" \) -exec rm {} \;</text:span></text:p>
      <text:p text:style-name="Text_20_body">     echo "$nom_pg: et nettoyage fichiers SI (sequentiels indexes) hors base";</text:p>
      <text:p text:style-name="Text_20_body">     <text:span text:style-name="T14">find $opr \( -name "*.dat" -o -name "*.idx" \) -exec rm {} \;</text:span></text:p>
      <text:p text:style-name="Text_20_body">     #echo "$nom_pg: Fin nettoyage fichiers SI de la base et hors base";</text:p>
      <text:p text:style-name="Text_20_body">     echo "$nom_pg: liste fichiers base non effaces s ils existent encore:";</text:p>
      <text:p text:style-name="Text_20_body">     ls $meteor/espace/*.dat $meteor/espace/*.idx 2&gt; /dev/null;</text:p>
      <text:p text:style-name="Text_20_body">     echo "$nom_pg: liste fichiers SI hors base non effaces, s ils existent:";</text:p>
      <text:p text:style-name="Text_20_body">     <text:span text:style-name="T17">ls $opr/*.dat $opr/*.idx 2&gt; /dev/null;</text:span></text:p>
      <text:p text:style-name="Text_20_body">     <text:span text:style-name="T17">echo " ";;</text:span></text:p>
      <text:p text:style-name="Text_20_body">  *) : ;;</text:p>
      <text:p text:style-name="Text_20_body">  esac</text:p>
      <text:p text:style-name="Text_20_body">  # ---</text:p>
      <text:p text:style-name="Text_20_body">  echo "$nom_pg: Nettoyages non obligatoire des fichiers .seq meteor,"</text:p>
      <text:p text:style-name="Text_20_body">  echo "         et fichiers files d'attentes .fap ?(O: oui, N: non): \c"</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debut nettoyage fichiers files d'attentes fap";</text:p>
      <text:p text:style-name="Text_20_body">     <text:span text:style-name="T14">find $opr  -name "*.fap" -exec rm {} \;</text:span></text:p>
      <text:p text:style-name="Text_20_body">     echo "$nom_pg: debut nettoyage fichiers .seq";</text:p>
      <text:p text:style-name="Text_20_body">     <text:span text:style-name="T14">find $meteor/DSK -name "*.seq" -exec rm {} \;</text:span></text:p>
      <text:p text:style-name="Text_20_body">     <text:span text:style-name="T14">echo " ";;</text:span></text:p>
      <text:p text:style-name="Text_20_body">  <text:span text:style-name="T14">*) : ;;</text:span></text:p>
      <text:p text:style-name="Text_20_body">  <text:span text:style-name="T14">esac</text:span></text:p>
      <text:p text:style-name="Text_20_body">  <text:span text:style-name="T14">debug</text:span></text:p>
      <text:p text:style-name="Text_20_body"> </text:p>
      <text:p text:style-name="Text_20_body">  <text:span text:style-name="T14">debug</text:span></text:p>
      <text:p text:style-name="Text_20_body">  <text:span text:style-name="T14">tput rev</text:span></text:p>
      <text:p text:style-name="Text_20_body">  tput smul</text:p>
      <text:p text:style-name="Text_20_body">  echo "L'etape suivante est OBLIGATOIRE!"</text:p>
      <text:p text:style-name="Text_20_body">  tput sgr0</text:p>
      <text:p text:style-name="Text_20_body">  echo "$nom_pg: Restauration disque fichiers c_isam base et hors base?"</text:p>
      <text:p text:style-name="Text_20_body">  <text:span text:style-name="T17">echo " (O/N): \c"</text:span></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Debut restauration disque de la base &amp; fichiers hors base";</text:p>
      <text:p text:style-name="Text_20_body">    echo "$nom_pg: ---------------------------------------------------------";</text:p>
      <text:p text:style-name="Text_20_body">    echo "$nom_pg: A La question 'mot de passe' taper le mot de passe TOTAL"</text:p>
      <text:p text:style-name="Text_20_body">    echo "$nom_pg: A La question '[O|N]?' taper la lettre 'O'"</text:p>
      <text:p text:style-name="Text_20_body">    echo "$nom_pg: Ne pas tenir compte du message :";</text:p>
      <text:p text:style-name="Text_20_body">    echo " "</text:p>
      <text:p text:style-name="Text_20_body">    echo "Mettre le support numero   xx dans /appli/svgbase/svg_projet";</text:p>
      <text:p text:style-name="Text_20_body">    echo " "</text:p>
      <text:p text:style-name="Text_20_body">    echo "Taper Entree, pour indiquer que vous avez lu ce dernier message: \c";</text:p>
      <text:p text:style-name="Text_20_body">    <text:span text:style-name="T14">read repons;</text:span></text:p>
      <text:p text:style-name="Text_20_body">    <text:span text:style-name="T14">$ESPX_PATH_P/restobas KSBASE $PATH_DICO $ESP_SUP_SAUV #2&gt; /dev/null;</text:span></text:p>
      <text:p text:style-name="Text_20_body">    Retour=$?;;</text:p>
      <text:p text:style-name="Text_20_body">  *) Retour=0 ;;</text:p>
      <text:p text:style-name="Text_20_body">  esac</text:p>
      <text:p text:style-name="Text_20_body">  if [ "$Retour" = "0" ]; then</text:p>
      <text:p text:style-name="Text_20_body">      echo "$nom_pg : `date` : activation restobas OK :restoration de la base"</text:p>
      <text:p text:style-name="Text_20_body">      echo "$nom_pg : nbre de fichiers de la base dans le rep.espace: \c"</text:p>
      <text:p text:style-name="Text_20_body">      ls $meteor/espace/* | wc -l</text:p>
      <text:p text:style-name="Text_20_body">  else</text:p>
      <text:p text:style-name="Text_20_body">      echo "$nom_pg : `date` : Erreur $Retour lors de l activation de restobas"</text:p>
      <text:p text:style-name="Text_20_body">      echo "\007"; # bip</text:p>
      <text:p text:style-name="Text_20_body">      exit 1</text:p>
      <text:p text:style-name="Text_20_body">  fi</text:p>
      <text:p text:style-name="Text_20_body">  debug</text:p>
      <text:p text:style-name="Text_20_body"> </text:p>
      <text:p text:style-name="Text_20_body">  echo "$nom_pg: Restauration fichiers sequentiels de type '.seq' ? <text:span text:style-name="T14">(O/N) : \c"</text:span></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 restauration cpio des fichiers de type: .seq";</text:p>
      <text:p text:style-name="Text_20_body">     cpio -icvBdumx &lt; $DIR_SUP_SAUV/svg_seq;;</text:p>
      <text:p text:style-name="Text_20_body">     *) :</text:p>
      <text:p text:style-name="Text_20_body">     ;;</text:p>
      <text:p text:style-name="Text_20_body">  esac</text:p>
      <text:p text:style-name="Text_20_body">  debug</text:p>
      <text:p text:style-name="Text_20_body"> </text:p>
      <text:p text:style-name="Text_20_body">  echo "$nom_pg: Restauration fichiers files d'a., de type '.fap' ? <text:span text:style-name="T14">(O/N) : \c"</text:span></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 `date` : restauration cpio des fichiers .fap";</text:p>
      <text:p text:style-name="Text_20_body">     cpio -icvBdumx &lt; $DIR_SUP_SAUV/svg_fap;;</text:p>
      <text:p text:style-name="Text_20_body">     *) : ;;</text:p>
      <text:p text:style-name="Text_20_body">  esac</text:p>
      <text:p text:style-name="Text_20_body"> </text:p>
      <text:p text:style-name="Text_20_body">  echo "$nom_pg: Restauration fichiers oscar de type '.csv' ? <text:span text:style-name="T14">(O/N) : \c"</text:span></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 `date` : restauration cpio des fichiers oscar .csv";</text:p>
      <text:p text:style-name="Text_20_body">     cpio -icvBdumx &lt; $DIR_SUP_SAUV/svg_oscar;;</text:p>
      <text:p text:style-name="Text_20_body">     *) : ;;</text:p>
      <text:p text:style-name="Text_20_body">  esac</text:p>
      <text:p text:style-name="Text_20_body"> </text:p>
      <text:p text:style-name="Text_20_body">  echo "$nom_pg: Restauration fichiers divers de type '.fic' ? <text:span text:style-name="T14">(O/N) : \c"</text:span></text:p>
      <text:p text:style-name="Text_20_body">  <text:span text:style-name="T14">read repons</text:span></text:p>
      <text:p text:style-name="Text_20_body">  <text:span text:style-name="T14">case "$repons" in</text:span></text:p>
      <text:p text:style-name="Text_20_body">  <text:span text:style-name="T14">O|o|OUI|oui|Oui)</text:span></text:p>
      <text:p text:style-name="Text_20_body">      echo "$nom_pg : restauration cpio du fichier des fichiers divers";</text:p>
      <text:p text:style-name="Text_20_body">      cpio -icvBdumx &lt; $DIR_SUP_SAUV/svg_fic;;</text:p>
      <text:p text:style-name="Text_20_body">      *) : ;;</text:p>
      <text:p text:style-name="Text_20_body">  esac</text:p>
      <text:p text:style-name="Text_20_body"> </text:p>
      <text:p text:style-name="Text_20_body">  echo "$nom_pg: restauration des fichiers Masques KV0099 et POINTS"</text:p>
      <text:p text:style-name="Text_20_body"> </text:p>
      <text:p text:style-name="Text_20_body">  <text:span text:style-name="T14">for fic in `cat $PATH_DICO/HORSLOG`</text:span></text:p>
      <text:p text:style-name="Text_20_body">  <text:span text:style-name="T14">do</text:span></text:p>
      <text:p text:style-name="Text_20_body">      <text:span text:style-name="T14">test -f $meteor/REF/${fic}.idx &amp;&amp; mv $meteor/REF/${fic}.idx $opr/.</text:span></text:p>
      <text:p text:style-name="Text_20_body">      <text:span text:style-name="T14">test -f $meteor/REF/${fic}.dat &amp;&amp; mv $meteor/REF/${fic}.dat $opr/.</text:span></text:p>
      <text:p text:style-name="Text_20_body">  <text:span text:style-name="T14">done</text:span></text:p>
      <text:p text:style-name="Text_20_body"> </text:p>
      <text:p text:style-name="Text_20_body">  echo "$nom_pg: En cas de recouvrement, lancer le scripts RECOUVR_PROJET"</text:p>
      <text:p text:style-name="Text_20_body">  echo "$nom_pg: situe dans le repertoire : /appli/projet/data/scripts \n"</text:p>
      <text:p text:style-name="Text_20_body">  echo "$nom_pg: Demander au BT de relancer la base PROJET, GOLD et minitel"</text:p>
      <text:p text:style-name="Text_20_body">  echo "$nom_pg: et l'acces aux utilisateurs"</text:p>
      <text:p text:style-name="Text_20_body">  echo "$nom_pg: FIN NORMALE de la restauration disque des donnees de PROJET"</text:p>
      <text:p text:style-name="Text_20_body">else</text:p>
      <text:p text:style-name="Text_20_body">   echo "$nom_pg: restoration impossible, fichier/support sauvegarde inconnu"</text:p>
      <text:p text:style-name="Text_20_body">   echo "$nom_pg : `date` : fin Anormale de $nom_pg"</text:p>
      <text:p text:style-name="Text_20_body">fi</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3"/>38<text:span text:style-name="T1">     </text:span>Exemple de script de restauration par « cpio » à partir d’une bande</text:h>
      <text:p text:style-name="Text_20_body"> </text:p>
      <text:p text:style-name="Text_20_body"># ------------------------------------------------------------------------- #</text:p>
      <text:p text:style-name="Text_20_body"># Projet        : CENTRE                 Sous-Projet  : sauv/resto          #</text:p>
      <text:p text:style-name="Text_20_body"># Auteur        : B. LISAN               Date creation: 03/08/98  ..:..     #</text:p>
      <text:p text:style-name="Text_20_body"># Nom programme : RESTO_JOUR_CPIO_SUN    Type Langage : Bourne SHELL        #</text:p>
      <text:p text:style-name="Text_20_body"># Objet du trait:                        Version      : 1.1                 #</text:p>
      <text:p text:style-name="Text_20_body">#           restauration fichier a partir de la sauvegarde faite par        #</text:p>
      <text:p text:style-name="Text_20_body">#           SAUVE_JOUR_CPIO_SUN                                             #</text:p>
      <text:p text:style-name="Text_20_body"># Commentaire   : script present sur les  machines SUN du centre informatiq.#</text:p>
      <text:p text:style-name="Text_20_body"># ------------------------------------------------------------------------- #</text:p>
      <text:p text:style-name="Text_20_body"># BL 21/10/99 : restauration en mode compressee</text:p>
      <text:p text:style-name="Text_20_body"># ------------------------------------------------------------------------- #</text:p>
      <text:p text:style-name="Text_20_body">#ident "@(#)RESTO_JOUR_CPIO_SUN  Vers.1.1  03 Aout 1998"</text:p>
      <text:p text:style-name="Text_20_body"> </text:p>
      <text:p text:style-name="P2">debug()</text:p>
      <text:p text:style-name="P2">{</text:p>
      <text:p text:style-name="Text_20_body">    <text:span text:style-name="T14">if [ "$DBG" = "Y" ] ; then</text:span></text:p>
      <text:p text:style-name="Text_20_body">       echo "$nom_pg: taper une touche pour continuer (Retour=$Retour): \c"</text:p>
      <text:p text:style-name="Text_20_body">       <text:span text:style-name="T14">read repons</text:span></text:p>
      <text:p text:style-name="Text_20_body">    <text:span text:style-name="T14">fi</text:span></text:p>
      <text:p text:style-name="P2">}</text:p>
      <text:p text:style-name="Text_20_body"># --------------------------------------------------------------------------</text:p>
      <text:p text:style-name="Text_20_body"># Debut  du programme principal</text:p>
      <text:p text:style-name="Text_20_body"># --------------------------------------------------------------------------</text:p>
      <text:p text:style-name="Text_20_body">DBG="N" # mode debut : Y : mode active , N : mode deactive</text:p>
      <text:p text:style-name="Text_20_body">nom_pg=`basename $0`</text:p>
      <text:p text:style-name="Text_20_body"># BL 21/10/99 : restauration en mode compressee (no rewind)</text:p>
      <text:p text:style-name="Text_20_body">DEV_SUP_SAUV=/dev/rmt/0nc</text:p>
      <text:p text:style-name="Text_20_body"> </text:p>
      <text:p text:style-name="Text_20_body">echo "$nom_pg: Debut de la restauration disque des donnees"</text:p>
      <text:p text:style-name="Text_20_body">echo "$nom_pg: -------------------------------------------"</text:p>
      <text:p text:style-name="P2">if [ "$LOGNAME" != "root" ]; then</text:p>
      <text:p text:style-name="Text_20_body">   echo "$nom_pg: il faut etre loggue 'root' pour lancer ce programme"</text:p>
      <text:p text:style-name="Text_20_body">   echo "$nom_pg: votre loggin n est pas 'root' -&gt; sortie du programme"</text:p>
      <text:p text:style-name="Text_20_body">   echo "\007"; # bip</text:p>
      <text:p text:style-name="Text_20_body">   exit 1</text:p>
      <text:p text:style-name="Text_20_body">fi</text:p>
      <text:p text:style-name="Text_20_body">echo "$nom_pg: date de debut sauveg. : `date`"</text:p>
      <text:p text:style-name="Text_20_body">echo "$nom_pg: support de sauvegarde : $DEV_SUP_SAUV"</text:p>
      <text:p text:style-name="Text_20_body">echo "$nom_pg:votre repertoire actuel: `pwd`"</text:p>
      <text:p text:style-name="Text_20_body">echo "$nom_pg: Note : ce script doit etre lance avec le login : root"</text:p>
      <text:p text:style-name="Text_20_body">echo "$nom_pg: votre loggin          : $LOGNAME"</text:p>
      <text:p text:style-name="Text_20_body">echo "\nCes parametres vous conviennent?"</text:p>
      <text:p text:style-name="Text_20_body">echo "si Oui taper la touche Entree, sinon ensemble les touches Ctrl et C: \c"</text:p>
      <text:p text:style-name="Text_20_body">read repons</text:p>
      <text:p text:style-name="Text_20_body">echo "Nb d'utilisateurs encore actifs : \c"</text:p>
      <text:p text:style-name="P2">who -u | wc -l</text:p>
      <text:p text:style-name="P2">echo "taper Entree : \c"</text:p>
      <text:p text:style-name="Text_20_body">read repons</text:p>
      <text:p text:style-name="Text_20_body">echo "$nom_pg: verification presence device du lecteur de bande :"</text:p>
      <text:p text:style-name="P2">if test ! -c $DEV_SUP_SAUV ; then</text:p>
      <text:p text:style-name="Text_20_body">  echo "$nom_pg: pas de presence du device du lecteur de bande: $DEV_SUP_SAUV"</text:p>
      <text:p text:style-name="Text_20_body">  echo "$nom_pg: -&gt; sortie du script !!!!!"</text:p>
      <text:p text:style-name="Text_20_body">  echo "\007"; # bip</text:p>
      <text:p text:style-name="Text_20_body">  exit 1</text:p>
      <text:p text:style-name="Text_20_body">fi</text:p>
      <text:p text:style-name="Text_20_body">ls -l $DEV_SUP_SAUV</text:p>
      <text:p text:style-name="Text_20_body">echo "Est-ce que cela vous convient? si Oui taper touche Entree, sinon ^C: \c"</text:p>
      <text:p text:style-name="P2">read repons</text:p>
      <text:p text:style-name="Text_20_body"> </text:p>
      <text:p text:style-name="P2">debug</text:p>
      <text:p text:style-name="P2">tput rev</text:p>
      <text:p text:style-name="P2">tput smul</text:p>
      <text:p text:style-name="P2">echo "$nom_pg: Restauration fichiers ? (O/N): \c"</text:p>
      <text:p text:style-name="P2">tput sgr0</text:p>
      <text:p text:style-name="P2">read repons</text:p>
      <text:p text:style-name="P2">case "$repons" in</text:p>
      <text:p text:style-name="P2">O|o|OUI|oui|Oui)</text:p>
      <text:p text:style-name="Text_20_body">  echo "$nom_pg: Debut restauration fichiers";</text:p>
      <text:p text:style-name="Text_20_body">  echo "$nom_pg: ---------------------------";</text:p>
      <text:p text:style-name="Text_20_body">  echo " "</text:p>
      <text:p text:style-name="Text_20_body">  echo "Mettre la cassette DAT du bon jour dans le lecteur";</text:p>
      <text:p text:style-name="Text_20_body">  echo " "</text:p>
      <text:p text:style-name="Text_20_body">  echo "Taper Entree, pour indiquer que vous avez lu ce dernier message: \c";</text:p>
      <text:p text:style-name="Text_20_body">  read repons;;</text:p>
      <text:p text:style-name="Text_20_body">*) echo "Pas de restauration"; exit 0 ;;</text:p>
      <text:p text:style-name="Text_20_body">esac</text:p>
      <text:p text:style-name="P2">debug</text:p>
      <text:p text:style-name="P2">fic=""</text:p>
      <text:p text:style-name="P2">while [ -z "$fic" ]</text:p>
      <text:p text:style-name="Text_20_body">do</text:p>
      <text:p text:style-name="Text_20_body">   echo "$nom_pg: nom du fichier ou du repertoire a restaurer ?"</text:p>
      <text:p text:style-name="Text_20_body">   echo "$nom_pg: suggestion: saisir son nom precede de son chemin en absolu"</text:p>
      <text:p text:style-name="Text_20_body">   echo "$nom_pg: exemples: /appli/siam/cdm/fic* /data_021/oracle_gem  ..."</text:p>
      <text:p text:style-name="Text_20_body">   echo "$nom_pg: pour restaurer un repertoire, faire suivre son nom d un '*' "</text:p>
      <text:p text:style-name="Text_20_body">   echo "$nom_pg: exemples: /appli/siam/cdm/fic* /usr/local/divers*"</text:p>
      <text:p text:style-name="Text_20_body">   echo "$nom_pg: nom du/des fichier(s)/repertoire(s): \c"</text:p>
      <text:p text:style-name="Text_20_body">   read fic</text:p>
      <text:p text:style-name="Text_20_body">done</text:p>
      <text:p text:style-name="Text_20_body">echo "$nom_pg: verification deja presence du/des fichiers a restaurer, \c"</text:p>
      <text:p text:style-name="P2">echo "taper Entree : \c"</text:p>
      <text:p text:style-name="P2">read repons</text:p>
      <text:p text:style-name="P2">ls -l $fic</text:p>
      <text:p text:style-name="Text_20_body"> </text:p>
      <text:p text:style-name="Text_20_body">echo "$nom_pg: La restauration peut prendre qq mn a 2H max."</text:p>
      <text:p text:style-name="Text_20_body">echo "$nom_pg: Restauration du/des fichier(s): $fic ? <text:span text:style-name="T14">(O/N) : \c"</text:span></text:p>
      <text:p text:style-name="P2">read repons</text:p>
      <text:p text:style-name="P2">case "$repons" in</text:p>
      <text:p text:style-name="P2">O|o|OUI|oui|Oui)</text:p>
      <text:p text:style-name="Text_20_body">   echo "$nom_pg : rembobinage de la bande"</text:p>
      <text:p text:style-name="Text_20_body">   mt rew</text:p>
      <text:p text:style-name="Text_20_body">   Retour="$?"</text:p>
      <text:p text:style-name="Text_20_body">   if [ "Retour" -ne "0" ]</text:p>
      <text:p text:style-name="Text_20_body">   then </text:p>
      <text:p text:style-name="Text_20_body">       echo "pas de bande dans le lecteur ou pb bande ou lecteur : $Retour"</text:p>
      <text:p text:style-name="Text_20_body">       exit 1</text:p>
      <text:p text:style-name="Text_20_body">   fi</text:p>
      <text:p text:style-name="Text_20_body">   echo "$nom_pg : recherche/restauration cpio du/des fichiers: $fic"</text:p>
      <text:p text:style-name="Text_20_body">   cd /</text:p>
      <text:p text:style-name="Text_20_body">   cpio -icvBdum "${fic}*" &lt;  $DEV_SUP_SAUV</text:p>
      <text:p text:style-name="Text_20_body">   Retour="$?"</text:p>
      <text:p text:style-name="Text_20_body">   if [ "Retour" -ne "0" ]</text:p>
      <text:p text:style-name="Text_20_body">   then </text:p>
      <text:p text:style-name="Text_20_body">       echo "$nom_pg: restauration impossible, fichier inconnu"</text:p>
      <text:p text:style-name="Text_20_body">       echo "$nom_pg : `date` : fin Anormale de $nom_pg : $Retour"</text:p>
      <text:p text:style-name="Text_20_body">       exit 1</text:p>
      <text:p text:style-name="Text_20_body">   else</text:p>
      <text:p text:style-name="Text_20_body">       echo "$nom_pg: FIN NORMALE de la restauration sur disque des donnees"</text:p>
      <text:p text:style-name="Text_20_body">       echo "$nom_pg: verification presence du/des fichiers restaures, "</text:p>
      <text:p text:style-name="Text_20_body">       echo "taper Entree _pour sortir de la liste affichee, taper 'q' _ : \c"</text:p>
      <text:p text:style-name="Text_20_body">       <text:span text:style-name="T14">read repons</text:span></text:p>
      <text:p text:style-name="Text_20_body">       <text:span text:style-name="T14">ls -l $fic | pg</text:span></text:p>
      <text:p text:style-name="Text_20_body">       <text:span text:style-name="T14">echo "taper Entree : \c"</text:span></text:p>
      <text:p text:style-name="Text_20_body">       <text:span text:style-name="T14">read repons</text:span></text:p>
      <text:p text:style-name="Text_20_body">   <text:span text:style-name="T14">fi ;;</text:span></text:p>
      <text:p text:style-name="Text_20_body">   *)  echo "pas de restauration demandee"</text:p>
      <text:p text:style-name="Text_20_body">   <text:span text:style-name="T14">;;</text:span></text:p>
      <text:p text:style-name="P2">esac</text:p>
      <text:p text:style-name="P2">debug</text:p>
      <text:p text:style-name="P2">mt rew</text:p>
      <text:p text:style-name="Text_20_body">echo "$nom_pg: fin du script de restauration"</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4"/>39<text:span text:style-name="T1">     </text:span>Exemple de script de restauration par « ufsrestore » à partir d’une bande (Sun)</text:h>
      <text:p text:style-name="P12"> </text:p>
      <text:p text:style-name="Text_20_body"># ------------------------------------------------------------------------- #</text:p>
      <text:p text:style-name="Text_20_body"># Projet        : CENTRE                 Sous-Projet  : sauv/resto          #</text:p>
      <text:p text:style-name="Text_20_body"># Auteur        : B. LISAN               Date creation: 03/08/98  ..:..     #</text:p>
      <text:p text:style-name="Text_20_body"># Nom programme : RESTO_JOUR_UFS_SUN1    Type Langage : Bourne SHELL        #</text:p>
      <text:p text:style-name="Text_20_body"># Objet du trait:                        Version      : 1.1                 #</text:p>
      <text:p text:style-name="Text_20_body">#           restauration fichier a partir de la sauvegarde faite par        #</text:p>
      <text:p text:style-name="Text_20_body">#           SAUVE_JOUR_UFS_SUN1                                             #</text:p>
      <text:p text:style-name="Text_20_body"># Commentaire   : script present sur les  machines SUN du centre informatiq.#</text:p>
      <text:p text:style-name="Text_20_body"># ------------------------------------------------------------------------- #</text:p>
      <text:p text:style-name="Text_20_body"># BL 21/10/99 : restauration « ufsrestore » en mode compressee</text:p>
      <text:p text:style-name="Text_20_body"># ------------------------------------------------------------------------- #</text:p>
      <text:p text:style-name="Text_20_body">#ident "@(#)RESTO_JOUR_UFS_SUN1  Vers.1.1  03 Aout 1998"</text:p>
      <text:p text:style-name="Text_20_body"> </text:p>
      <text:p text:style-name="P2">debug()</text:p>
      <text:p text:style-name="P2">{</text:p>
      <text:p text:style-name="Text_20_body">    <text:span text:style-name="T14">if [ "$DBG" = "Y" ] ; then</text:span></text:p>
      <text:p text:style-name="Text_20_body">       echo "$nom_pg: taper une touche pour continuer (Retour=$Retour): \c"</text:p>
      <text:p text:style-name="Text_20_body">       <text:span text:style-name="T14">read repons</text:span></text:p>
      <text:p text:style-name="Text_20_body">    <text:span text:style-name="T14">fi</text:span></text:p>
      <text:p text:style-name="P2">}</text:p>
      <text:p text:style-name="Text_20_body"># --------------------------------------------------------------------------</text:p>
      <text:p text:style-name="Text_20_body"># Debut  du programme principal</text:p>
      <text:p text:style-name="Text_20_body"># --------------------------------------------------------------------------</text:p>
      <text:p text:style-name="Text_20_body">DBG="N" # mode debut : Y : mode active , N : mode deactive</text:p>
      <text:p text:style-name="Text_20_body">nom_pg=`basename $0`</text:p>
      <text:p text:style-name="Text_20_body"># BL 21/10/99 : restauration en mode compressee (no rewind)</text:p>
      <text:p text:style-name="Text_20_body">DEV_SUP_SAUV=/dev/rmt/0nc</text:p>
      <text:p text:style-name="Text_20_body"> </text:p>
      <text:p text:style-name="Text_20_body">echo "$nom_pg: Debut de la restauration disque des donnees"</text:p>
      <text:p text:style-name="Text_20_body">echo "$nom_pg: -------------------------------------------"</text:p>
      <text:p text:style-name="P2">if [ "$LOGNAME" != "root" ]; then</text:p>
      <text:p text:style-name="Text_20_body">   echo "$nom_pg: il faut etre loggue 'root' pour lancer ce programme"</text:p>
      <text:p text:style-name="Text_20_body">   echo "$nom_pg: votre loggin n est pas 'root' -&gt; sortie du programme"</text:p>
      <text:p text:style-name="Text_20_body">   echo "\007"; # bip</text:p>
      <text:p text:style-name="Text_20_body">   exit 1</text:p>
      <text:p text:style-name="Text_20_body">fi</text:p>
      <text:p text:style-name="Text_20_body">echo "$nom_pg: date de debut sauveg. : `date`"</text:p>
      <text:p text:style-name="Text_20_body">echo "$nom_pg: support de sauvegarde : $DEV_SUP_SAUV"</text:p>
      <text:p text:style-name="Text_20_body">echo "$nom_pg:votre repertoire actuel: `pwd`"</text:p>
      <text:p text:style-name="Text_20_body">echo "$nom_pg: Note : ce script doit etre lance avec le login : root"</text:p>
      <text:p text:style-name="Text_20_body">echo "$nom_pg: votre loggin          : $LOGNAME"</text:p>
      <text:p text:style-name="Text_20_body">echo "\nCes parametres vous conviennent?"</text:p>
      <text:p text:style-name="Text_20_body">echo "si Oui taper la touche Entree, sinon ensemble les touches Ctrl et C: \c"</text:p>
      <text:p text:style-name="Text_20_body">read repons</text:p>
      <text:p text:style-name="Text_20_body">echo "Nb d'utilisateurs encore actifs : \c"</text:p>
      <text:p text:style-name="P2">who -u | wc -l</text:p>
      <text:p text:style-name="P2">echo "taper Entree : \c"</text:p>
      <text:p text:style-name="Text_20_body">read repons</text:p>
      <text:p text:style-name="Text_20_body">echo "$nom_pg: verification presence device du lecteur de bande :"</text:p>
      <text:p text:style-name="P2">if test ! -c $DEV_SUP_SAUV ; then</text:p>
      <text:p text:style-name="Text_20_body">  echo "$nom_pg: pas de presence du device du lecteur de bande: $DEV_SUP_SAUV"</text:p>
      <text:p text:style-name="Text_20_body">  echo "$nom_pg: -&gt; sortie du script !!!!!"</text:p>
      <text:p text:style-name="Text_20_body">  echo "\007"; # bip</text:p>
      <text:p text:style-name="Text_20_body">  exit 1</text:p>
      <text:p text:style-name="Text_20_body">fi</text:p>
      <text:p text:style-name="Text_20_body">ls -l $DEV_SUP_SAUV</text:p>
      <text:p text:style-name="Text_20_body">echo "Est-ce que cela vous convient? si Oui taper touche Entree, sinon ^C: \c"</text:p>
      <text:p text:style-name="P2">read repons</text:p>
      <text:p text:style-name="Text_20_body"> </text:p>
      <text:p text:style-name="P2">debug</text:p>
      <text:p text:style-name="P2">tput rev</text:p>
      <text:p text:style-name="P2">tput smul</text:p>
      <text:p text:style-name="P2">echo "$nom_pg: Restauration fichiers ? (O/N): \c"</text:p>
      <text:p text:style-name="P2">tput sgr0</text:p>
      <text:p text:style-name="P2">read repons</text:p>
      <text:p text:style-name="P2">case "$repons" in</text:p>
      <text:p text:style-name="P2">O|o|OUI|oui|Oui)</text:p>
      <text:p text:style-name="Text_20_body">  echo "$nom_pg: Debut restauration fichiers";</text:p>
      <text:p text:style-name="Text_20_body">  echo "$nom_pg: ---------------------------";</text:p>
      <text:p text:style-name="Text_20_body">  echo " "</text:p>
      <text:p text:style-name="Text_20_body">  echo "Mettre la cassette DAT du bon jour dans le lecteur";</text:p>
      <text:p text:style-name="Text_20_body">  echo " "</text:p>
      <text:p text:style-name="Text_20_body">  echo "Taper Entree, pour indiquer que vous avez lu ce dernier message: \c";</text:p>
      <text:p text:style-name="Text_20_body">  read repons;;</text:p>
      <text:p text:style-name="Text_20_body">*) echo "Pas de restauration"; exit 0 ;;</text:p>
      <text:p text:style-name="Text_20_body">esac</text:p>
      <text:p text:style-name="P2">debug</text:p>
      <text:p text:style-name="P2">fic=""</text:p>
      <text:p text:style-name="P2">while [ -z "$fic" ]</text:p>
      <text:p text:style-name="Text_20_body">do</text:p>
      <text:p text:style-name="Text_20_body">   echo "$nom_pg: nom du fichier ou du repertoire a restaurer ?"</text:p>
      <text:p text:style-name="Text_20_body">   echo "$nom_pg: suggestion: saisir son nom precede de son chemin en absolu"</text:p>
      <text:p text:style-name="Text_20_body">   echo "$nom_pg: exemples: /appli/siam/cdm/fic* /data_021/oracle_gem  ..."</text:p>
      <text:p text:style-name="Text_20_body">   echo "$nom_pg: pour restaurer un repertoire, faire suivre son nom d un '*' "</text:p>
      <text:p text:style-name="Text_20_body">   echo "$nom_pg: exemples: /appli/siam/cdm/fic* /usr/local/divers*"</text:p>
      <text:p text:style-name="Text_20_body">   echo "$nom_pg: nom du/des fichier(s)/repertoire(s): \c"</text:p>
      <text:p text:style-name="Text_20_body">   read fic</text:p>
      <text:p text:style-name="Text_20_body">done</text:p>
      <text:p text:style-name="Text_20_body">echo "$nom_pg: verification deja presence du/des fichiers a restaurer, \c"</text:p>
      <text:p text:style-name="P2">echo "taper Entree : \c"</text:p>
      <text:p text:style-name="P2">read repons</text:p>
      <text:p text:style-name="P2">ls -l $fic</text:p>
      <text:p text:style-name="Text_20_body"># traitement du nom du fichier pour ufsrestore</text:p>
      <text:p text:style-name="P2">nom_rep=`echo $fic|cut -d'/' -f1`</text:p>
      <text:p text:style-name="P2">nom_fic_rel=`echo $fic|cut -d'/' -f2-`</text:p>
      <text:p text:style-name="Text_20_body"> </text:p>
      <text:p text:style-name="Text_20_body">echo "$nom_pg: La restauration peut prendre qq mn a 2H max."</text:p>
      <text:p text:style-name="Text_20_body">echo "$nom_pg: Restauration du/des fichier(s): $fic ? <text:span text:style-name="T14">(O/N) : \c"</text:span></text:p>
      <text:p text:style-name="P2">read repons</text:p>
      <text:p text:style-name="P2">case "$repons" in</text:p>
      <text:p text:style-name="P2">O|o|OUI|oui|Oui)</text:p>
      <text:p text:style-name="Text_20_body">   echo "$nom_pg : rembobinage de la bande"</text:p>
      <text:p text:style-name="Text_20_body">   mt rew</text:p>
      <text:p text:style-name="Text_20_body">   Retour="$?"</text:p>
      <text:p text:style-name="Text_20_body">   if [ "Retour" -ne "0" ]</text:p>
      <text:p text:style-name="Text_20_body">   then </text:p>
      <text:p text:style-name="Text_20_body">       echo "pas de bande dans le lecteur ou pb bande ou lecteur : $Retour"</text:p>
      <text:p text:style-name="Text_20_body">       exit 1</text:p>
      <text:p text:style-name="Text_20_body">   fi</text:p>
      <text:p text:style-name="Text_20_body">   echo "$nom_pg : recherche/restauration ufsrestore du/des fichiers: $fic"</text:p>
      <text:p text:style-name="Text_20_body">   <text:span text:style-name="T14">cd $nom_rep</text:span></text:p>
      <text:p text:style-name="Text_20_body">   <text:span text:style-name="T14">ufsrestore xf $DEV_SUP_SAUV $nom_fic_rel</text:span></text:p>
      <text:p text:style-name="Text_20_body">   Retour="$?"</text:p>
      <text:p text:style-name="Text_20_body">   if [ "Retour" -ne "0" ]</text:p>
      <text:p text:style-name="Text_20_body">   then </text:p>
      <text:p text:style-name="Text_20_body">       echo "$nom_pg: restauration impossible, fichier inconnu"</text:p>
      <text:p text:style-name="Text_20_body">       echo "$nom_pg : `date` : fin Anormale de $nom_pg : $Retour"</text:p>
      <text:p text:style-name="Text_20_body">       exit 1</text:p>
      <text:p text:style-name="Text_20_body">   else</text:p>
      <text:p text:style-name="Text_20_body">       echo "$nom_pg: FIN NORMALE de la restauration sur disque des donnees"</text:p>
      <text:p text:style-name="Text_20_body">       echo "$nom_pg: verification presence du/des fichiers restaures, "</text:p>
      <text:p text:style-name="Text_20_body">       echo "taper Entree _pour sortir de la liste affichee, taper 'q' _ : \c"</text:p>
      <text:p text:style-name="Text_20_body">       <text:span text:style-name="T14">read repons</text:span></text:p>
      <text:p text:style-name="Text_20_body">       <text:span text:style-name="T14">ls -l $fic | pg</text:span></text:p>
      <text:p text:style-name="Text_20_body">       <text:span text:style-name="T14">echo "taper Entree : \c"</text:span></text:p>
      <text:p text:style-name="Text_20_body">       <text:span text:style-name="T14">read repons</text:span></text:p>
      <text:p text:style-name="Text_20_body">   <text:span text:style-name="T14">fi ;;</text:span></text:p>
      <text:p text:style-name="Text_20_body">   *)  echo "pas de restauration demandee"</text:p>
      <text:p text:style-name="Text_20_body">   <text:span text:style-name="T14">;;</text:span></text:p>
      <text:p text:style-name="P2">esac</text:p>
      <text:p text:style-name="P2">debug</text:p>
      <text:p text:style-name="P2">mt rew</text:p>
      <text:p text:style-name="Text_20_body">echo "$nom_pg: fin du script de restauration"</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5"/>40<text:span text:style-name="T1">     </text:span>Exemple de script de savegarde sur bande par « cpio » (HP)</text:h>
      <text:p text:style-name="Text_20_body"> </text:p>
      <text:p text:style-name="Text_20_body"># ------------------------------------------------------------------------- #</text:p>
      <text:p text:style-name="Text_20_body"># Projet        : PROJET               Sous-Projet  : sauv/resto            #</text:p>
      <text:p text:style-name="Text_20_body"># Auteur        : B. LISAN             Date creation: 03/08/95  ..:..       #</text:p>
      <text:p text:style-name="Text_20_body"># Nom programme : SAUV_DSK_BASE_PROJET Type Langage : Bourne SHELL          #</text:p>
      <text:p text:style-name="Text_20_body"># Objet du trait:                      Version      : 1.1                   #</text:p>
      <text:p text:style-name="Text_20_body">#           sauvegarde fichier base et hors base + fichiers variables       #</text:p>
      <text:p text:style-name="Text_20_body">#           de type .seq et .txt                                            #</text:p>
      <text:p text:style-name="Text_20_body"># Commentaire   :                                                           #</text:p>
      <text:p text:style-name="Text_20_body"># ------------------------------------------------------------------------- #</text:p>
      <text:p text:style-name="Text_20_body">#ident "@(#)SAUV_DSK_BASE_PROJET  Vers.1.1  03 Aout 1995 SMTT SRC"</text:p>
      <text:p text:style-name="Text_20_body"> </text:p>
      <text:p text:style-name="P2">compression()</text:p>
      <text:p text:style-name="P2">{</text:p>
      <text:p text:style-name="Text_20_body">  <text:span text:style-name="T14">if test -f $DIR_SUP_SAUV/svg_$1 ; then</text:span></text:p>
      <text:p text:style-name="Text_20_body">     echo "$nom_pg : compression fichiers sauvegarde disque svg_$1 ?"</text:p>
      <text:p text:style-name="Text_20_body">     echo "          cela prend 5 mn, O: oui, N: non :\c"</text:p>
      <text:p text:style-name="Text_20_body">     <text:span text:style-name="T14">read repons</text:span></text:p>
      <text:p text:style-name="Text_20_body">     <text:span text:style-name="T14">case "$repons" in</text:span></text:p>
      <text:p text:style-name="Text_20_body">       O|o|OUI|oui) echo "$nom_pg: compression des fichiers sauvg.svg_$1";</text:p>
      <text:p text:style-name="Text_20_body">                    compress -f $DIR_SUP_SAUV/svg_$1;;</text:p>
      <text:p text:style-name="Text_20_body">       *) : ;;</text:p>
      <text:p text:style-name="Text_20_body">     esac</text:p>
      <text:p text:style-name="Text_20_body">  fi</text:p>
      <text:p text:style-name="Text_20_body">}</text:p>
      <text:p text:style-name="Text_20_body"> </text:p>
      <text:p text:style-name="Text_20_body">liste_connectes()</text:p>
      <text:p text:style-name="Text_20_body">{</text:p>
      <text:p text:style-name="Text_20_body">   # 1) extraction par  wc du nombre de lignes de finger</text:p>
      <text:p text:style-name="Text_20_body"> </text:p>
      <text:p text:style-name="Text_20_body">   nb_enr_finger=`finger 2&gt; /dev/null| grep -v "Login" |wc -l`</text:p>
      <text:p text:style-name="Text_20_body"> </text:p>
      <text:p text:style-name="Text_20_body">   num_enr=1</text:p>
      <text:p text:style-name="Text_20_body">   while [ "$num_enr" -lt "$nb_enr_finger" ]</text:p>
      <text:p text:style-name="Text_20_body">   do</text:p>
      <text:p text:style-name="Text_20_body">      # 2) extraction du contenu de chaque enregistrement</text:p>
      <text:p text:style-name="Text_20_body">      #    et calcul de la longueur de chaque enregistrement</text:p>
      <text:p text:style-name="Text_20_body"> </text:p>
      <text:p text:style-name="Text_20_body">      contenu_enr=\</text:p>
      <text:p text:style-name="Text_20_body">`finger 2&gt;/dev/null | sort | grep -v Login | head -n "$num_enr" | tail -n 1`</text:p>
      <text:p text:style-name="Text_20_body">      contenu_enr2=`who -u | head -n "$num_enr" | tail -n 1`</text:p>
      <text:p text:style-name="Text_20_body">      chp1=`echo "$contenu_enr" | cut -c10-30`</text:p>
      <text:p text:style-name="Text_20_body">      <text:span text:style-name="T14">chp2=`echo "$contenu_enr" | cut -c67-72`</text:span></text:p>
      <text:p text:style-name="Text_20_body">      <text:span text:style-name="T14">test -z "$chp2" &amp;&amp; chp2="?????"</text:span></text:p>
      <text:p text:style-name="Text_20_body">      <text:span text:style-name="T14">chp3=`echo "$contenu_enr" | cut -c1-8`</text:span></text:p>
      <text:p text:style-name="Text_20_body">      <text:span text:style-name="T14">chp4=`echo "$contenu_enr2" | cut -c12-36`</text:span></text:p>
      <text:p text:style-name="Text_20_body">      <text:span text:style-name="T14">chp5=`echo "$contenu_enr2" | cut -c52-66`</text:span></text:p>
      <text:p text:style-name="Text_20_body">      <text:span text:style-name="T14">echo "$chp1 $chp2 $chp3 $chp4 $chp5"</text:span></text:p>
      <text:p text:style-name="Text_20_body">      <text:span text:style-name="T15">num_enr=`expr $num_enr + 1`</text:span></text:p>
      <text:p text:style-name="Text_20_body">   <text:span text:style-name="T14">done</text:span></text:p>
      <text:p text:style-name="P2">}</text:p>
      <text:p text:style-name="P2">test_KSBASE_histo()</text:p>
      <text:p text:style-name="P2">{</text:p>
      <text:p text:style-name="P2">KSto=/appli/projet/data/DSK/dico/KSBASE.histo</text:p>
      <text:p text:style-name="Text_20_body">etat_base=`cat $KSto`</text:p>
      <text:p text:style-name="P2">if [ "$etat_base" != "0" ]; then</text:p>
      <text:p text:style-name="Text_20_body">    echo "fichiers KSBASE.histo contenant la valeur : $etat_base \c"</text:p>
      <text:p text:style-name="Text_20_body">    echo "(il devrait etre a 0)"</text:p>
      <text:p text:style-name="Text_20_body">    echo "-&gt; vous ne pouvez pas relancer la base"</text:p>
      <text:p text:style-name="Text_20_body">    echo "(KSBASE.histo a 1 veut dire: base lance, arretee brutalement ou"</text:p>
      <text:p text:style-name="Text_20_body">    echo " dernier recouvrement mal termine)"</text:p>
      <text:p text:style-name="Text_20_body">    echo "Voulez-vous remettre cet indicateur a 0? O: oui, N: non : \c"</text:p>
      <text:p text:style-name="Text_20_body">    <text:span text:style-name="T14">read repons</text:span></text:p>
      <text:p text:style-name="Text_20_body">    <text:span text:style-name="T14">case "$repons" in</text:span></text:p>
      <text:p text:style-name="Text_20_body">    <text:span text:style-name="T14">O|o|OUI|oui) echo "0" &gt; $KSto;</text:span></text:p>
      <text:p text:style-name="Text_20_body">       echo "reset a 0 de KSBASE.histo (valeur: `cat $KSto`)"</text:p>
      <text:p text:style-name="Text_20_body">       ;;</text:p>
      <text:p text:style-name="Text_20_body">    *) echo "Vous ne pouvez pas relancer la base";</text:p>
      <text:p text:style-name="Text_20_body">       <text:span text:style-name="T14">echo "\007"; # bip</text:span></text:p>
      <text:p text:style-name="Text_20_body">       <text:span text:style-name="T14">exit 1</text:span></text:p>
      <text:p text:style-name="Text_20_body">       <text:span text:style-name="T14">;;</text:span></text:p>
      <text:p text:style-name="Text_20_body">    <text:span text:style-name="T14">esac</text:span></text:p>
      <text:p text:style-name="P2">fi</text:p>
      <text:p text:style-name="P2">}</text:p>
      <text:p text:style-name="P2">debug()</text:p>
      <text:p text:style-name="P2">{</text:p>
      <text:p text:style-name="Text_20_body">    <text:span text:style-name="T14">if [ "$DBG" = "Y" ] ; then</text:span></text:p>
      <text:p text:style-name="Text_20_body">       echo "$nom_pg: taper une touche pour continuer (Retour=$Retour) :\c"</text:p>
      <text:p text:style-name="Text_20_body">       <text:span text:style-name="T14">read repons</text:span></text:p>
      <text:p text:style-name="Text_20_body">    <text:span text:style-name="T14">fi</text:span></text:p>
      <text:p text:style-name="P2">}</text:p>
      <text:p text:style-name="Text_20_body"># --------------------------------------------------------------------------</text:p>
      <text:p text:style-name="Text_20_body">DBG="N" # mode debugging : Y : mode debug active, N : mode desactive</text:p>
      <text:p text:style-name="Text_20_body">nom_pg=`basename $0`</text:p>
      <text:p text:style-name="Text_20_body">ESP_SUP_SAUV=appli/svgbase/svg_projet</text:p>
      <text:p text:style-name="Text_20_body">export ESP_SUP_SAUV</text:p>
      <text:p text:style-name="Text_20_body">DIR_SUP_SAUV=`dirname $ESP_SUP_SAUV`</text:p>
      <text:p text:style-name="Text_20_body">export DIR_SUP_SAUV</text:p>
      <text:p text:style-name="P2">PATH_DICO=/appli/projet/data/DSK/dico/</text:p>
      <text:p text:style-name="P2">export PATH_DICO</text:p>
      <text:p text:style-name="P2">ESPX_SAUV_R=O</text:p>
      <text:p text:style-name="Text_20_body">export ESPX_SAUV_R</text:p>
      <text:p text:style-name="Text_20_body">cd /</text:p>
      <text:p text:style-name="Text_20_body"> </text:p>
      <text:p text:style-name="Text_20_body">echo "$nom_pg: Debut de la sauvegarde disque des donnees de PROJET"</text:p>
      <text:p text:style-name="Text_20_body">echo "$nom_pg: ---------------------------------------------------"</text:p>
      <text:p text:style-name="P2">if [ "$LOGNAME" != "projet" ]; then</text:p>
      <text:p text:style-name="Text_20_body">   echo "$nom_pg: il faut etre loggue 'projet' pour lancer ce programme"</text:p>
      <text:p text:style-name="Text_20_body">   echo "$nom_pg: votre loggin n est pas 'projet' -&gt; sortie du programme"</text:p>
      <text:p text:style-name="Text_20_body">   echo "\007"; # bip</text:p>
      <text:p text:style-name="Text_20_body">   exit 1</text:p>
      <text:p text:style-name="Text_20_body">fi</text:p>
      <text:p text:style-name="Text_20_body">echo "$nom_pg: date de debut sauveg. : `date`"</text:p>
      <text:p text:style-name="Text_20_body">echo "$nom_pg: support de sauvegarde : $ESP_SUP_SAUV"</text:p>
      <text:p text:style-name="Text_20_body">echo "$nom_pg: dictionnaire donnees  : $PATH_DICO"</text:p>
      <text:p text:style-name="Text_20_body">echo "$nom_pg: repertoire de la base : $meteor/espace"</text:p>
      <text:p text:style-name="Text_20_body">echo "$nom_pg:votre repertoire actuel: `pwd`"</text:p>
      <text:p text:style-name="Text_20_body">echo "$nom_pg: rep.fichiers hors base: $opr"</text:p>
      <text:p text:style-name="Text_20_body">echo "$nom_pg: sauv.relative?        : $ESPX_SAUV_R"</text:p>
      <text:p text:style-name="Text_20_body">echo "$nom_pg: Note : ce script doit etre lance avec le login : projet"</text:p>
      <text:p text:style-name="Text_20_body">echo "$nom_pg: votre loggin          : $LOGNAME"</text:p>
      <text:p text:style-name="Text_20_body">echo "\nCes parametres vous conviennent?"</text:p>
      <text:p text:style-name="Text_20_body">echo "si Oui taper la touche Entree, sinon ensemble les touches Ctrl et C : \c"</text:p>
      <text:p text:style-name="P2">read repons</text:p>
      <text:p text:style-name="P2">echo "$nom_pg: `finger 2&gt; /dev/null | grep -v "Login" | wc -l` \c"</text:p>
      <text:p text:style-name="Text_20_body">echo "utilisateurs encore actifs : "</text:p>
      <text:p text:style-name="Text_20_body">echo "Nom Utilisateur       Tel   Login    Num.Terminal Date connect Adresse IP</text:p>
      <text:p text:style-name="P2">--------------------- ----- -------- ------------ ------------ ---------------"</text:p>
      <text:p text:style-name="P2">liste_connectes;</text:p>
      <text:p text:style-name="P2">echo "taper Entree :\c"</text:p>
      <text:p text:style-name="P2">read repons</text:p>
      <text:p text:style-name="Text_20_body">echo "$nom_pg: `etat | wc -l` programmes LEM encore actifs : \n"</text:p>
      <text:p text:style-name="Text_20_body">etat | grep -v "A    "</text:p>
      <text:p text:style-name="Text_20_body">echo "$nom_pg: verification du lancement de la base : \n"</text:p>
      <text:p text:style-name="Text_20_body">ps -ef | grep "runesp" | grep -v grep</text:p>
      <text:p text:style-name="Text_20_body">echo "Est-ce que cela vous convient? si Oui taper touche Entree, sinon ^C : \c"</text:p>
      <text:p text:style-name="Text_20_body">read repons</text:p>
      <text:p text:style-name="Text_20_body"> </text:p>
      <text:p text:style-name="Text_20_body">echo "$nom_pg: creation liste des fichiers S.I. supplementaires a sauvegarder"</text:p>
      <text:p text:style-name="P2">find $opr \( -name "*.dat" -o -name "*.idx" \) -print | \</text:p>
      <text:p text:style-name="Text_20_body">   <text:span text:style-name="T14">egrep -v "/tmp|/bin|/sauv|/old" &gt;  $PATH_DICO/sauvcompl</text:span></text:p>
      <text:p text:style-name="P2">#vi  $PATH_DICO/sauvcompl</text:p>
      <text:p text:style-name="Text_20_body"> </text:p>
      <text:p text:style-name="P2">if ps -ef | grep "KP39" | grep -v "grep" ; then</text:p>
      <text:p text:style-name="Text_20_body">   <text:span text:style-name="T14">echo "$nom_pg: `date`: minitel lancee"</text:span></text:p>
      <text:p text:style-name="Text_20_body">   echo "demander l'arret du minitel aux pilotes"</text:p>
      <text:p text:style-name="Text_20_body">   <text:span text:style-name="T14">exit 1</text:span></text:p>
      <text:p text:style-name="P2">fi</text:p>
      <text:p text:style-name="Text_20_body"> </text:p>
      <text:p text:style-name="P2">if ps -ef | grep "SF0C" | grep -v "grep" ; then</text:p>
      <text:p text:style-name="Text_20_body">   <text:span text:style-name="T14">echo "$nom_pg: `date`: Reception gold active"</text:span></text:p>
      <text:p text:style-name="Text_20_body">   echo "demander l'arret de gold aux pilotes"</text:p>
      <text:p text:style-name="Text_20_body">   exit 1</text:p>
      <text:p text:style-name="Text_20_body">fi</text:p>
      <text:p text:style-name="Text_20_body"> </text:p>
      <text:p text:style-name="Text_20_body">if [ "`etat | wc -l`" != "0" ] ; then</text:p>
      <text:p text:style-name="Text_20_body">   echo "$nom_pg: `date`: programmes LEM encore actifs :"</text:p>
      <text:p text:style-name="Text_20_body">   etat</text:p>
      <text:p text:style-name="Text_20_body">   echo "demander l'arret des utilisateurs aux pilotes"</text:p>
      <text:p text:style-name="Text_20_body">   <text:span text:style-name="T14">exit 1</text:span></text:p>
      <text:p text:style-name="P2">fi</text:p>
      <text:p text:style-name="Text_20_body"> </text:p>
      <text:p text:style-name="P2">if ps -ef | grep "runesp" | grep -v "grep" ; then</text:p>
      <text:p text:style-name="Text_20_body">   echo "$nom_pg: `date`: base lancee"</text:p>
      <text:p text:style-name="Text_20_body">   echo "demander l'arret de la base PROJET aux pilotes"</text:p>
      <text:p text:style-name="Text_20_body">   exit 1</text:p>
      <text:p text:style-name="Text_20_body">fi</text:p>
      <text:p text:style-name="Text_20_body">echo "$nom_pg : controle de la coherence de la base par bcheck"</text:p>
      <text:p text:style-name="Text_20_body">echo "$nom_pg : Note : controle TRES FORTEMENT RECOMMANDE !!!"</text:p>
      <text:p text:style-name="Text_20_body">echo "$nom_pg : controle coherence de base? O pour oui, N pour non : \c"</text:p>
      <text:p text:style-name="P2">read repons</text:p>
      <text:p text:style-name="P2">case "$repons" in</text:p>
      <text:p text:style-name="Text_20_body">  <text:span text:style-name="T14">O|o|OUI|oui)</text:span></text:p>
      <text:p text:style-name="Text_20_body">  <text:span text:style-name="T14">$meteor/scripts/checkbase;</text:span></text:p>
      <text:p text:style-name="Text_20_body">  Retour=$?</text:p>
      <text:p text:style-name="Text_20_body">  ;;</text:p>
      <text:p text:style-name="Text_20_body">  *) Retour=0</text:p>
      <text:p text:style-name="Text_20_body">  ;;</text:p>
      <text:p text:style-name="Text_20_body">esac</text:p>
      <text:p text:style-name="Text_20_body"> </text:p>
      <text:p text:style-name="Text_20_body">if [ "$Retour" != "0" ]; then</text:p>
      <text:p text:style-name="Text_20_body">   echo "$nom_pg: erreur physique dans base arret ANORMAL de la sauveg.!";</text:p>
      <text:p text:style-name="Text_20_body">   echo "$nom_pg: ou utilisateur encore connecte -&gt; si c'est le cas : ";</text:p>
      <text:p text:style-name="Text_20_body">   echo "$nom_pg: a. lui demander de se deconnecter";</text:p>
      <text:p text:style-name="Text_20_body">   echo "         b. et relancer de nouveau ce script.";</text:p>
      <text:p text:style-name="Text_20_body">   exit $Retour;</text:p>
      <text:p text:style-name="Text_20_body">else</text:p>
      <text:p text:style-name="Text_20_body">   echo "Pas d'erreur lors du check de base -&gt; base OK, taper Retour : \c";</text:p>
      <text:p text:style-name="Text_20_body">   read repons;</text:p>
      <text:p text:style-name="Text_20_body">fi</text:p>
      <text:p text:style-name="Text_20_body"> </text:p>
      <text:p text:style-name="Text_20_body"> </text:p>
      <text:p text:style-name="Text_20_body">echo "$nom_pg: appel prog.C de sauvegarde de la base &amp; des fichiers hors base"</text:p>
      <text:p text:style-name="Text_20_body">echo "$nom_pg: DEBUT DE LA SAUVEGARDE DES DONNEES SUR DISQUE"</text:p>
      <text:p text:style-name="Text_20_body">echo "$nom_pg: --------------------------------------------- \n"</text:p>
      <text:p text:style-name="Text_20_body">echo "$nom_pg: Attention, ne pas tenir compte du message suivant : \n"</text:p>
      <text:p text:style-name="Text_20_body">echo " "</text:p>
      <text:p text:style-name="Text_20_body">tput smul</text:p>
      <text:p text:style-name="Text_20_body">echo "Mettre un support dans /appli/svgbase/svg_projet"</text:p>
      <text:p text:style-name="P2">tput sgr0</text:p>
      <text:p text:style-name="P2">echo " "</text:p>
      <text:p text:style-name="Text_20_body">echo "$nom_pg: Sauvegarde dsk.fichiers base &amp; hors base? O: oui N: non: \c"</text:p>
      <text:p text:style-name="P2">read repons</text:p>
      <text:p text:style-name="P2">case "$repons" in</text:p>
      <text:p text:style-name="Text_20_body">  <text:span text:style-name="T14">O|o|OUI|oui)</text:span></text:p>
      <text:p text:style-name="Text_20_body">               <text:span text:style-name="T14">$ESPX_PATH_P/sauvebas KSBASE $PATH_DICO $ESP_SUP_SAUV -s ;</text:span></text:p>
      <text:p text:style-name="Text_20_body">               Retour=$?</text:p>
      <text:p text:style-name="Text_20_body">               compression projet</text:p>
      <text:p text:style-name="Text_20_body">               ;;</text:p>
      <text:p text:style-name="Text_20_body">  *) Retour=0</text:p>
      <text:p text:style-name="Text_20_body">      ;;</text:p>
      <text:p text:style-name="Text_20_body">esac</text:p>
      <text:p text:style-name="Text_20_body">if [ "$Retour" = "0" ]; then</text:p>
      <text:p text:style-name="Text_20_body">   echo "$nom_pg : `date` : activation sauvebas OK sauvegarde de la base"</text:p>
      <text:p text:style-name="Text_20_body">else</text:p>
      <text:p text:style-name="Text_20_body">   echo "$nom_pg : `date` : Erreur $Retour lors de l'activation de sauvebas"</text:p>
      <text:p text:style-name="Text_20_body">   echo "\007"; # bip</text:p>
      <text:p text:style-name="Text_20_body">   exit 1</text:p>
      <text:p text:style-name="Text_20_body">fi</text:p>
      <text:p text:style-name="Text_20_body"> </text:p>
      <text:p text:style-name="Text_20_body">echo "Sauvegarde disque des fichiers sequentiels de type .seq? <text:span text:style-name="T14">(O/N) : \c"</text:span></text:p>
      <text:p text:style-name="P2">read repons</text:p>
      <text:p text:style-name="Text_20_body">case "$repons" in</text:p>
      <text:p text:style-name="Text_20_body">  O|o|OUI|oui) echo "$nom_pg: debut sauvegarde cpio disque des fichiers .seq";</text:p>
      <text:p text:style-name="Text_20_body">      <text:span text:style-name="T14">find $meteor/DSK -name "*.seq" -print | \</text:span></text:p>
      <text:p text:style-name="Text_20_body">        <text:span text:style-name="T14">cpio -ocvBdumx &gt; $DIR_SUP_SAUV/svg_seq 2&gt; $DIR_SUP_SAUV/svg_seq.log</text:span></text:p>
      <text:p text:style-name="Text_20_body">        compression seq</text:p>
      <text:p text:style-name="Text_20_body">    ;;</text:p>
      <text:p text:style-name="Text_20_body">  *) :</text:p>
      <text:p text:style-name="Text_20_body">    ;;</text:p>
      <text:p text:style-name="Text_20_body">esac</text:p>
      <text:p text:style-name="Text_20_body"> </text:p>
      <text:p text:style-name="Text_20_body">echo "Sauvegarde disque des fichiers files d'attente de type .fap? <text:span text:style-name="T14">(O/N) : \c"</text:span></text:p>
      <text:p text:style-name="P2">read repons</text:p>
      <text:p text:style-name="Text_20_body">case "$repons" in</text:p>
      <text:p text:style-name="Text_20_body">  O|o|OUI|oui) echo "$nom_pg: debut sauvegarde cpio disque des fichiers .fap";</text:p>
      <text:p text:style-name="Text_20_body">      <text:span text:style-name="T14">find $opr -name "*.fap" -print | \</text:span></text:p>
      <text:p text:style-name="Text_20_body">         <text:span text:style-name="T14">cpio -ocvBdumx &gt; $DIR_SUP_SAUV/svg_fap 2&gt; $DIR_SUP_SAUV/svg_fap.log</text:span></text:p>
      <text:p text:style-name="Text_20_body">         compression fap</text:p>
      <text:p text:style-name="Text_20_body">   ;;</text:p>
      <text:p text:style-name="Text_20_body"> *) :</text:p>
      <text:p text:style-name="Text_20_body">   ;;</text:p>
      <text:p text:style-name="Text_20_body">esac</text:p>
      <text:p text:style-name="Text_20_body"> </text:p>
      <text:p text:style-name="Text_20_body">echo "Sauvegarde disque des fichiers oscar de type .csv? <text:span text:style-name="T14">(O/N) : \c"</text:span></text:p>
      <text:p text:style-name="P2">read repons</text:p>
      <text:p text:style-name="Text_20_body">case "$repons" in</text:p>
      <text:p text:style-name="Text_20_body">  O|o|OUI|oui) echo "$nom_pg: debut sauvegarde cpio des fichiers .csv";</text:p>
      <text:p text:style-name="Text_20_body">    <text:span text:style-name="T14">find $opr/oscar  -print | \</text:span></text:p>
      <text:p text:style-name="Text_20_body">    <text:span text:style-name="T14">grep -E "k[0-2][0-9]|m[0-2][0-9]|p[0-2][0-9]|c[0-2][0-9]|g[0-2][0-9]" | \</text:span></text:p>
      <text:p text:style-name="Text_20_body">    <text:span text:style-name="T14">cpio -ocvBdumx &gt; $DIR_SUP_SAUV/svg_oscar 2&gt; $DIR_SUP_SAUV/svg_oscar.log</text:span></text:p>
      <text:p text:style-name="Text_20_body">    compression oscar</text:p>
      <text:p text:style-name="Text_20_body">   ;;</text:p>
      <text:p text:style-name="Text_20_body"> *) : ;;</text:p>
      <text:p text:style-name="Text_20_body"> esac</text:p>
      <text:p text:style-name="Text_20_body"> </text:p>
      <text:p text:style-name="Text_20_body">echo "Sauvegarde disque des fichiers ascii divers (type .fic)? <text:span text:style-name="T14">(O/N) : \c"</text:span></text:p>
      <text:p text:style-name="P2">read repons</text:p>
      <text:p text:style-name="Text_20_body">case "$repons" in</text:p>
      <text:p text:style-name="Text_20_body">  O|o|OUI|oui) echo "$nom_pg: debut sauvegarde disque fichiers ASCII textes ";</text:p>
      <text:p text:style-name="Text_20_body">     <text:span text:style-name="T14">find $meteor/DSK -print | egrep -v \</text:span></text:p>
      <text:p text:style-name="P2">"/oscar|/espace|/bin|\.fap|\.seq|\.idx|\.dat|\.st|\.iu|\.w|/fico|/old|/new|/TOTSEQ|/erresp|/errlem|/dech" |\</text:p>
      <text:p text:style-name="Text_20_body">       <text:span text:style-name="T14">cpio -ocvBdumx &gt; $DIR_SUP_SAUV/svg_fic 2&gt; $DIR_SUP_SAUV/svg_fic.log</text:span></text:p>
      <text:p text:style-name="Text_20_body">       compression fic</text:p>
      <text:p text:style-name="Text_20_body">   ;;</text:p>
      <text:p text:style-name="Text_20_body"> *) :</text:p>
      <text:p text:style-name="Text_20_body">   ;;</text:p>
      <text:p text:style-name="Text_20_body">esac</text:p>
      <text:p text:style-name="Text_20_body"> </text:p>
      <text:p text:style-name="Text_20_body">echo "$nom_pg: verification creation &amp; date des fichiers de sauvegarde disque:"</text:p>
      <text:p text:style-name="Text_20_body">echo "$nom_pg: (en general presence de 1 a 5 fichiers:"</text:p>
      <text:p text:style-name="Text_20_body">echo "$nom_pg: svg_projet svg_seq svg_fap svg_oscar svg_fic)"</text:p>
      <text:p text:style-name="Text_20_body">ls -l $DIR_SUP_SAUV/svg_*</text:p>
      <text:p text:style-name="Text_20_body"> </text:p>
      <text:p text:style-name="Text_20_body"> </text:p>
      <text:p text:style-name="Text_20_body">echo "Pour restaurer ces donnees sauvegardee sur disque -&gt;"</text:p>
      <text:p text:style-name="Text_20_body">echo "Vous devez ensuite lancer le script de restauration disque : \n"</text:p>
      <text:p text:style-name="P2">tput rev</text:p>
      <text:p text:style-name="P2">echo "RESTO_DSK_BASE_PROJET \n"</text:p>
      <text:p text:style-name="Text_20_body">tput sgr0</text:p>
      <text:p text:style-name="Text_20_body">echo "situe dans le repertoire: /appli/projet/data/scripts \n"</text:p>
      <text:p text:style-name="Text_20_body">echo "$nom_pg: Appelez maintenant le BT pour relancer la base, GOLD, minitel"</text:p>
      <text:p text:style-name="Text_20_body">echo "$nom_pg: et l'acces aux utilisateurs \n"</text:p>
      <text:p text:style-name="Text_20_body">echo "$nom_pg: FIN NORMALE de la sauvegarde disque des donnees de PROJET"</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6"/>41<text:span text:style-name="T1">     </text:span>Exemple de script de savegarde sur bande par « ufsdump » (SUN) </text:h>
      <text:p text:style-name="P12"> </text:p>
      <text:p text:style-name="P12"> </text:p>
      <text:p text:style-name="Text_20_body">#@(#) Sauvegarde de tous les disques avec base stoppee, par ‘ufsdump’.</text:p>
      <text:p text:style-name="P3"># BL : 99/01/26</text:p>
      <text:p text:style-name="Text_20_body"> </text:p>
      <text:p text:style-name="P3">PATH=$PATH:/usr/sbin:/usr/bin:/usr/openwin/bin:/usr/local/bin:/etc:/usr/ccs/bin:.</text:p>
      <text:p text:style-name="P3">PATH=$PATH:/usr/sbin:/usr/bin:/usr/ucb:/logiciel/pgo:.:/usr/platform/sun4u/sbin:</text:p>
      <text:p text:style-name="P2">export PATH</text:p>
      <text:p text:style-name="Text_20_body"> </text:p>
      <text:p text:style-name="P2">DATE=`date '+%d/%m/%y %H:%M'`</text:p>
      <text:p text:style-name="P2">LOG=/var/log/SAUV_TOT_AN2M.log`date +%w`</text:p>
      <text:p text:style-name="Text_20_body"> </text:p>
      <text:p text:style-name="P2"># arret base </text:p>
      <text:p text:style-name="P2">echo "$DATE \n" &gt; $LOG</text:p>
      <text:p text:style-name="P2">#su - oracle -c "stop_bd ALUR" &gt;&gt; $LOG</text:p>
      <text:p text:style-name="Text_20_body"> </text:p>
      <text:p text:style-name="P2">cd /</text:p>
      <text:p text:style-name="Text_20_body"> </text:p>
      <text:p text:style-name="P2">for part in \</text:p>
      <text:p text:style-name="P2">`df -k | grep -v Mounted|grep -v /proc|grep -v /dev/fd|grep -v swap|awk '{print $6}'`</text:p>
      <text:p text:style-name="Text_20_body">do</text:p>
      <text:p text:style-name="Text_20_body">  echo "debut sauvegarde partition : $part"</text:p>
      <text:p text:style-name="Text_20_body">  /usr/lib/fs/ufs/ufsdump 0uf /dev/rmt/0mn $part 2&gt;&gt; $LOG</text:p>
      <text:p text:style-name="Text_20_body">  echo "fin sauvegarde partition $part : $?"</text:p>
      <text:p text:style-name="Text_20_body">done</text:p>
      <text:p text:style-name="Text_20_body"> </text:p>
      <text:p text:style-name="Text_20_body">echo "\n\t #############################################################" &gt;&gt;$LOG</text:p>
      <text:p text:style-name="Text_20_body">DATE=`date '+%d/%m/%y %H:%M'`</text:p>
      <text:p text:style-name="Text_20_body">echo "\n\n$DATE \n" &gt;&gt; $LOG</text:p>
      <text:p text:style-name="Text_20_body"> </text:p>
      <text:p text:style-name="Text_20_body">#relance base </text:p>
      <text:p text:style-name="Text_20_body">#su - oracle -c "start_bd ALUR" &gt;&gt; $LOG</text:p>
      <text:p text:style-name="Text_20_body"> </text:p>
      <text:p text:style-name="P2"># rembobiner</text:p>
      <text:p text:style-name="P2">mt -f /dev/rmt/0m rew</text:p>
      <text:p text:style-name="Text_20_body"> </text:p>
      <text:p text:style-name="Text_20_body">echo "fin de sauvegarde journaliere: `date`"</text:p>
      <text:p text:style-name="P12"> </text:p>
      <text:p text:style-name="P13">#&gt;&gt;&gt;&gt;&gt;&gt;&gt;&gt;&gt;&gt;&gt;&gt;&gt;&gt;&gt;&gt;&gt;&gt;&gt;&gt;&gt;&gt;&gt;&gt;&gt;&gt;&gt;&gt;&gt;&gt;&gt;&gt;&gt;&gt;&gt;&gt;&gt;&gt;&gt;&gt;&gt;&gt;&gt;&gt;&gt;&gt;&gt;&gt;&gt;&gt;&gt;&gt;&gt;&gt;&gt;&gt;&gt;&gt;&gt;&gt;&gt;&gt;&gt;&gt;&gt;&gt;&gt;&gt;&gt;&gt;&gt;&gt;&gt;&gt;&gt;&gt;&gt;&gt;&gt;&gt;</text:p>
      <text:p text:style-name="P18"> </text:p>
      <text:h text:style-name="P22" text:outline-level="1"><text:bookmark text:name="_Toc89775627"/><text:span text:style-name="T7">42</text:span><text:span text:style-name="T2">      </text:span>Exemple de script de savegarde sur bande par « fbackup » </text:h>
      <text:p text:style-name="P12"> </text:p>
      <text:p text:style-name="Text_20_body">#!/bin/ksh</text:p>
      <text:p text:style-name="Text_20_body">#-----------------------------------------------------------------------------</text:p>
      <text:p text:style-name="Text_20_body"># @(#) SAUVE_JOUR_BANDE</text:p>
      <text:p text:style-name="Text_20_body"># Type / Type    : job shell (UNIX)                                           </text:p>
      <text:p text:style-name="Text_20_body"># But / Aim      : sauvegarde journaliere par fbackup avec arret des bases ORACLE</text:p>
      <text:p text:style-name="Text_20_body"># Auteur / Author: Benjamin LISAN  -&gt;    date creation:  01-AUG-90            </text:p>
      <text:p text:style-name="Text_20_body"># Usage / Usage  : SAUVE_JOUR_BANDE</text:p>
      <text:p text:style-name="Text_20_body"># utilise par le : cron</text:p>
      <text:p text:style-name="Text_20_body">#-----------------------------------------------------------------------------</text:p>
      <text:p text:style-name="Text_20_body">PATHORA=/logiciel/oracle</text:p>
      <text:p text:style-name="Text_20_body"> </text:p>
      <text:p text:style-name="Text_20_body"># arret des bases</text:p>
      <text:p text:style-name="P2">for SID in `ps -ef|grep "ora_pmon"|grep -v grep|sed "s:.*ora_pmon_::"|grep -v "::"`</text:p>
      <text:p text:style-name="P2">do</text:p>
      <text:p text:style-name="Text_20_body">      <text:span text:style-name="T14">/usr/bin/su - oracle -c "$PATHORA/stop_bd $SID &lt; /dev/null"</text:span></text:p>
      <text:p text:style-name="P2">done</text:p>
      <text:p text:style-name="Text_20_body"> </text:p>
      <text:p text:style-name="P2">/usr/sam/lbin/br_backup DAT FULL Y /dev/rmt/0m /etc/sam/br/graphDCAa06056 root Y 1 N &gt; \</text:p>
      <text:p text:style-name="Text_20_body">        <text:span text:style-name="T14">/var/tmp/SAM_br_msgs 2&gt;&amp;1 #sambackup</text:span></text:p>
      <text:p text:style-name="Text_20_body"> </text:p>
      <text:p text:style-name="P2"># relance des bases</text:p>
      <text:p text:style-name="P2">for SID in `cat /etc/oratab | cut -f1 -d:`</text:p>
      <text:p text:style-name="P2">do</text:p>
      <text:p text:style-name="Text_20_body">      <text:span text:style-name="T14">/usr/bin/su - oracle -c "$PATHORA/start_bd $SID &lt; /dev/null"</text:span></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8"/>43<text:span text:style-name="T1">     </text:span>Exemple de script de savegarde sur bande par « cpio » (SUN)</text:h>
      <text:p text:style-name="P12"> </text:p>
      <text:p text:style-name="P12"> </text:p>
      <text:p text:style-name="Text_20_body">#!/bin/sh</text:p>
      <text:p text:style-name="Text_20_body"># -------------------------------------------------------------</text:p>
      <text:p text:style-name="Text_20_body"># script : SAUVE_JOUR_BANDE   Auteur : BL   Date : 20/08/98</text:p>
      <text:p text:style-name="Text_20_body"># but : sauvegarde journaliere de la machine SUN SUN1 par cpio</text:p>
      <text:p text:style-name="Text_20_body"># s donnees modifiees par les utilisateurs (sources...)</text:p>
      <text:p text:style-name="Text_20_body"># -------------------------------------------------------------</text:p>
      <text:p text:style-name="Text_20_body"># BL 21/10/99 : sauvegarde en mode compressee</text:p>
      <text:p text:style-name="Text_20_body"># -------------------------------------------------------------</text:p>
      <text:p text:style-name="Text_20_body">dat=`date '+ %Y%m%d'`</text:p>
      <text:p text:style-name="P2">export dat</text:p>
      <text:p text:style-name="P2">hr=`date '+ %H:%M'`</text:p>
      <text:p text:style-name="P2">ficsav=/tmp/ls_fic_sav</text:p>
      <text:p text:style-name="P2">logsauv=/var/adm/log/sauvj$$</text:p>
      <text:p text:style-name="P2">echo "$dat$hr" &gt; /tmp/pseudolabel</text:p>
      <text:p text:style-name="Text_20_body"> </text:p>
      <text:p text:style-name="P2">echo "debut sauveg.journ.du $dat a $hr sur `hostname`"| tee -a $logsauv</text:p>
      <text:p text:style-name="P2">mt rew</text:p>
      <text:p text:style-name="Text_20_body"> </text:p>
      <text:p text:style-name="Text_20_body"># arret de toutes les bases ORACLE</text:p>
      <text:p text:style-name="Text_20_body">su - oracle -c 'arret_toutes_bases'</text:p>
      <text:p text:style-name="Text_20_body"> </text:p>
      <text:p text:style-name="P2">cd /</text:p>
      <text:p text:style-name="P2">ls /tmp/pseudolabel                                          &gt;  $ficsav</text:p>
      <text:p text:style-name="P2">ls /datapil_1/admin/login.txt                                &gt;&gt; $ficsav</text:p>
      <text:p text:style-name="P2">find /pilot/version_encours/config                           &gt;&gt; $ficsav</text:p>
      <text:p text:style-name="P2">find /datapil/data1/base???                                  &gt;&gt; $ficsav</text:p>
      <text:p text:style-name="P2">find /etc/rc0.d                                              &gt;&gt; $ficsav</text:p>
      <text:p text:style-name="P2">find /etc/rc1.d                                              &gt;&gt; $ficsav</text:p>
      <text:p text:style-name="P2">find /etc/rc3.d                                              &gt;&gt; $ficsav</text:p>
      <text:p text:style-name="P2">find /etc/rcS.d                                              &gt;&gt; $ficsav</text:p>
      <text:p text:style-name="P2">find /usr/local/bin                                          &gt;&gt; $ficsav</text:p>
      <text:p text:style-name="Text_20_body"># 12/10/98 : lignes rajoutees a la demande de Rene Goselin </text:p>
      <text:p text:style-name="P2">find /intg/commun                                            &gt;&gt; $ficsav</text:p>
      <text:p text:style-name="P2">find /intg/piloarc                                           &gt;&gt; $ficsav</text:p>
      <text:p text:style-name="Text_20_body"># 20/07/99 : lignes rajoutees a la demande de Pierre Giron</text:p>
      <text:p text:style-name="Text_20_body">find /intg/saphir/version_encours                            &gt;&gt; $ficsav</text:p>
      <text:p text:style-name="Text_20_body"># 20/07/99 : lignes rajoutees a la demande de Joelle Melzassard</text:p>
      <text:p text:style-name="P2">find /intg/capa/sources_V1.4                                 &gt;&gt; $ficsav</text:p>
      <text:p text:style-name="P2">#find /intg/capa/include_V1.4                                 &gt;&gt; $ficsav</text:p>
      <text:p text:style-name="P2">find /intg/capa/oracle_C                                     &gt;&gt; $ficsav</text:p>
      <text:p text:style-name="P2">find /logiciel/oracle/oracle_C/create_tables                 &gt;&gt; $ficsav</text:p>
      <text:p text:style-name="Text_20_body"> </text:p>
      <text:p text:style-name="P2">find /logiciel/tuxedo | grep "tuxedo_" |grep -v "tuxedo_v5" |\</text:p>
      <text:p text:style-name="Text_20_body">  <text:span text:style-name="T14">grep -v "ULOG" | grep -v "ulog_pil"                        &gt;&gt; $ficsav</text:span></text:p>
      <text:p text:style-name="Text_20_body"> </text:p>
      <text:p text:style-name="Text_20_body"># 12/10/98 : lignes rajoutees a la demande de Alain Benichou</text:p>
      <text:p text:style-name="P2">find /intg|grep "carn..."|grep -v "/exe/"|grep -v "/objets/"|\</text:p>
      <text:p text:style-name="Text_20_body">  <text:span text:style-name="T14">grep -v "/lib/"|grep -v ".a"|grep -v ".ln"|grep -v ".pure" &gt;&gt; $ficsav</text:span></text:p>
      <text:p text:style-name="Text_20_body"> </text:p>
      <text:p text:style-name="Text_20_body"> </text:p>
      <text:p text:style-name="Text_20_body">sleep 2</text:p>
      <text:p text:style-name="Text_20_body"># BL 21/10/99 : sauvegarde en mode compressee</text:p>
      <text:p text:style-name="Text_20_body">cat $ficsav   | cpio -ocBdum &gt; /dev/rmt/0c</text:p>
      <text:p text:style-name="P2">Retour=$?</text:p>
      <text:p text:style-name="Text_20_body"> </text:p>
      <text:p text:style-name="P2">if [ "$Retour" = "0" ]</text:p>
      <text:p text:style-name="P2">then</text:p>
      <text:p text:style-name="Text_20_body">    echo "Fin Sauveg.`hostname` (Retour=$Retour) Relec.bande"|tee -a $logsauv</text:p>
      <text:p text:style-name="Text_20_body">    <text:span text:style-name="T14">head -2 $logsauv</text:span></text:p>
      <text:p text:style-name="Text_20_body">    <text:span text:style-name="T14">sleep 5</text:span></text:p>
      <text:p text:style-name="Text_20_body">    # BL 21/10/99 : sauvegarde en mode compressee</text:p>
      <text:p text:style-name="Text_20_body">    cpio -icvB /tmp/pseudolabel  &lt; /dev/rmt/0c</text:p>
      <text:p text:style-name="Text_20_body">    mt rew</text:p>
      <text:p text:style-name="Text_20_body">    echo "fin sauveg.jour.du $dat a $hr sur `hostname`"| tee -a $logsauv</text:p>
      <text:p text:style-name="Text_20_body">else</text:p>
      <text:p text:style-name="Text_20_body">    echo "Err. Sauveg.`hostname`: code retour=$Retour"|tee -a $logsauv</text:p>
      <text:p text:style-name="Text_20_body">fi</text:p>
      <text:p text:style-name="Text_20_body"> </text:p>
      <text:p text:style-name="Text_20_body"># relance des bases ORACLE qui etaient lances avant la sauvegarde</text:p>
      <text:p text:style-name="Text_20_body">su - oracle -c 'relance_des_bases'</text:p>
      <text:p text:style-name="Text_20_body"> </text:p>
      <text:p text:style-name="Text_20_body"># nettoyage des fichiers log</text:p>
      <text:p text:style-name="P2">find /var/adm/log -name "sauvj*" -mtime +7 -exec rm {} \;</text:p>
      <text:p text:style-name="P12"> </text:p>
      <text:p text:style-name="P13">#&gt;&gt;&gt;&gt;&gt;&gt;&gt;&gt;&gt;&gt;&gt;&gt;&gt;&gt;&gt;&gt;&gt;&gt;&gt;&gt;&gt;&gt;&gt;&gt;&gt;&gt;&gt;&gt;&gt;&gt;&gt;&gt;&gt;&gt;&gt;&gt;&gt;&gt;&gt;&gt;&gt;&gt;&gt;&gt;&gt;&gt;&gt;&gt;&gt;&gt;&gt;&gt;&gt;&gt;&gt;&gt;&gt;&gt;&gt;&gt;&gt;&gt;&gt;&gt;&gt;&gt;&gt;&gt;&gt;&gt;&gt;&gt;&gt;&gt;&gt;&gt;&gt;&gt;&gt;&gt;</text:p>
      <text:p text:style-name="P12"> </text:p>
      <text:p text:style-name="Text_20_body">#!/bin/sh</text:p>
      <text:p text:style-name="Text_20_body"># -------------------------------------------------------------</text:p>
      <text:p text:style-name="Text_20_body"># script : SAUVE_JOUR_CPIO_SUN1   Auteur : BL   Date : 20/08/98</text:p>
      <text:p text:style-name="Text_20_body"># but : sauvegarde journaliere de la machine SUN SUN1 par cpio</text:p>
      <text:p text:style-name="Text_20_body"># s donnees modifiees par les utilisateurs (sources...)</text:p>
      <text:p text:style-name="Text_20_body"># -------------------------------------------------------------</text:p>
      <text:p text:style-name="Text_20_body"># BL 12/10/98 : 2 lignes rajoutees a la demande de Rene Goselin </text:p>
      <text:p text:style-name="Text_20_body"># BL 21/10/99 : sauvegarde en mode compressee</text:p>
      <text:p text:style-name="Text_20_body"># -------------------------------------------------------------</text:p>
      <text:p text:style-name="Text_20_body">dat=`date '+ %Y%m%d'`</text:p>
      <text:p text:style-name="P2">export dat</text:p>
      <text:p text:style-name="P2">hr=`date '+ %H:%M'`</text:p>
      <text:p text:style-name="P2">ficsav=/tmp/ls_fic_sav</text:p>
      <text:p text:style-name="P2">logsauv=/var/adm/log/sauvj$$</text:p>
      <text:p text:style-name="P2">echo "$dat$hr" &gt; /tmp/pseudolabel</text:p>
      <text:p text:style-name="Text_20_body"> </text:p>
      <text:p text:style-name="Text_20_body">echo "debut sauveg.journ.du $dat a $hr sur `uname -n`"| tee -a $logsauv</text:p>
      <text:p text:style-name="Text_20_body">mt rew</text:p>
      <text:p text:style-name="Text_20_body"> </text:p>
      <text:p text:style-name="Text_20_body"># arret de toutes les bases ORACLE</text:p>
      <text:p text:style-name="Text_20_body"># BL 12/1/2000 : en commentaire car suppres.ORACLE sur SUN1 le 4/1/2000</text:p>
      <text:p text:style-name="Text_20_body">#su - oracle -c 'arret_toutes_bases'</text:p>
      <text:p text:style-name="Text_20_body"> </text:p>
      <text:p text:style-name="P2">cd /</text:p>
      <text:p text:style-name="P2">ls /tmp/pseudolabel                                          &gt;  $ficsav</text:p>
      <text:p text:style-name="P2">ls /datapil_1/admin/login.txt                                &gt;&gt; $ficsav</text:p>
      <text:p text:style-name="P2">find /pilot/version_encours/config                           &gt;&gt; $ficsav</text:p>
      <text:p text:style-name="P2">find /datapil/data1/base???                                  &gt;&gt; $ficsav</text:p>
      <text:p text:style-name="P2">find /etc/rc0.d                                              &gt;&gt; $ficsav</text:p>
      <text:p text:style-name="P2">find /etc/rc1.d                                              &gt;&gt; $ficsav</text:p>
      <text:p text:style-name="P2">find /etc/rc3.d                                              &gt;&gt; $ficsav</text:p>
      <text:p text:style-name="P2">find /etc/rcS.d                                              &gt;&gt; $ficsav</text:p>
      <text:p text:style-name="P2">find /usr/local/bin                                          &gt;&gt; $ficsav</text:p>
      <text:p text:style-name="Text_20_body"># 12/10/98 : lignes rajoutees a la demande de Rene Goselin </text:p>
      <text:p text:style-name="P2">find /intg/commun                                            &gt;&gt; $ficsav</text:p>
      <text:p text:style-name="P2">find /intg/piloarc                                           &gt;&gt; $ficsav</text:p>
      <text:p text:style-name="Text_20_body"># 20/07/99 : lignes rajoutees a la demande de Pierre Giron</text:p>
      <text:p text:style-name="Text_20_body">find /intg/saphir/version_encours                            &gt;&gt; $ficsav</text:p>
      <text:p text:style-name="Text_20_body"># 20/07/99 : lignes rajoutees a la demande de Joelle Melzassard</text:p>
      <text:p text:style-name="P2">find /intg/capa/sources_V1.4                                 &gt;&gt; $ficsav</text:p>
      <text:p text:style-name="P2">#find /intg/capa/include_V1.4                                 &gt;&gt; $ficsav</text:p>
      <text:p text:style-name="P2">find /intg/capa/oracle_C                                     &gt;&gt; $ficsav</text:p>
      <text:p text:style-name="P2">find /logiciel/oracle/oracle_C/create_tables                 &gt;&gt; $ficsav</text:p>
      <text:p text:style-name="Text_20_body"> </text:p>
      <text:p text:style-name="P2">find /logiciel/tuxedo | grep "tuxedo_" |grep -v "tuxedo_v5" |\</text:p>
      <text:p text:style-name="Text_20_body">  <text:span text:style-name="T14">grep -v "ULOG" | grep -v "ulog_pil"                        &gt;&gt; $ficsav</text:span></text:p>
      <text:p text:style-name="Text_20_body"> </text:p>
      <text:p text:style-name="Text_20_body"># 12/10/98 : lignes rajoutees a la demande de Alain Benichou</text:p>
      <text:p text:style-name="P2">find /intg|grep "carn..."|grep -v "/exe/"|grep -v "/objets/"|\</text:p>
      <text:p text:style-name="Text_20_body"> <text:span text:style-name="T14">grep -v "/lib/"|grep -v "\.a"|grep -v "\.ln"|grep -v "\.pure" &gt;&gt; $ficsav</text:span></text:p>
      <text:p text:style-name="Text_20_body"> </text:p>
      <text:p text:style-name="Text_20_body"> </text:p>
      <text:p text:style-name="Text_20_body">sleep 2</text:p>
      <text:p text:style-name="Text_20_body"># BL 21/10/99 : sauvegarde en mode compressee</text:p>
      <text:p text:style-name="Text_20_body">mt rew</text:p>
      <text:p text:style-name="Text_20_body">Retour=$?</text:p>
      <text:p text:style-name="Text_20_body">if [ "$Retour" != "0" ]</text:p>
      <text:p text:style-name="Text_20_body">then</text:p>
      <text:p text:style-name="Text_20_body">    echo "`uname -n` pb au rembob de la bande : $Retour"|tee -a $logsauv</text:p>
      <text:p text:style-name="Text_20_body">fi</text:p>
      <text:p text:style-name="Text_20_body"># debut de la sauvegarde sur bande</text:p>
      <text:p text:style-name="Text_20_body">cat $ficsav   | cpio -ocBdum &gt; /dev/rmt/0c</text:p>
      <text:p text:style-name="P2">Retour=$?</text:p>
      <text:p text:style-name="Text_20_body"> </text:p>
      <text:p text:style-name="P2">if [ "$Retour" = "0" ]</text:p>
      <text:p text:style-name="P2">then</text:p>
      <text:p text:style-name="Text_20_body">    echo "Fin Sauveg.`uname -n` (Retour=$Retour) Relec.bande"|tee -a $logsauv</text:p>
      <text:p text:style-name="Text_20_body">    <text:span text:style-name="T14">head -2 $logsauv</text:span></text:p>
      <text:p text:style-name="Text_20_body">    <text:span text:style-name="T14">sleep 5</text:span></text:p>
      <text:p text:style-name="Text_20_body">    # BL 21/10/99 : sauvegarde en mode compressee</text:p>
      <text:p text:style-name="Text_20_body">    cpio -icvBdum "/tmp/pseudolabel"  &lt; /dev/rmt/0c</text:p>
      <text:p text:style-name="Text_20_body">    dat=`date '+ %Y%m%d'`</text:p>
      <text:p text:style-name="Text_20_body">    <text:span text:style-name="T14">hr=`date '+ %H:%M'`</text:span></text:p>
      <text:p text:style-name="Text_20_body">    echo "fin sauveg.jour.du $dat a $hr sur `uname -n`"| tee -a $logsauv</text:p>
      <text:p text:style-name="P2">else</text:p>
      <text:p text:style-name="Text_20_body">    <text:span text:style-name="T14">echo "Err. </text:span>Sauveg.`uname -n`: code retour=$Retour"|tee -a $logsauv</text:p>
      <text:p text:style-name="Text_20_body">fi</text:p>
      <text:p text:style-name="Text_20_body">mt rew</text:p>
      <text:p text:style-name="Text_20_body"> </text:p>
      <text:p text:style-name="Text_20_body"># relance des bases ORACLE qui etaient lances avant la sauvegarde</text:p>
      <text:p text:style-name="Text_20_body"># BL 12/1/2000 : en commentaire car suppres.ORACLE sur SUN1 le 4/1/2000</text:p>
      <text:p text:style-name="Text_20_body">#su - oracle -c 'relance_des_bases'</text:p>
      <text:p text:style-name="Text_20_body"> </text:p>
      <text:p text:style-name="Text_20_body"># nettoyage des fichiers log</text:p>
      <text:p text:style-name="P2">find /var/adm/log -name "sauvj*" -mtime +7 -exec rm {} \;</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29"/>44<text:span text:style-name="T1">     </text:span>Exemple de script de savegarde sur bande par « ufsdump » (SUN)</text:h>
      <text:p text:style-name="Text_20_body"> </text:p>
      <text:p text:style-name="Text_20_body">#!/sbin/sh</text:p>
      <text:p text:style-name="Text_20_body">#@(#) Sauvegarde journalieres des disques contenant des datas</text:p>
      <text:p text:style-name="Text_20_body">#-----------------------------------------------------------------------------</text:p>
      <text:p text:style-name="Text_20_body"># @(#) SAUVE_JOUR_UFS_SUN1</text:p>
      <text:p text:style-name="Text_20_body"># Nom / Name     : SAUVE_JOUR_UFS_SUN1</text:p>
      <text:p text:style-name="P2"># Type / Type    : job shell (UNIX)                                           </text:p>
      <text:p text:style-name="Text_20_body"># But / Aim      : sauvegarde journaliere par ufsdump avec arret bases ORACLE</text:p>
      <text:p text:style-name="Text_20_body"># Auteur / Author: Benjamin LISAN  date creation:  05/01/2000</text:p>
      <text:p text:style-name="Text_20_body">#                                                                             </text:p>
      <text:p text:style-name="Text_20_body"># Usage / Usage  : SAUVE_JOUR_UFS_SUN1</text:p>
      <text:p text:style-name="Text_20_body"># Exemple / Ex.  : "SAUVE_JOUR_UFS_SUN1"                                           </text:p>
      <text:p text:style-name="Text_20_body"># Contexte / Co. : cron</text:p>
      <text:p text:style-name="Text_20_body"># Commentaires   : version pour Solaris 2.6 et &gt; pour SUN1</text:p>
      <text:p text:style-name="Text_20_body"># Modif. : BL: 11/01/99: on sauv.que les data</text:p>
      <text:p text:style-name="Text_20_body"># Modif. : BL: 05/01/00: on change le systeme d'arret/relance des bases</text:p>
      <text:p text:style-name="Text_20_body">#             on supprime les arret/relances par les commandes du type :</text:p>
      <text:p text:style-name="Text_20_body">#             su - oracle -c "export ORACLE_SID=MIDV;stop_bd MIDV"|tee -a $LOG</text:p>
      <text:p text:style-name="Text_20_body">#-----------------------------------------------------------------------------</text:p>
      <text:p text:style-name="Text_20_body">#ajout BL:99/01/26:car manque les chemins pour lancer les cde unix tels qu'uname...</text:p>
      <text:p text:style-name="P3">PATH=$PATH:/usr/sbin:/usr/bin:/usr/openwin/bin:/usr/local/bin:/etc:/usr/ccs/bin:.</text:p>
      <text:p text:style-name="P2">PATH=$PATH:/users/pgo</text:p>
      <text:p text:style-name="P2">export PATH</text:p>
      <text:p text:style-name="Text_20_body"> </text:p>
      <text:p text:style-name="P2">DATE=`date '+%d/%m/%y %H:%M'`</text:p>
      <text:p text:style-name="P2">LOG=/users/manager/log/dump0.log`date +%w`</text:p>
      <text:p text:style-name="P2">echo "$DATE debut sauvegarde \n" &gt; $LOG</text:p>
      <text:p text:style-name="Text_20_body"> </text:p>
      <text:p text:style-name="Text_20_body"># arret de toutes les  bases ORACLE</text:p>
      <text:p text:style-name="Text_20_body">su - oracle -c 'arret_toutes_bases'</text:p>
      <text:p text:style-name="Text_20_body"> </text:p>
      <text:p text:style-name="P2"># rembobiner</text:p>
      <text:p text:style-name="P2">mt -f /dev/rmt/0m rew</text:p>
      <text:p text:style-name="Text_20_body"> </text:p>
      <text:p text:style-name="P2"># sauvegarde ufsdump</text:p>
      <text:p text:style-name="Text_20_body"> <text:span text:style-name="T14">/usr/sbin/ufsdump 0uf /dev/rmt/0c /dev/dsk/c0t2d0s0   1&gt;&gt; $LOG 2&gt;&gt; $LOG# /datapil</text:span></text:p>
      <text:p text:style-name="Text_20_body"> <text:span text:style-name="T14">/usr/sbin/ufsdump 0uf /dev/rmt/0c /dev/dsk/c0t1d0s0   1&gt;&gt; $LOG 2&gt;&gt; $LOG# /home</text:span></text:p>
      <text:p text:style-name="Text_20_body"> <text:span text:style-name="T14">/usr/sbin/ufsdump 0uf /dev/rmt/0c /dev/dsk/c0t11d0s7  1&gt;&gt; $LOG 2&gt;&gt; $LOG# /intg</text:span></text:p>
      <text:p text:style-name="P2">cat $LOG</text:p>
      <text:p text:style-name="Text_20_body"> </text:p>
      <text:p text:style-name="P2">mt -f /dev/rmt/0m rew</text:p>
      <text:p text:style-name="Text_20_body"> </text:p>
      <text:p text:style-name="P2">echo "\n\t #############################################################"  | tee -a $LOG</text:p>
      <text:p text:style-name="Text_20_body">DATE=`date '+%d/%m/%y %H:%M'`</text:p>
      <text:p text:style-name="Text_20_body">echo "\n\n$DATE fin sauvegarde \n" &gt;&gt;  $LOG</text:p>
      <text:p text:style-name="Text_20_body"> </text:p>
      <text:p text:style-name="Text_20_body">#relance de toutes les bases</text:p>
      <text:p text:style-name="Text_20_body">su - oracle -c 'relance_des_bases'</text:p>
      <text:p text:style-name="Text_20_body"> </text:p>
      <text:p text:style-name="Text_20_body"> </text:p>
      <text:p text:style-name="Text_20_body">echo "`basename $0` fin sauvegarde journaliere du `date '+%d/%m/%Y'`"</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30"/>45<text:span text:style-name="T1">     </text:span>Exemple de script de savegarde de la partie système sur bande par « cpio » (SUN)</text:h>
      <text:p text:style-name="Text_20_body"> </text:p>
      <text:p text:style-name="Text_20_body"># ----------------------------------------------------------------------</text:p>
      <text:p text:style-name="Text_20_body"># script : SAUVE_SYS_BANDE   Auteur : BL   Date : 20/08/98</text:p>
      <text:p text:style-name="Text_20_body"># but : sauvegarde la partie systeme de la machine SUN SUN1 par cpio</text:p>
      <text:p text:style-name="Text_20_body"># ----------------------------------------------------------------------</text:p>
      <text:p text:style-name="Text_20_body">echo "Debut sauvegarde systeme du `date` sur `hostname` sur bande"</text:p>
      <text:p text:style-name="P2">mt rew</text:p>
      <text:p text:style-name="P2">find /dev      &gt;  /tmp/ls_fic_to_sav</text:p>
      <text:p text:style-name="P2">find /devices  &gt;&gt; /tmp/ls_fic_to_sav</text:p>
      <text:p text:style-name="P2">find /etc      &gt;&gt; /tmp/ls_fic_to_sav</text:p>
      <text:p text:style-name="P2">find /home     &gt;&gt; /tmp/ls_fic_to_sav</text:p>
      <text:p text:style-name="P2">find /intg     &gt;&gt; /tmp/ls_fic_to_sav</text:p>
      <text:p text:style-name="P2">find /kernel   &gt;&gt; /tmp/ls_fic_to_sav</text:p>
      <text:p text:style-name="P2">find /logiciel &gt;&gt; /tmp/ls_fic_to_sav</text:p>
      <text:p text:style-name="P2">find /opt      &gt;&gt; /tmp/ls_fic_to_sav</text:p>
      <text:p text:style-name="P2">find /sbin     &gt;&gt; /tmp/ls_fic_to_sav</text:p>
      <text:p text:style-name="P2">find /usr      &gt;&gt; /tmp/ls_fic_to_sav</text:p>
      <text:p text:style-name="P2">find /var      &gt;&gt; /tmp/ls_fic_to_sav</text:p>
      <text:p text:style-name="P2">cat /tmp/ls_fic_to_sav | cpio -ocvBdum &gt; /dev/rmt/0m </text:p>
      <text:p text:style-name="Text_20_body"> </text:p>
      <text:p text:style-name="Text_20_body">echo "Test de relecture de la bande"</text:p>
      <text:p text:style-name="Text_20_body">sleep 2</text:p>
      <text:p text:style-name="Text_20_body">cpio -icvtB /etc/inittab &lt; /dev/rmt/0m</text:p>
      <text:p text:style-name="Text_20_body">echo "Fin sauvegarde systeme du `date` sur `hostname` sur band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31"/>46<text:span text:style-name="T1">     </text:span>Exemple de script de savegarde de la partie système sur bande par « cpio » (HP)</text:h>
      <text:p text:style-name="Text_20_body"> </text:p>
      <text:p text:style-name="Text_20_body"># ----------------------------------------------------------------------</text:p>
      <text:p text:style-name="Text_20_body"># script : SAUVE_SYS_TAPE HP   Auteur : BL   Date : 20/08/98</text:p>
      <text:p text:style-name="Text_20_body"># but : sauvegarde la partie systeme de la machine par cpio</text:p>
      <text:p text:style-name="P2"># ----------------------------------------------------------------------</text:p>
      <text:p text:style-name="P2">rm -f /tmp/ls_fic_a_sauv 2&gt; /dev/null</text:p>
      <text:p text:style-name="P2">mt rew</text:p>
      <text:p text:style-name="P2">ls /.dtprofile &gt;&gt; /tmp/ls_fic_a_sauv</text:p>
      <text:p text:style-name="P2">ls /.kshrc &gt;&gt; /tmp/ls_fic_a_sauv</text:p>
      <text:p text:style-name="P2">ls /.profile &gt;&gt; /tmp/ls_fic_a_sauv</text:p>
      <text:p text:style-name="P2">ls /.rhosts &gt;&gt; /tmp/ls_fic_a_sauv</text:p>
      <text:p text:style-name="P2">ls /.sh_history &gt;&gt; /tmp/ls_fic_a_sauv</text:p>
      <text:p text:style-name="P2">ls /.vueprofile &gt;&gt; /tmp/ls_fic_a_sauv</text:p>
      <text:p text:style-name="P2">ls /.x11startlog &gt;&gt; /tmp/ls_fic_a_sauv</text:p>
      <text:p text:style-name="Text_20_body"> </text:p>
      <text:p text:style-name="P2">find /.softbench &gt;&gt; /tmp/ls_fic_a_sauv</text:p>
      <text:p text:style-name="P2">find /.sw      &gt;&gt; /tmp/ls_fic_a_sauv</text:p>
      <text:p text:style-name="P2">find /.vue     &gt;&gt; /tmp/ls_fic_a_sauv</text:p>
      <text:p text:style-name="P2">find /dev      &gt;&gt; /tmp/ls_fic_a_sauv</text:p>
      <text:p text:style-name="P2">find /etc      &gt;&gt; /tmp/ls_fic_a_sauv</text:p>
      <text:p text:style-name="P2">find /extra    &gt;&gt; /tmp/ls_fic_a_sauv</text:p>
      <text:p text:style-name="P2">find /home     &gt;&gt; /tmp/ls_fic_a_sauv</text:p>
      <text:p text:style-name="P2">find /logiciel &gt;&gt; /tmp/ls_fic_a_sauv</text:p>
      <text:p text:style-name="P2">find /opt      &gt;&gt; /tmp/ls_fic_a_sauv</text:p>
      <text:p text:style-name="P2">find /sbin     &gt;&gt; /tmp/ls_fic_a_sauv</text:p>
      <text:p text:style-name="P2">find /stand    &gt;&gt; /tmp/ls_fic_a_sauv</text:p>
      <text:p text:style-name="P2">find /usr      &gt;&gt; /tmp/ls_fic_a_sauv</text:p>
      <text:p text:style-name="P2">find /var      &gt;&gt; /tmp/ls_fic_a_sauv</text:p>
      <text:p text:style-name="Text_20_body">echo "debut sauvegarde sur BANDE"</text:p>
      <text:p text:style-name="P2">cat /tmp/ls_fic_a_sauv | cpio -ocvBdum &gt; /dev/rmt/0m</text:p>
      <text:p text:style-name="Text_20_body"> </text:p>
      <text:p text:style-name="Text_20_body">echo "fin sauvegarde sur BANDE"</text:p>
      <text:p text:style-name="Text_20_body">echo "Test de relecture de la bande"</text:p>
      <text:p text:style-name="Text_20_body">sleep 2</text:p>
      <text:p text:style-name="Text_20_body">cpio -icvtB /etc/* &lt; /dev/rmt/0m</text:p>
      <text:p text:style-name="P12"> </text:p>
      <text:p text:style-name="P13">#&gt;&gt;&gt;&gt;&gt;&gt;&gt;&gt;&gt;&gt;&gt;&gt;&gt;&gt;&gt;&gt;&gt;&gt;&gt;&gt;&gt;&gt;&gt;&gt;&gt;&gt;&gt;&gt;&gt;&gt;&gt;&gt;&gt;&gt;&gt;&gt;&gt;&gt;&gt;&gt;&gt;&gt;&gt;&gt;&gt;&gt;&gt;&gt;&gt;&gt;&gt;&gt;&gt;&gt;&gt;&gt;&gt;&gt;&gt;&gt;&gt;&gt;&gt;&gt;&gt;&gt;&gt;&gt;&gt;&gt;&gt;&gt;&gt;&gt;&gt;&gt;&gt;&gt;&gt;&gt;</text:p>
      <text:h text:style-name="P22" text:outline-level="1"><text:bookmark text:name="_Toc89775632"/>47<text:span text:style-name="T1">     </text:span>Autre exemple de script de savegarde de la partie système sur bande par « cpio » (SUN)</text:h>
      <text:p text:style-name="P12"> </text:p>
      <text:p text:style-name="Text_20_body"># ----------------------------------------------------------------------</text:p>
      <text:p text:style-name="Text_20_body"># script : SAUVE_SYS_TAPE SUN1   Auteur : BL   Date : 20/08/98</text:p>
      <text:p text:style-name="Text_20_body"># but : sauvegarde la partie systeme de la machine par cpio</text:p>
      <text:p text:style-name="P2"># ----------------------------------------------------------------------</text:p>
      <text:p text:style-name="P2">rm -f /tmp/ls_fic_to_sav 2&gt; /dev/null</text:p>
      <text:p text:style-name="P2">mt rew</text:p>
      <text:p text:style-name="P2">echo "debut constitution fic liste rep/fic a sauver"</text:p>
      <text:p text:style-name="P2">ls /.dtprofile &gt;&gt; /tmp/ls_fic_to_sav</text:p>
      <text:p text:style-name="P2">ls /.kshrc &gt;&gt; /tmp/ls_fic_to_sav</text:p>
      <text:p text:style-name="P2">ls /.profile &gt;&gt; /tmp/ls_fic_to_sav</text:p>
      <text:p text:style-name="P2">ls /.rhosts &gt;&gt; /tmp/ls_fic_to_sav</text:p>
      <text:p text:style-name="P2">ls /.sh_history &gt;&gt; /tmp/ls_fic_to_sav</text:p>
      <text:p text:style-name="P2">ls /.x11startlog &gt;&gt; /tmp/ls_fic_to_sav</text:p>
      <text:p text:style-name="P2">find /TT_DB    &gt;&gt; /tmp/ls_fic_to_sav</text:p>
      <text:p text:style-name="P2">find /dev      &gt;&gt; /tmp/ls_fic_to_sav</text:p>
      <text:p text:style-name="P2">find /devices  &gt;&gt; /tmp/ls_fic_to_sav</text:p>
      <text:p text:style-name="P2">find /etc      &gt;&gt; /tmp/ls_fic_to_sav</text:p>
      <text:p text:style-name="P2">find /home     &gt;&gt; /tmp/ls_fic_to_sav</text:p>
      <text:p text:style-name="P2">find /kernel   &gt;&gt; /tmp/ls_fic_to_sav</text:p>
      <text:p text:style-name="P2">find /logiciel &gt;&gt; /tmp/ls_fic_to_sav</text:p>
      <text:p text:style-name="P2">find /mnt      &gt;&gt; /tmp/ls_fic_to_sav</text:p>
      <text:p text:style-name="P2">find /net      &gt;&gt; /tmp/ls_fic_to_sav</text:p>
      <text:p text:style-name="P2">find /opt      &gt;&gt; /tmp/ls_fic_to_sav</text:p>
      <text:p text:style-name="P2">find /platform &gt;&gt; /tmp/ls_fic_to_sav</text:p>
      <text:p text:style-name="P2">find /sbin     &gt;&gt; /tmp/ls_fic_to_sav</text:p>
      <text:p text:style-name="P2">find /tmp      &gt;&gt; /tmp/ls_fic_to_sav</text:p>
      <text:p text:style-name="P2">find /usr      &gt;&gt; /tmp/ls_fic_to_sav</text:p>
      <text:p text:style-name="P2">find /users    &gt;&gt; /tmp/ls_fic_to_sav</text:p>
      <text:p text:style-name="P2">find /var      &gt;&gt; /tmp/ls_fic_to_sav</text:p>
      <text:p text:style-name="P2">find /vol      &gt;&gt; /tmp/ls_fic_to_sav</text:p>
      <text:p text:style-name="P2">find /xfn      &gt;&gt; /tmp/ls_fic_to_sav</text:p>
      <text:p text:style-name="Text_20_body">echo "fin constitution fic liste rep/fic a sauver"</text:p>
      <text:p text:style-name="Text_20_body">echo "debut de la sauvegarde"</text:p>
      <text:p text:style-name="P2">cat /tmp/ls_fic_to_sav | cpio -ocvBdum &gt; /dev/rmt/0m</text:p>
      <text:p text:style-name="Text_20_body">echo "\007"</text:p>
      <text:p text:style-name="Text_20_body"> </text:p>
      <text:p text:style-name="Text_20_body">echo "fin de la sauvegarde"</text:p>
      <text:p text:style-name="Text_20_body">echo "Test de relecture de la bande"</text:p>
      <text:p text:style-name="Text_20_body">sleep 2</text:p>
      <text:p text:style-name="Text_20_body">cpio -icvtB /etc/* &lt; /dev/rmt/0m</text:p>
      <text:p text:style-name="Text_20_body">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33"/>48<text:span text:style-name="T1">     </text:span>Exemple de script de savegarde de la partie système sur bande par « ufsdump » (SUN)</text:h>
      <text:p text:style-name="Text_20_body"> </text:p>
      <text:p text:style-name="P2">#!/sbin/sh</text:p>
      <text:p text:style-name="P2">#-----------------------------------------------------------------------------</text:p>
      <text:p text:style-name="P2"># @(#) SAUVE_SYS_UFS</text:p>
      <text:p text:style-name="P2"># Nom / Name     : SAUVE_SYS_UFS</text:p>
      <text:p text:style-name="P2"># Type / Type    : job shell (UNIX)                                           </text:p>
      <text:p text:style-name="Text_20_body"># But / Aim      : faire une sauvegarde system par ufsdump</text:p>
      <text:p text:style-name="Text_20_body"># Auteur / Author: Benjamin LISAN  date creation:  30 Dec 99</text:p>
      <text:p text:style-name="Text_20_body">#                                                                             </text:p>
      <text:p text:style-name="Text_20_body"># Usage / Usage  : SAUVE_SYS_UFS</text:p>
      <text:p text:style-name="Text_20_body"># Exemple / Ex.  : "SAUVE_SYS_UFS"                                           </text:p>
      <text:p text:style-name="Text_20_body"># Contexte / Co. : cron</text:p>
      <text:p text:style-name="Text_20_body"># Commentaires   : version pour SUN SOLARIS</text:p>
      <text:p text:style-name="P2">#-----------------------------------------------------------------------------</text:p>
      <text:p text:style-name="P2">log=/usr/local/divers/sauv_sys_ufs.log</text:p>
      <text:p text:style-name="P2">mt rew</text:p>
      <text:p text:style-name="P2">for dev in `df -k|grep -v /data_01|awk '{print $1}'|\</text:p>
      <text:p text:style-name="Text_20_body"> <text:span text:style-name="T14">grep dev| sed 's:dsk:rdsk:'`</text:span></text:p>
      <text:p text:style-name="P2">do</text:p>
      <text:p text:style-name="Text_20_body">   <text:span text:style-name="T14">/usr/sbin/ufsdump 0uf /dev/rmt/0c $dev |tee -a $log</text:span></text:p>
      <text:p text:style-name="P2">done</text:p>
      <text:p text:style-name="P2">mt rew</text:p>
      <text:p text:style-name="P12"> </text:p>
      <text:p text:style-name="P14">#&gt;&gt;&gt;&gt;&gt;&gt;&gt;&gt;&gt;&gt;&gt;&gt;&gt;&gt;&gt;&gt;&gt;&gt;&gt;&gt;&gt;&gt;&gt;&gt;&gt;&gt;&gt;&gt;&gt;&gt;&gt;&gt;&gt;&gt;&gt;&gt;&gt;&gt;&gt;&gt;&gt;&gt;&gt;&gt;&gt;&gt;&gt;&gt;&gt;&gt;&gt;&gt;&gt;&gt;&gt;&gt;&gt;&gt;&gt;&gt;&gt;&gt;&gt;&gt;&gt;&gt;&gt;&gt;&gt;&gt;&gt;&gt;&gt;&gt;&gt;&gt;&gt;&gt;&gt;&gt;</text:p>
      <text:p text:style-name="P12"> </text:p>
      <text:h text:style-name="P22" text:outline-level="1"><text:bookmark text:name="_Toc89775634"/><text:soft-page-break/>49<text:span text:style-name="T1">     </text:span>Exemple de script de relance d’une base Oracle (on donnant son SID)</text:h>
      <text:p text:style-name="P12"> </text:p>
      <text:p text:style-name="P2">#!/sbin/sh</text:p>
      <text:p text:style-name="P2">#-----------------------------------------------------------------------------</text:p>
      <text:p text:style-name="P2"># @(#) start_base</text:p>
      <text:p text:style-name="P2"># Nom / Name     : start_base Oracle (pour SUN)</text:p>
      <text:p text:style-name="P2"># Type / Type    : job shell (UNIX)                                           </text:p>
      <text:p text:style-name="Text_20_body"># But / Aim      : start la base avec un compte utilisateur different d oracle</text:p>
      <text:p text:style-name="Text_20_body"># Auteur / Author: Benjamin LISAN  -&gt;    date creation:  01-AUG-90            </text:p>
      <text:p text:style-name="Text_20_body"># Usage / Usage  : start_base ORACLE_SID avec ORACLE_SID celui de la base</text:p>
      <text:p text:style-name="Text_20_body"># Exemple / Ex.  : start_base pmtd</text:p>
      <text:p text:style-name="Text_20_body"># Commentaires   : cet utilisateur doit avoir un groupe secondaire : dba</text:p>
      <text:p text:style-name="Text_20_body">#                  version pour SUN Solaris 2.5 et &gt;</text:p>
      <text:p text:style-name="Text_20_body">#-----------------------------------------------------------------------------</text:p>
      <text:p text:style-name="Text_20_body">USAGE="Usage= $0 ORACLE_SID"</text:p>
      <text:p text:style-name="P2">echo "\$# = $#"</text:p>
      <text:p text:style-name="P2">case $# in</text:p>
      <text:p text:style-name="Text_20_body">    <text:span text:style-name="T14">0) echo $USAGE # &gt; &amp;2</text:span></text:p>
      <text:p text:style-name="Text_20_body">         <text:span text:style-name="T15">exit 1 ;;</text:span></text:p>
      <text:p text:style-name="P3">esac</text:p>
      <text:p text:style-name="P3">GRP=`/usr/xpg4/bin/id -ng`</text:p>
      <text:p text:style-name="P2">case $GRP in</text:p>
      <text:p text:style-name="Text_20_body">   <text:span text:style-name="T14">dba) : ;;</text:span></text:p>
      <text:p text:style-name="Text_20_body">   *) echo "vous devez etre du groupe dba (votre groupe actuel: $GRP)"</text:p>
      <text:p text:style-name="Text_20_body">      <text:span text:style-name="T14">exit 1 ;;</text:span></text:p>
      <text:p text:style-name="P2">esac</text:p>
      <text:p text:style-name="P2">HOME_COP=$HOME</text:p>
      <text:p text:style-name="P2">HOME=/logiciel/oracle</text:p>
      <text:p text:style-name="P2">cd $HOME</text:p>
      <text:p text:style-name="Text_20_body">. /logiciel/oracle/oracle_util</text:p>
      <text:p text:style-name="P2">/logiciel/oracle/start_bd $1</text:p>
      <text:p text:style-name="P2">export HOME=$HOME_COP</text:p>
      <text:p text:style-name="Text_20_body">cd $HOM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35"/>50<text:span text:style-name="T1">     </text:span>Exemple de script d’arrêt d’une base Oracle (on donnant son SID)</text:h>
      <text:p text:style-name="Text_20_body"> </text:p>
      <text:p text:style-name="P2">#!/sbin/sh</text:p>
      <text:p text:style-name="P2">#-----------------------------------------------------------------------------</text:p>
      <text:p text:style-name="P2"># @(#) stop_base</text:p>
      <text:p text:style-name="P2"># Nom / Name     : stop_base Oracle (pour SUN)</text:p>
      <text:p text:style-name="P2"># Type / Type    : job shell (UNIX)                                           </text:p>
      <text:p text:style-name="Text_20_body"># But / Aim      : stop la base avec un compte utilisateur different d oracle</text:p>
      <text:p text:style-name="Text_20_body"># Auteur / Author: Benjamin LISAN  -&gt;    date creation:  01-AUG-90            </text:p>
      <text:p text:style-name="Text_20_body"># Usage / Usage  : stop_base ORACLE_SID avec ORACLE_SID celui de la base</text:p>
      <text:p text:style-name="Text_20_body"># Exemple / Ex.  : stop_base pmtd</text:p>
      <text:p text:style-name="Text_20_body"># Commentaires   : cet utilisateur doit avoir un groupe secondaire : dba</text:p>
      <text:p text:style-name="Text_20_body">#                  version pour SUN Solaris 2.5 et &gt;</text:p>
      <text:p text:style-name="Text_20_body">#-----------------------------------------------------------------------------</text:p>
      <text:p text:style-name="Text_20_body">USAGE="Usage= $0 ORACLE_SID"</text:p>
      <text:p text:style-name="P2">echo "\$# = $#"</text:p>
      <text:p text:style-name="P2">case $# in</text:p>
      <text:p text:style-name="Text_20_body">    <text:span text:style-name="T14">0) echo $USAGE # &gt; &amp;2</text:span></text:p>
      <text:p text:style-name="Text_20_body">         <text:span text:style-name="T15">exit 1 ;;</text:span></text:p>
      <text:p text:style-name="P3">esac</text:p>
      <text:p text:style-name="P3">GRP=`/usr/xpg4/bin/id -ng`</text:p>
      <text:p text:style-name="P2">case $GRP in</text:p>
      <text:p text:style-name="Text_20_body">   <text:span text:style-name="T14">dba) : ;;</text:span></text:p>
      <text:p text:style-name="Text_20_body">   *) echo "vous devez etre du groupe dba (votre groupe actuel: $GRP)"</text:p>
      <text:p text:style-name="Text_20_body">      <text:span text:style-name="T14">exit 1 ;;</text:span></text:p>
      <text:p text:style-name="P2">esac</text:p>
      <text:p text:style-name="P2">HOME_COP=$HOME</text:p>
      <text:p text:style-name="P2">HOME=/logiciel/oracle</text:p>
      <text:p text:style-name="P2">cd $HOME</text:p>
      <text:p text:style-name="Text_20_body">. /logiciel/oracle/oracle_util</text:p>
      <text:p text:style-name="P2">/logiciel/oracle/stop_bd $1</text:p>
      <text:p text:style-name="P2">export HOME=$HOME_COP</text:p>
      <text:p text:style-name="Text_20_body">cd $HOME</text:p>
      <text:p text:style-name="P12"> </text:p>
      <text:p text:style-name="P13">#&gt;&gt;&gt;&gt;&gt;&gt;&gt;&gt;&gt;&gt;&gt;&gt;&gt;&gt;&gt;&gt;&gt;&gt;&gt;&gt;&gt;&gt;&gt;&gt;&gt;&gt;&gt;&gt;&gt;&gt;&gt;&gt;&gt;&gt;&gt;&gt;&gt;&gt;&gt;&gt;&gt;&gt;&gt;&gt;&gt;&gt;&gt;&gt;&gt;&gt;&gt;&gt;&gt;&gt;&gt;&gt;&gt;&gt;&gt;&gt;&gt;&gt;&gt;&gt;&gt;&gt;&gt;&gt;&gt;&gt;&gt;&gt;&gt;&gt;&gt;&gt;&gt;&gt;&gt;&gt;</text:p>
      <text:p text:style-name="P18"> </text:p>
      <text:h text:style-name="P22" text:outline-level="1"><text:bookmark text:name="_Toc89775636"/>51<text:span text:style-name="T1">     </text:span>Script de surveillance de la mémoire (SUN)</text:h>
      <text:p text:style-name="P12"> </text:p>
      <text:p text:style-name="P2">#!/sbin/sh</text:p>
      <text:p text:style-name="P2">#-----------------------------------------------------------------------------</text:p>
      <text:p text:style-name="P2"># @(#) surv_mem</text:p>
      <text:p text:style-name="P2"># Nom / Name     :  surv_mem</text:p>
      <text:p text:style-name="P2"># Type / Type    : job shell (UNIX)                                           </text:p>
      <text:p text:style-name="Text_20_body"># But / Aim      : surveillance de la memoire</text:p>
      <text:p text:style-name="Text_20_body"># Auteur / Author: Benjamin LISAN  -&gt;    date creation:  01/03/1999</text:p>
      <text:p text:style-name="Text_20_body"># Usage / Usage  : surv_mem</text:p>
      <text:p text:style-name="Text_20_body"># Exemple / Ex.  : surv_mem</text:p>
      <text:p text:style-name="Text_20_body"># Contexte / Co. : cron</text:p>
      <text:p text:style-name="Text_20_body"># Commentaires   : version pour Solaris 2.5 et &gt;</text:p>
      <text:p text:style-name="Text_20_body">#-----------------------------------------------------------------------------</text:p>
      <text:p text:style-name="Text_20_body">DAT="`date '+%y/%m/%d:%H:%M:%S'` \c"</text:p>
      <text:p text:style-name="Text_20_body">test ! -d /var/adm/log &amp;&amp; mkdir /var/adm/log # si le repertoire n'existe pas on le cree</text:p>
      <text:p text:style-name="P7">log=/var/adm/log/survmem.log</text:p>
      <text:p text:style-name="Text_20_body"> </text:p>
      <text:p text:style-name="Text_20_body"># pour eviter que le fichier log augmente trop</text:p>
      <text:p text:style-name="P2">touch $log</text:p>
      <text:p text:style-name="P2">if test "`wc -l $log| awk '{print $1}'`" -gt "1000"</text:p>
      <text:p text:style-name="P2">then</text:p>
      <text:p text:style-name="Text_20_body">  <text:span text:style-name="T14">tail -1000 $log &gt; /tmp/logmem$$</text:span></text:p>
      <text:p text:style-name="Text_20_body">   <text:span text:style-name="T14">mv /tmp/logmem$$ $log</text:span></text:p>
      <text:p text:style-name="P2">fi</text:p>
      <text:p text:style-name="Text_20_body"> </text:p>
      <text:p text:style-name="P2">ps -eo comm,vsz,pmem,s,pid,pcpu,time,etime|grep exeAlimCarnets|grep -v grep|\</text:p>
      <text:p text:style-name="P2">#awk '{print $1" "$2" "$3" "$4" "$5" "$6" "$7" "$8}'| \</text:p>
      <text:p text:style-name="P2">nawk '</text:p>
      <text:p text:style-name="P2">BEGIN {vsztot=0;memtot=0;cputot=0};</text:p>
      <text:p text:style-name="Text_20_body">      <text:span text:style-name="T14">{</text:span></text:p>
      <text:p text:style-name="Text_20_body">   <text:span text:style-name="T14">if ( FNR &gt; 0 )</text:span></text:p>
      <text:p text:style-name="Text_20_body">      <text:span text:style-name="T14">{</text:span></text:p>
      <text:p text:style-name="Text_20_body">          <text:span text:style-name="T14">system("echo \"`date '+%y/%m/%d:%H:%M:%S'` \\c\"");</text:span></text:p>
      <text:p text:style-name="Text_20_body">          <text:span text:style-name="T14">printf("cde: %s vsz:%s pmem:%s s:%s pid:%s pcpu:%s time:%s etim:%s\n",$1,$2,$3,$4,$5,$6,$7,$8);</text:span></text:p>
      <text:p text:style-name="Text_20_body">          <text:span text:style-name="T17">vsztot=vsztot+$2;</text:span></text:p>
      <text:p text:style-name="Text_20_body">          <text:span text:style-name="T17">memtot=memtot+$3;</text:span></text:p>
      <text:p text:style-name="Text_20_body">          <text:span text:style-name="T17">cputot=cputot+$6;</text:span></text:p>
      <text:p text:style-name="Text_20_body">      <text:span text:style-name="T17">}</text:span></text:p>
      <text:p text:style-name="Text_20_body">      <text:span text:style-name="T17">};</text:span></text:p>
      <text:p text:style-name="Text_20_body">  <text:span text:style-name="T17">END {</text:span></text:p>
      <text:p text:style-name="Text_20_body">   <text:span text:style-name="T17">if ( FNR &gt; 0 )</text:span></text:p>
      <text:p text:style-name="Text_20_body">      <text:span text:style-name="T17">{</text:span></text:p>
      <text:p text:style-name="Text_20_body">         <text:span text:style-name="T17">printf "vsz tot:%s ,pc mem tot:%s ,pc cpu tot:%s ,nb occur:%s, free swp:",vsztot,memtot,cputot,FNR </text:span></text:p>
      <text:p text:style-name="Text_20_body">         <text:span text:style-name="T14">system("swap -l| grep -v free | cut -c42-");</text:span></text:p>
      <text:p text:style-name="Text_20_body">      <text:span text:style-name="T14">}</text:span></text:p>
      <text:p text:style-name="P2">};</text:p>
      <text:p text:style-name="P2">' &gt;&gt; $log</text:p>
      <text:p text:style-name="P2">#fi</text:p>
      <text:p text:style-name="P12"> </text:p>
      <text:p text:style-name="P14">#&gt;&gt;&gt;&gt;&gt;&gt;&gt;&gt;&gt;&gt;&gt;&gt;&gt;&gt;&gt;&gt;&gt;&gt;&gt;&gt;&gt;&gt;&gt;&gt;&gt;&gt;&gt;&gt;&gt;&gt;&gt;&gt;&gt;&gt;&gt;&gt;&gt;&gt;&gt;&gt;&gt;&gt;&gt;&gt;&gt;&gt;&gt;&gt;&gt;&gt;&gt;&gt;&gt;&gt;&gt;&gt;&gt;&gt;&gt;&gt;&gt;&gt;&gt;&gt;&gt;&gt;&gt;&gt;&gt;&gt;&gt;&gt;&gt;&gt;&gt;&gt;&gt;&gt;&gt;&gt;</text:p>
      <text:h text:style-name="P26" text:outline-level="1"><text:bookmark text:name="_Toc89775637"/>52<text:span text:style-name="T1">     </text:span>Script de surveillance de la swap (HP)</text:h>
      <text:p text:style-name="P12"> </text:p>
      <text:p text:style-name="P2">#!/sbin/sh</text:p>
      <text:p text:style-name="P2">#-----------------------------------------------------------------------------</text:p>
      <text:p text:style-name="P2"># @(#) surv_mem_swap</text:p>
      <text:p text:style-name="P2"># Nom / Name     : surv_mem_swap</text:p>
      <text:p text:style-name="P2"># Type / Type    : job shell (UNIX)                                           </text:p>
      <text:p text:style-name="Text_20_body"># But / Aim      : alerte si memoire ou swap prim/secondaire &gt; a 50 %</text:p>
      <text:p text:style-name="Text_20_body"># Auteur / Author: Benjamin LISAN  -&gt;    date creation:  01-AUG-90            </text:p>
      <text:p text:style-name="Text_20_body"># Usage / Usage  : surv_mem_swap</text:p>
      <text:p text:style-name="Text_20_body"># Exemple / Ex.  : surv_mem_swap</text:p>
      <text:p text:style-name="Text_20_body"># Contexte / Co. : cron</text:p>
      <text:p text:style-name="Text_20_body"># Commentaires   : version pour HPUX 10.20</text:p>
      <text:p text:style-name="P2">#-----------------------------------------------------------------------------</text:p>
      <text:p text:style-name="P2">i=0</text:p>
      <text:p text:style-name="P2">for siz in `swapinfo -a|grep -v TYPE|grep -v Kb|grep -v reserve|awk '{print $5}'|sed 's:%::'`</text:p>
      <text:p text:style-name="P2">do</text:p>
      <text:p text:style-name="Text_20_body">  <text:span text:style-name="T14">test $i -eq 0 &amp;&amp; test $siz -gt 50 &amp;&amp; echo "swap primaire &gt; a $siz %"</text:span></text:p>
      <text:p text:style-name="Text_20_body">  <text:span text:style-name="T14">test $i -eq 1 &amp;&amp; test $siz -gt 50 &amp;&amp; echo "swap secondaire &gt; a $siz %"</text:span></text:p>
      <text:p text:style-name="Text_20_body">  <text:span text:style-name="T14">test $i -eq 2 &amp;&amp; test $siz -gt 50 &amp;&amp; echo "mem.ram occupee &gt; a $siz %"</text:span></text:p>
      <text:p text:style-name="Text_20_body">  <text:span text:style-name="T14">#echo "i=$i , siz=$siz"</text:span></text:p>
      <text:p text:style-name="Text_20_body">  <text:span text:style-name="T14">i=`expr $i + 1`</text:span></text:p>
      <text:p text:style-name="Text_20_body">done</text:p>
      <text:p text:style-name="Text_20_body"> </text:p>
      <text:p text:style-name="P13">#&gt;&gt;&gt;&gt;&gt;&gt;&gt;&gt;&gt;&gt;&gt;&gt;&gt;&gt;&gt;&gt;&gt;&gt;&gt;&gt;&gt;&gt;&gt;&gt;&gt;&gt;&gt;&gt;&gt;&gt;&gt;&gt;&gt;&gt;&gt;&gt;&gt;&gt;&gt;&gt;&gt;&gt;&gt;&gt;&gt;&gt;&gt;&gt;&gt;&gt;&gt;&gt;&gt;&gt;&gt;&gt;&gt;&gt;&gt;&gt;&gt;&gt;&gt;&gt;&gt;&gt;&gt;&gt;&gt;&gt;&gt;&gt;&gt;&gt;&gt;&gt;&gt;&gt;&gt;&gt;</text:p>
      <text:p text:style-name="P13"># 2ieme variante du script ci-avant :</text:p>
      <text:p text:style-name="P12"> </text:p>
      <text:p text:style-name="P2">#!/sbin/sh</text:p>
      <text:p text:style-name="P2">#-----------------------------------------------------------------------------</text:p>
      <text:p text:style-name="P2"># @(#) surv_mem_swap</text:p>
      <text:p text:style-name="P2"># Nom / Name     : surv_mem_swap</text:p>
      <text:p text:style-name="P2"># Type / Type    : job shell (UNIX)                                           </text:p>
      <text:p text:style-name="Text_20_body"># But / Aim      : alerte si memoire ou swap prim/secondaire &gt; a 50 %</text:p>
      <text:p text:style-name="Text_20_body"># Auteur / Author: Benjamin LISAN  -&gt;    date creation:  01-AUG-90            </text:p>
      <text:p text:style-name="Text_20_body"># Usage / Usage  : surv_mem_swap</text:p>
      <text:p text:style-name="Text_20_body"># Exemple / Ex.  : surv_mem_swap</text:p>
      <text:p text:style-name="Text_20_body"># Contexte / Co. : cron</text:p>
      <text:p text:style-name="Text_20_body"># Commentaires   : version pour HPUX 10.20</text:p>
      <text:p text:style-name="P2">#-----------------------------------------------------------------------------</text:p>
      <text:p text:style-name="P2">i=0</text:p>
      <text:p text:style-name="P2">for siz in `swapinfo -a|grep -v TYPE|grep -v Kb|grep -v reserve|\</text:p>
      <text:p text:style-name="P2">awk '{print $5}'|sed 's:%::'`</text:p>
      <text:p text:style-name="P2">do</text:p>
      <text:p text:style-name="Text_20_body"> <text:span text:style-name="T14">test $i -eq 0 &amp;&amp; test $siz != '-' &amp;&amp; test $siz -gt 50 &amp;&amp; \</text:span></text:p>
      <text:p text:style-name="Text_20_body">                                     <text:span text:style-name="T14">echo "swap prim. &gt; a $siz %"</text:span></text:p>
      <text:p text:style-name="Text_20_body"> <text:span text:style-name="T14">test $i -eq 1 &amp;&amp; test $siz != '-' &amp;&amp; test $siz -gt 50 &amp;&amp; \</text:span></text:p>
      <text:p text:style-name="Text_20_body">                                     <text:span text:style-name="T14">echo "swap second.&gt; a $siz %"</text:span></text:p>
      <text:p text:style-name="Text_20_body"> <text:span text:style-name="T14">test $i -eq 2 &amp;&amp; test $siz != '-' &amp;&amp; test $siz -gt 50 &amp;&amp; \</text:span></text:p>
      <text:p text:style-name="Text_20_body">                                     <text:span text:style-name="T14">echo "occup.mem.ram &gt; a $siz %"</text:span></text:p>
      <text:p text:style-name="Text_20_body"> <text:span text:style-name="T14">#echo "i=$i , siz=$siz"</text:span></text:p>
      <text:p text:style-name="Text_20_body"> <text:span text:style-name="T14">i=`expr $i + 1`</text:span></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p text:style-name="P9"> </text:p>
      <text:h text:style-name="P22" text:outline-level="1"><text:bookmark text:name="_Toc89775638"/>53<text:span text:style-name="T1">     </text:span>surveillance du non dépassement du nombre d’utilisateurs de la licence Oracle</text:h>
      <text:p text:style-name="Text_20_body"> </text:p>
      <text:p text:style-name="Text_20_body">#!/sbin/sh</text:p>
      <text:p text:style-name="Text_20_body">#-----------------------------------------------------------------------------</text:p>
      <text:p text:style-name="Text_20_body"># @(#) surv_nb_usr_ora</text:p>
      <text:p text:style-name="Text_20_body"># Nom / Name     : surv_nb_usr_ora</text:p>
      <text:p text:style-name="P2"># Type / Type    : job shell (UNIX)                                           </text:p>
      <text:p text:style-name="Text_20_body"># But / Aim      : surveillance du non depassement du nbre utilisateurs max</text:p>
      <text:p text:style-name="Text_20_body">#                  de la licence ORACLE sur ce serveur</text:p>
      <text:p text:style-name="Text_20_body"># Auteur / Author: Benjamin LISAN  -&gt;    date creation:  01-AUG-90            </text:p>
      <text:p text:style-name="Text_20_body">#                                                                             </text:p>
      <text:p text:style-name="Text_20_body"># Usage / Usage  : surv_nb_usr_ora</text:p>
      <text:p text:style-name="Text_20_body"># Exemple / Ex.  : "surv_nb_usr_ora"                                           </text:p>
      <text:p text:style-name="Text_20_body"># Contexte / Co. : cron</text:p>
      <text:p text:style-name="Text_20_body"># Commentaires   : version pour HPUX 10.20</text:p>
      <text:p text:style-name="Text_20_body">#-----------------------------------------------------------------------------</text:p>
      <text:p text:style-name="Text_20_body"># constition du script extrayant le nbre de users max de la licence oracle</text:p>
      <text:p text:style-name="P2">rm -f /tmp/sessions_max.sql 2&gt; /dev/null</text:p>
      <text:p text:style-name="P2">cat &gt;&gt; /tmp/sessions_max.sql &lt;&lt; %%</text:p>
      <text:p text:style-name="P2">connect internal</text:p>
      <text:p text:style-name="P2">set termout off</text:p>
      <text:p text:style-name="P2">spool /tmp/sessions_max.lst</text:p>
      <text:p text:style-name="P2">select sessions_max xxxxx from v\$license;</text:p>
      <text:p text:style-name="P2">spool off</text:p>
      <text:p text:style-name="P2">exit</text:p>
      <text:p text:style-name="P2">%%</text:p>
      <text:p text:style-name="Text_20_body"># extraction du nbre de users max de la licence oracle</text:p>
      <text:p text:style-name="Text_20_body">su - oracle -c 'svrmgrl command=@/tmp/sessions_max.sql' &lt;&lt; %% &gt; /dev/null 2&gt; /dev/null</text:p>
      <text:p text:style-name="Text_20_body">gbq</text:p>
      <text:p text:style-name="Text_20_body">%%</text:p>
      <text:p text:style-name="Text_20_body"># nombre d'utilisateurs max de la licence oracle du SRV</text:p>
      <text:p text:style-name="P2">NB_MAX_USR_LIC_ORA=`tail -2 /tmp/sessions_max.lst | head -1|sed "s: ::g"`</text:p>
      <text:p text:style-name="Text_20_body"># nombres utilisateurs connectes</text:p>
      <text:p text:style-name="Text_20_body">NB_USER_ORA_ON_LINE=`ps -ef|grep ora |grep -i PROTOCOL |wc -l`</text:p>
      <text:p text:style-name="Text_20_body"># comparaison entre les deux</text:p>
      <text:p text:style-name="P2">if [ $NB_USER_ORA_ON_LINE -ge $NB_MAX_USR_LIC_ORA ]</text:p>
      <text:p text:style-name="P2">then</text:p>
      <text:p text:style-name="Text_20_body">   <text:span text:style-name="T14">echo "nbre users on-line oracle $NB_USER_ORA_ON_LINE &gt; nbre usrs max licence ora $NB_MAX_USR_LIC_ORA"</text:span></text:p>
      <text:p text:style-name="Text_20_body">fi</text:p>
      <text:p text:style-name="P12"> </text:p>
      <text:p text:style-name="P13">#&gt;&gt;&gt;&gt;&gt;&gt;&gt;&gt;&gt;&gt;&gt;&gt;&gt;&gt;&gt;&gt;&gt;&gt;&gt;&gt;&gt;&gt;&gt;&gt;&gt;&gt;&gt;&gt;&gt;&gt;&gt;&gt;&gt;&gt;&gt;&gt;&gt;&gt;&gt;&gt;&gt;&gt;&gt;&gt;&gt;&gt;&gt;&gt;&gt;&gt;&gt;&gt;&gt;&gt;&gt;&gt;&gt;&gt;&gt;&gt;&gt;&gt;&gt;&gt;&gt;&gt;&gt;&gt;&gt;&gt;&gt;&gt;&gt;&gt;&gt;&gt;&gt;&gt;&gt;&gt;</text:p>
      <text:h text:style-name="P26" text:outline-level="1"><text:bookmark text:name="_Toc89775639"/>54<text:span text:style-name="T1">     </text:span>Script de purges des fichiers log de Lotus Note</text:h>
      <text:p text:style-name="P12"> </text:p>
      <text:p text:style-name="P2">#!/sbin/sh</text:p>
      <text:p text:style-name="P2">#-----------------------------------------------------------------------------</text:p>
      <text:p text:style-name="P2"># @(#) surv_notes_log</text:p>
      <text:p text:style-name="P2"># Nom / Name     : surv_notes_log</text:p>
      <text:p text:style-name="P2"># Type / Type    : job shell (UNIX)                                           </text:p>
      <text:p text:style-name="Text_20_body"># But / Aim      : supprimer tous les fichiers temporaires anciens de LOTUS</text:p>
      <text:p text:style-name="Text_20_body">#                  (but : faire de la place sur la machine)</text:p>
      <text:p text:style-name="Text_20_body"># Auteur / Author: Benjamin LISAN  -&gt;    date creation:  01-AUG-90            </text:p>
      <text:p text:style-name="Text_20_body">#                                                                             </text:p>
      <text:p text:style-name="Text_20_body"># Usage / Usage  : surv_notes_log</text:p>
      <text:p text:style-name="Text_20_body"># Exemple / Ex.  : "surv_notes_log"                                           </text:p>
      <text:p text:style-name="Text_20_body"># Contexte / Co. : cron</text:p>
      <text:p text:style-name="Text_20_body"># Commentaires   : version pour machine SUN (en Solaris 2.6)</text:p>
      <text:p text:style-name="P2">#-----------------------------------------------------------------------------</text:p>
      <text:p text:style-name="P2">NOTES_LOG=/data_03/notes/tmp/notes.log</text:p>
      <text:p text:style-name="P2">if [ -f $NOTES_LOG ]</text:p>
      <text:p text:style-name="Text_20_body">then</text:p>
      <text:p text:style-name="Text_20_body">    taille_notes_log=`ls -l $NOTES_LOG|awk '{print $5}'`</text:p>
      <text:p text:style-name="Text_20_body">    if [ $taille_notes_log -gt 50000000 ]</text:p>
      <text:p text:style-name="Text_20_body">    then</text:p>
      <text:p text:style-name="Text_20_body">        msg="Taille fichier notes.log &gt; a 50 Mo"</text:p>
      <text:p text:style-name="Text_20_body">        echo $msg</text:p>
      <text:p text:style-name="Text_20_body">        # envoi d'un email d'alerte vers l'admin.notes</text:p>
      <text:p text:style-name="Text_20_body">        MAIL_ADDR=benjamin.lisan@toto.com</text:p>
      <text:p text:style-name="Text_20_body">        <text:span text:style-name="T14">HOST=`uname -n`</text:span></text:p>
      <text:p text:style-name="Text_20_body">        <text:span text:style-name="T14">mailx -s "$HOST `whoami`" $MAIL_ADDR &lt;&lt; %%</text:span></text:p>
      <text:p text:style-name="Text_20_body">$msg</text:p>
      <text:p text:style-name="Text_20_body">%%</text:p>
      <text:p text:style-name="Text_20_body">    fi</text:p>
      <text:p text:style-name="Text_20_body">fi</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0"/>55<text:span text:style-name="T1">     </text:span>scripts pour surveiller que les droits systèmes de certains fichiers sensibles ne changent pas (version pour HP)</text:h>
      <text:p text:style-name="P12"> </text:p>
      <text:p text:style-name="P2">#!/bin/sh</text:p>
      <text:p text:style-name="P2">#-----------------------------------------------------------------------------</text:p>
      <text:p text:style-name="P2"># @(#) surv_securite</text:p>
      <text:p text:style-name="P2"># Nom / Name     : surv_securite</text:p>
      <text:p text:style-name="P2"># Type / Type    : job shell (UNIX)                                           </text:p>
      <text:p text:style-name="Text_20_body"># But / Aim      : 1) surveillance securite, que fichiers systeme pas droit</text:p>
      <text:p text:style-name="Text_20_body">#                     change</text:p>
      <text:p text:style-name="Text_20_body">#                  2) pas de nouveaux fichiers avec droit suid, sgid</text:p>
      <text:p text:style-name="Text_20_body"># Auteur / Author: Benjamin LISAN  -&gt;    date creation:  15/5/00 V2</text:p>
      <text:p text:style-name="Text_20_body"># Usage / Usage  : surv_securite</text:p>
      <text:p text:style-name="Text_20_body"># Exemple / Ex.  : surv_securite                                           </text:p>
      <text:p text:style-name="Text_20_body"># Contexte / Co. : cron</text:p>
      <text:p text:style-name="Text_20_body"># Commentaires   : version pour HPUX 10.20</text:p>
      <text:p text:style-name="Text_20_body">#-----------------------------------------------------------------------------</text:p>
      <text:p text:style-name="Text_20_body">DIR_LOG=/usr/local/divers</text:p>
      <text:p text:style-name="Text_20_body">nom_prog=`basename $0`</text:p>
      <text:p text:style-name="Text_20_body">test ! -d $DIR_LOG &amp;&amp; mkdir $DIR_LOG</text:p>
      <text:p text:style-name="Text_20_body"># si le fichiers historique precedent pas cree on le cree, sinon on cree un nouveau</text:p>
      <text:p text:style-name="P2">if test ! -f $DIR_LOG/drt_fic_sys.prec</text:p>
      <text:p text:style-name="P2">then</text:p>
      <text:p text:style-name="Text_20_body">   <text:span text:style-name="T14">&gt; $DIR_LOG/drt_fic_sys.prec # raz</text:span></text:p>
      <text:p text:style-name="Text_20_body">   # on cherche les fichiers systeme importants</text:p>
      <text:p text:style-name="Text_20_body">   ls -l /.rhosts           &gt;&gt; $DIR_LOG/drt_fic_sys.prec 2&gt; /dev/null</text:p>
      <text:p text:style-name="Text_20_body">   ls -l /.profile          &gt;&gt; $DIR_LOG/drt_fic_sys.prec 2&gt; /dev/null</text:p>
      <text:p text:style-name="Text_20_body">   ls -l /.kshrc            &gt;&gt; $DIR_LOG/drt_fic_sys.prec 2&gt; /dev/null</text:p>
      <text:p text:style-name="Text_20_body">   ls -l /etc/passwd        &gt;&gt; $DIR_LOG/drt_fic_sys.prec 2&gt; /dev/null</text:p>
      <text:p text:style-name="Text_20_body">   ls -l /etc/group         &gt;&gt; $DIR_LOG/drt_fic_sys.prec 2&gt; /dev/null</text:p>
      <text:p text:style-name="Text_20_body">   ls -l /etc/exports       &gt;&gt; $DIR_LOG/drt_fic_sys.prec 2&gt; /dev/null</text:p>
      <text:p text:style-name="Text_20_body">   ls -l /etc/fstab         &gt;&gt; $DIR_LOG/drt_fic_sys.prec 2&gt; /dev/null</text:p>
      <text:p text:style-name="Text_20_body">  #ls -l /etc/wtmp          &gt;&gt; $DIR_LOG/drt_fic_sys.prec 2&gt; /dev/null</text:p>
      <text:p text:style-name="Text_20_body">   ls -l /etc/hosts         &gt;&gt; $DIR_LOG/drt_fic_sys.prec 2&gt; /dev/null</text:p>
      <text:p text:style-name="Text_20_body">   ls -l /etc/hosts.equiv   &gt;&gt; $DIR_LOG/drt_fic_sys.prec 2&gt; /dev/null</text:p>
      <text:p text:style-name="Text_20_body">   ls -l /etc/syslog.conf   &gt;&gt; $DIR_LOG/drt_fic_sys.prec 2&gt; /dev/null</text:p>
      <text:p text:style-name="Text_20_body">   ls -l /etc/inetd.conf    &gt;&gt; $DIR_LOG/drt_fic_sys.prec 2&gt; /dev/null</text:p>
      <text:p text:style-name="Text_20_body">   ls -l /etc/inittab       &gt;&gt; $DIR_LOG/drt_fic_sys.prec 2&gt; /dev/null</text:p>
      <text:p text:style-name="Text_20_body">   ls -l /etc/profile       &gt;&gt; $DIR_LOG/drt_fic_sys.prec 2&gt; /dev/null</text:p>
      <text:p text:style-name="Text_20_body">   ls -l /etc/mail/sendmail.cf           &gt;&gt; $DIR_LOG/drt_fic_sys.prec 2&gt; /dev/null</text:p>
      <text:p text:style-name="Text_20_body">   ls -l /usr/spool/cron/crontabs/root   &gt;&gt; $DIR_LOG/drt_fic_sys.prec 2&gt; /dev/null</text:p>
      <text:p text:style-name="Text_20_body">   ls -l /var/adm/cron/cron.allow        &gt;&gt; $DIR_LOG/drt_fic_sys.prec 2&gt; /dev/null</text:p>
      <text:p text:style-name="Text_20_body">   # on cherche les fichiers avec les droits suid ou sgid</text:p>
      <text:p text:style-name="Text_20_body">   <text:span text:style-name="T14">find / -type f \( -perm -2000 -o -perm 4000 \) -exec ls -l {} \; \</text:span></text:p>
      <text:p text:style-name="Text_20_body">      &gt;&gt; $DIR_LOG/drt_fic_sys.prec 2&gt; /dev/null</text:p>
      <text:p text:style-name="P2">else</text:p>
      <text:p text:style-name="Text_20_body">   <text:span text:style-name="T14">&gt; $DIR_LOG/drt_fic_sys.new # raz</text:span></text:p>
      <text:p text:style-name="Text_20_body">   # on cherche les fichiers systeme importants</text:p>
      <text:p text:style-name="Text_20_body">   <text:span text:style-name="T14">ls -l /.rhosts           &gt;&gt; $DIR_LOG/drt_fic_sys.new 2&gt; /dev/null</text:span></text:p>
      <text:p text:style-name="Text_20_body">   <text:span text:style-name="T14">ls -l /.profile          &gt;&gt; $DIR_LOG/drt_fic_sys.new 2&gt; /dev/null</text:span></text:p>
      <text:p text:style-name="Text_20_body">   <text:span text:style-name="T14">ls -l /.kshrc            &gt;&gt; $DIR_LOG/drt_fic_sys.new 2&gt; /dev/null</text:span></text:p>
      <text:p text:style-name="Text_20_body">   <text:span text:style-name="T14">ls -l /etc/passwd        &gt;&gt; $DIR_LOG/drt_fic_sys.new 2&gt; /dev/null</text:span></text:p>
      <text:p text:style-name="Text_20_body">   <text:span text:style-name="T14">ls -l /etc/group         &gt;&gt; $DIR_LOG/drt_fic_sys.new 2&gt; /dev/null</text:span></text:p>
      <text:p text:style-name="Text_20_body">   <text:span text:style-name="T14">ls -l /etc/exports       &gt;&gt; $DIR_LOG/drt_fic_sys.new 2&gt; /dev/null</text:span></text:p>
      <text:p text:style-name="Text_20_body">   <text:span text:style-name="T14">ls -l /etc/fstab         &gt;&gt; $DIR_LOG/drt_fic_sys.new 2&gt; /dev/null</text:span></text:p>
      <text:p text:style-name="Text_20_body">  <text:span text:style-name="T14">#ls -l /etc/wtmp          &gt;&gt; $DIR_LOG/drt_fic_sys.new 2&gt; /dev/null</text:span></text:p>
      <text:p text:style-name="Text_20_body">   <text:span text:style-name="T14">ls -l /etc/hosts         &gt;&gt; $DIR_LOG/drt_fic_sys.new 2&gt; /dev/null</text:span></text:p>
      <text:p text:style-name="Text_20_body">   <text:span text:style-name="T14">ls -l /etc/hosts.equiv   &gt;&gt; $DIR_LOG/drt_fic_sys.new 2&gt; /dev/null</text:span></text:p>
      <text:p text:style-name="Text_20_body">   <text:span text:style-name="T14">ls -l /etc/syslog.conf   &gt;&gt; $DIR_LOG/drt_fic_sys.new 2&gt; /dev/null</text:span></text:p>
      <text:p text:style-name="Text_20_body">   <text:span text:style-name="T14">ls -l /etc/inetd.conf    &gt;&gt; $DIR_LOG/drt_fic_sys.new 2&gt; /dev/null</text:span></text:p>
      <text:p text:style-name="Text_20_body">   <text:span text:style-name="T14">ls -l /etc/inittab       &gt;&gt; $DIR_LOG/drt_fic_sys.new 2&gt; /dev/null</text:span></text:p>
      <text:p text:style-name="Text_20_body">   ls -l /etc/profile       &gt;&gt; $DIR_LOG/drt_fic_sys.new 2&gt; /dev/null</text:p>
      <text:p text:style-name="Text_20_body">   ls -l /etc/mail/sendmail.cf           &gt;&gt; $DIR_LOG/drt_fic_sys.new 2&gt; /dev/null</text:p>
      <text:p text:style-name="Text_20_body">   <text:span text:style-name="T14">ls -l /usr/spool/cron/crontabs/root   &gt;&gt; $DIR_LOG/drt_fic_sys.new 2&gt; /dev/null</text:span></text:p>
      <text:p text:style-name="Text_20_body">   <text:span text:style-name="T14">ls -l /var/adm/cron/cron.allow        &gt;&gt; $DIR_LOG/drt_fic_sys.new 2&gt; /dev/null</text:span></text:p>
      <text:p text:style-name="Text_20_body">   # on cherche les fichiers avec les droits suid ou sgid </text:p>
      <text:p text:style-name="Text_20_body">    <text:span text:style-name="T14">find / -type f \( -perm -2000 -o -perm 4000 \) -exec ls -l {} \; \</text:span></text:p>
      <text:p text:style-name="Text_20_body">      <text:span text:style-name="T14">&gt;&gt; $DIR_LOG/drt_fic_sys.new 2&gt; /dev/null</text:span></text:p>
      <text:p text:style-name="Text_20_body">fi</text:p>
      <text:p text:style-name="Text_20_body"> </text:p>
      <text:p text:style-name="Text_20_body"># detection droits modifies</text:p>
      <text:p text:style-name="Text_20_body"> </text:p>
      <text:p text:style-name="P2">diff $DIR_LOG/drt_fic_sys.prec $DIR_LOG/drt_fic_sys.new \</text:p>
      <text:p text:style-name="Text_20_body">  &gt; $DIR_LOG/cmp_drt_fic_sys</text:p>
      <text:p text:style-name="Text_20_body"> </text:p>
      <text:p text:style-name="Text_20_body"># modif. droit des fichiers essentiels</text:p>
      <text:p text:style-name="Text_20_body">&gt; $DIR_LOG/maj_drt_fic # raz</text:p>
      <text:p text:style-name="Text_20_body">cd /</text:p>
      <text:p text:style-name="Text_20_body">test "`ls -l /usr/local/bin/$nom_prog | awk '{print $1}'`" != "-r--r-----" \</text:p>
      <text:p text:style-name="Text_20_body">    &amp;&amp; ls -l /usr/local/bin/$nom_prog  &gt;&gt; $DIR_LOG/maj_drt_fic</text:p>
      <text:p text:style-name="Text_20_body">test "`ls -l .rhosts     |awk '{print $1}'`" != <text:span text:style-name="T14">"-r--r-----" \</text:span></text:p>
      <text:p text:style-name="Text_20_body">    <text:span text:style-name="T14">&amp;&amp; ls -l .rhosts     &gt;&gt; $DIR_LOG/maj_drt_fic</text:span></text:p>
      <text:p text:style-name="Text_20_body"><text:span text:style-name="T14">test "`ls -l .profile    |awk '{print $1}'`" != </text:span>"-r--r-----" \</text:p>
      <text:p text:style-name="Text_20_body">    &amp;&amp; ls -l .profile    &gt;&gt; $DIR_LOG/maj_drt_fic</text:p>
      <text:p text:style-name="Text_20_body">test "`ls -l /etc/profile   |awk '{print $1}'`" != "-r--r--r--" \</text:p>
      <text:p text:style-name="Text_20_body">    &amp;&amp; ls -l /etc/profile   &gt;&gt; $DIR_LOG/maj_drt_fic</text:p>
      <text:p text:style-name="Text_20_body">test "`ls -l /etc/passwd   |awk '{print $1}'`" != "-r--r--r--" \</text:p>
      <text:p text:style-name="Text_20_body">    &amp;&amp; ls -l /etc/passwd   &gt;&gt; $DIR_LOG/maj_drt_fic</text:p>
      <text:p text:style-name="Text_20_body"><text:span text:style-name="T14">test "`ls -l /etc/group    |awk '{print $1}'`" != </text:span>"-r--r--r--" \</text:p>
      <text:p text:style-name="Text_20_body">    &amp;&amp; ls -l /etc/group    &gt;&gt; $DIR_LOG/maj_drt_fic</text:p>
      <text:p text:style-name="Text_20_body">test "`ls -l /etc/syslog.conf  |awk '{print $1}'`" != "-r--r--r--" \</text:p>
      <text:p text:style-name="Text_20_body">    &amp;&amp; ls -l /etc/syslog.conf  &gt;&gt; $DIR_LOG/maj_drt_fic</text:p>
      <text:p text:style-name="Text_20_body">test "`ls -l /etc/inetd.conf  |awk '{print $1}'`" != "-r--r--r--" \</text:p>
      <text:p text:style-name="Text_20_body">    &amp;&amp; ls -l /etc/inetd.conf  &gt;&gt; $DIR_LOG/maj_drt_fic</text:p>
      <text:p text:style-name="Text_20_body"><text:span text:style-name="T14">test "`ls -l /etc/hosts    |awk '{print $1}'`" != </text:span>"-r--r--r--" \</text:p>
      <text:p text:style-name="Text_20_body">    &amp;&amp; ls -l /etc/hosts    &gt;&gt; $DIR_LOG/maj_drt_fic</text:p>
      <text:p text:style-name="Text_20_body">test "`ls -l /etc/exports  |awk '{print $1}'`" != "-r--r--r--" \</text:p>
      <text:p text:style-name="Text_20_body">    &amp;&amp; ls -l /etc/exports  &gt;&gt; $DIR_LOG/maj_drt_fic</text:p>
      <text:p text:style-name="Text_20_body"><text:span text:style-name="T14">test "`ls -l /             |awk '{print $1}'`" != </text:span>"drwxr-xr-x" \</text:p>
      <text:p text:style-name="Text_20_body">    &amp;&amp; ls -l /             &gt;&gt; $DIR_LOG/maj_drt_fic</text:p>
      <text:p text:style-name="Text_20_body">test "`ls -l /etc          |awk '{print $1}'`" != "drwxr-xr-x" \</text:p>
      <text:p text:style-name="Text_20_body">    &amp;&amp; ls -l /etc          &gt;&gt; $DIR_LOG/maj_drt_fic</text:p>
      <text:p text:style-name="Text_20_body">test "`ls -l /etc/mail     |awk '{print $1}'`" != "drwxr-xr-x" \</text:p>
      <text:p text:style-name="Text_20_body">    &amp;&amp; ls -l /etc/mail     &gt;&gt; $DIR_LOG/maj_drt_fic</text:p>
      <text:p text:style-name="P2">test "`ls -l /stand        |awk '{print $1}'`" != "drwxr-xr-x" \</text:p>
      <text:p text:style-name="Text_20_body">    <text:span text:style-name="T14">&amp;&amp; ls -l /stand        &gt;&gt; $DIR_LOG/maj_drt_fic</text:span></text:p>
      <text:p text:style-name="P2">test "`ls -l /var          |awk '{print $1}'`" != "drwxr-xr-x" \</text:p>
      <text:p text:style-name="Text_20_body">    <text:span text:style-name="T14">&amp;&amp; ls -l /var          &gt;&gt; $DIR_LOG/maj_drt_fic</text:span></text:p>
      <text:p text:style-name="P2">test "`ls -l /usr          |awk '{print $1}'`" != "drwxr-xr-x" \</text:p>
      <text:p text:style-name="Text_20_body">    <text:span text:style-name="T14">&amp;&amp; ls -l /usr          &gt;&gt; $DIR_LOG/maj_drt_fic</text:span></text:p>
      <text:p text:style-name="P2">test "`ls -l /bin          |awk '{print $1}'`" != "drwxr-xr-x" \</text:p>
      <text:p text:style-name="Text_20_body">    <text:span text:style-name="T15">&amp;&amp; ls -l /bin          &gt;&gt; $DIR_LOG/maj_drt_fic</text:span></text:p>
      <text:p text:style-name="P2">test "`ls -l /usr/local/bin|awk '{print $1}'`" != "drwxr-xr-x" \</text:p>
      <text:p text:style-name="Text_20_body">    <text:span text:style-name="T14">&amp;&amp; ls -l /usr/local/bin&gt;&gt; $DIR_LOG/maj_drt_fic</text:span></text:p>
      <text:p text:style-name="Text_20_body"> </text:p>
      <text:p text:style-name="Text_20_body"># envoi mail a l administrateur unix si ce fichier n est pas vide</text:p>
      <text:p text:style-name="P2">if [ -s $DIR_LOG/cmp_drt_fic_sys ]</text:p>
      <text:p text:style-name="P2">then</text:p>
      <text:p text:style-name="Text_20_body"> </text:p>
      <text:p text:style-name="Text_20_body">   <text:span text:style-name="T14">echo "maj recente date fic sys"                     &gt;  $DIR_LOG/cmp_drt_fic_sys2</text:span></text:p>
      <text:p text:style-name="Text_20_body">   <text:span text:style-name="T14">echo "ou maj/ajout recent fic avec droit suid sgid" &gt;&gt; $DIR_LOG/cmp_drt_fic_sys2</text:span></text:p>
      <text:p text:style-name="Text_20_body">   <text:span text:style-name="T14">echo " " &gt;&gt; $DIR_LOG/cmp_drt_fic_sys2</text:span></text:p>
      <text:p text:style-name="Text_20_body">   <text:span text:style-name="T14">cat $DIR_LOG/cmp_drt_fic_sys                        &gt;&gt; $DIR_LOG/cmp_drt_fic_sys2</text:span></text:p>
      <text:p text:style-name="Text_20_body">   <text:span text:style-name="T14">MAIL_ADDR=benjamin.lisan@renault.com</text:span></text:p>
      <text:p text:style-name="Text_20_body">   <text:span text:style-name="T14">HOST=`uname -n`</text:span></text:p>
      <text:p text:style-name="Text_20_body">   <text:span text:style-name="T14">mailx -s "$HOST pb_securite" $MAIL_ADDR &lt; $DIR_LOG/cmp_drt_fic_sys2</text:span></text:p>
      <text:p text:style-name="P2">fi</text:p>
      <text:p text:style-name="Text_20_body"> </text:p>
      <text:p text:style-name="P2">mv $DIR_LOG/drt_fic_sys.prec $DIR_LOG/drt_fic_sys.old</text:p>
      <text:p text:style-name="P2">mv $DIR_LOG/drt_fic_sys.new  $DIR_LOG/drt_fic_sys.prec</text:p>
      <text:p text:style-name="P12"> </text:p>
      <text:p text:style-name="P13">#&gt;&gt;&gt;&gt;&gt;&gt;&gt;&gt;&gt;&gt;&gt;&gt;&gt;&gt;&gt;&gt;&gt;&gt;&gt;&gt;&gt;&gt;&gt;&gt;&gt;&gt;&gt;&gt;&gt;&gt;&gt;&gt;&gt;&gt;&gt;&gt;&gt;&gt;&gt;&gt;&gt;&gt;&gt;&gt;&gt;&gt;&gt;&gt;&gt;&gt;&gt;&gt;&gt;&gt;&gt;&gt;&gt;&gt;&gt;&gt;&gt;&gt;&gt;&gt;&gt;&gt;&gt;&gt;&gt;&gt;&gt;&gt;&gt;&gt;&gt;&gt;&gt;&gt;&gt;&gt;</text:p>
      <text:p text:style-name="P9">#!/bin/sh</text:p>
      <text:p text:style-name="P13"># variante du script ci-avant</text:p>
      <text:p text:style-name="P2">#-----------------------------------------------------------------------------</text:p>
      <text:p text:style-name="P2"># @(#) surv_securite</text:p>
      <text:p text:style-name="P2"># Nom / Name     : surv_securite</text:p>
      <text:p text:style-name="P2"># Type / Type    : job shell (UNIX)                                           </text:p>
      <text:p text:style-name="Text_20_body"># But / Aim      : 1) surveillance securite, que fichiers systeme pas droit</text:p>
      <text:p text:style-name="Text_20_body">#                     change</text:p>
      <text:p text:style-name="Text_20_body">#                  2) pas de nouveaux fichiers avec droit suid, sgid</text:p>
      <text:p text:style-name="Text_20_body"># Auteur / Author: Benjamin LISAN  -&gt;    date creation:  15/5/00</text:p>
      <text:p text:style-name="Text_20_body"># Usage / Usage  : surv_securite</text:p>
      <text:p text:style-name="Text_20_body"># Exemple / Ex.  : surv_securite                                           </text:p>
      <text:p text:style-name="Text_20_body"># Contexte / Co. : cron</text:p>
      <text:p text:style-name="Text_20_body"># Commentaires   : version pour HPUX 10.20</text:p>
      <text:p text:style-name="Text_20_body">#-----------------------------------------------------------------------------</text:p>
      <text:p text:style-name="Text_20_body">DIR_LOG=/usr/local/divers</text:p>
      <text:p text:style-name="Text_20_body">test ! -d $DIR_LOG &amp;&amp; mkdir $DIR_LOG</text:p>
      <text:p text:style-name="Text_20_body">test ! -f $DIR_LOG/drt_fic_sys.prec &amp;&amp;</text:p>
      <text:p text:style-name="Text_20_body">   <text:span text:style-name="T14">find / -type f \( -perm -2000 -o -perm 4000 \) -exec ls -l {} \; \</text:span></text:p>
      <text:p text:style-name="Text_20_body">      <text:span text:style-name="T14">&gt; $DIR_LOG/drt_fic_sys.prec</text:span></text:p>
      <text:p text:style-name="Text_20_body"> </text:p>
      <text:p text:style-name="P2">find / -type f \( -perm -2000 -o -perm 4000 \) -exec ls -l {} \; \</text:p>
      <text:p text:style-name="Text_20_body">   <text:span text:style-name="T14">&gt; $DIR_LOG/drt_fic_sys.new</text:span></text:p>
      <text:p text:style-name="Text_20_body"> </text:p>
      <text:p text:style-name="P2">diff $DIR_LOG/drt_fic_sys.prec $DIR_LOG/drt_fic_sys.new \</text:p>
      <text:p text:style-name="Text_20_body">  &gt; $DIR_LOG/cmp_drt_fic_sys</text:p>
      <text:p text:style-name="Text_20_body"> </text:p>
      <text:p text:style-name="Text_20_body"># envoi mail a l administrateur unix si ce fichier n est pas vide</text:p>
      <text:p text:style-name="P2">if [ -s $DIR_LOG/cmp_drt_fic_sys ]</text:p>
      <text:p text:style-name="P2">then</text:p>
      <text:p text:style-name="Text_20_body"> </text:p>
      <text:p text:style-name="Text_20_body">   <text:span text:style-name="T14">echo "maj recente date fic sys"                     &gt;  $DIR_LOG/cmp_drt_fic_sys2</text:span></text:p>
      <text:p text:style-name="Text_20_body">   <text:span text:style-name="T14">echo "ou maj/ajout recent fic avec droit suid sgid" &gt;&gt; $DIR_LOG/cmp_drt_fic_sys2</text:span></text:p>
      <text:p text:style-name="Text_20_body">   <text:span text:style-name="T14">echo " " &gt;&gt; $DIR_LOG/cmp_drt_fic_sys2</text:span></text:p>
      <text:p text:style-name="Text_20_body">   <text:span text:style-name="T14">cat $DIR_LOG/cmp_drt_fic_sys                        &gt;&gt; $DIR_LOG/cmp_drt_fic_sys2</text:span></text:p>
      <text:p text:style-name="Text_20_body">   <text:span text:style-name="T14">MAIL_ADDR=benjamin.lisan@renault.com</text:span></text:p>
      <text:p text:style-name="Text_20_body">   <text:span text:style-name="T14">HOST=`uname -n`</text:span></text:p>
      <text:p text:style-name="Text_20_body">   <text:span text:style-name="T14">mailx -s "$HOST `whoami`" $MAIL_ADDR &lt; $DIR_LOG/cmp_drt_fic_sys2</text:span></text:p>
      <text:p text:style-name="P2">fi</text:p>
      <text:p text:style-name="Text_20_body"> </text:p>
      <text:p text:style-name="P2">mv $DIR_LOG/drt_fic_sys.prec $DIR_LOG/drt_fic_sys.old</text:p>
      <text:p text:style-name="P2">mv $DIR_LOG/drt_fic_sys.new  $DIR_LOG/drt_fic_sys.prec</text:p>
      <text:p text:style-name="P12"> </text:p>
      <text:p text:style-name="P13">#&gt;&gt;&gt;&gt;&gt;&gt;&gt;&gt;&gt;&gt;&gt;&gt;&gt;&gt;&gt;&gt;&gt;&gt;&gt;&gt;&gt;&gt;&gt;&gt;&gt;&gt;&gt;&gt;&gt;&gt;&gt;&gt;&gt;&gt;&gt;&gt;&gt;&gt;&gt;&gt;&gt;&gt;&gt;&gt;&gt;&gt;&gt;&gt;&gt;&gt;&gt;&gt;&gt;&gt;&gt;&gt;&gt;&gt;&gt;&gt;&gt;&gt;&gt;&gt;&gt;&gt;&gt;&gt;&gt;&gt;&gt;&gt;&gt;&gt;&gt;&gt;&gt;&gt;&gt;&gt;</text:p>
      <text:p text:style-name="P18"> </text:p>
      <text:h text:style-name="P22" text:outline-level="1"><text:bookmark text:name="_Toc89775641"/>56<text:span text:style-name="T1">     </text:span>Script de surveillance de la swap (SUN)</text:h>
      <text:p text:style-name="Text_20_body"> </text:p>
      <text:p text:style-name="P2">#!/sbin/sh</text:p>
      <text:p text:style-name="P2">#-----------------------------------------------------------------------------</text:p>
      <text:p text:style-name="P2"># @(#) surv_swap_sun</text:p>
      <text:p text:style-name="P2"># Nom / Name     : surv_swap_sun</text:p>
      <text:p text:style-name="P2"># Type / Type    : job shell (UNIX)                                           </text:p>
      <text:p text:style-name="Text_20_body"># But / Aim      : alerte si memoire ou swap prim/secondaire &gt;= a 95 %</text:p>
      <text:p text:style-name="Text_20_body"># Auteur / Author: Benjamin LISAN  -&gt;    date creation:  01-AUG-90            </text:p>
      <text:p text:style-name="Text_20_body"># Usage / Usage  : surv_swap_sun</text:p>
      <text:p text:style-name="Text_20_body"># Exemple / Ex.  : surv_swap_sun</text:p>
      <text:p text:style-name="Text_20_body"># Contexte / Co. : cron</text:p>
      <text:p text:style-name="Text_20_body"># Commentaires   : version pour Solaris 2.6</text:p>
      <text:p text:style-name="P2">#-----------------------------------------------------------------------------</text:p>
      <text:p text:style-name="P2">si_swap_sup_90_then_mail()</text:p>
      <text:p text:style-name="P2">{</text:p>
      <text:p text:style-name="Text_20_body">    <text:span text:style-name="T14">siz=$1</text:span></text:p>
      <text:p text:style-name="Text_20_body">    <text:span text:style-name="T14">echo "`date` swap &gt;= a $siz %" | tee -a /tmp/swapfull$$</text:span></text:p>
      <text:p text:style-name="Text_20_body">    <text:span text:style-name="T14">echo "`date` swap &gt;= a $siz %" &gt;&gt; /var/adm/log/survswap.log</text:span></text:p>
      <text:p text:style-name="Text_20_body">    # reroutage du message d'alerte dans la mailbox de l'administrateur UNIX</text:p>
      <text:p text:style-name="Text_20_body">    MAIL_ADDR=benjamin.lisan-tmaservices@renault.com</text:p>
      <text:p text:style-name="Text_20_body">    #MAIL_ADDR=root@mlbadm.mlb.renault.fr</text:p>
      <text:p text:style-name="Text_20_body">    #MAIL_ADDR=Olivier.Cornic@renault.com</text:p>
      <text:p text:style-name="Text_20_body">    <text:span text:style-name="T14">test -f /tmp/swapfull$$ &amp;&amp; mailx -s "`uname -n` swap_full" $MAIL_ADDR &lt; /tmp/swapfull$$</text:span></text:p>
      <text:p text:style-name="Text_20_body">    <text:span text:style-name="T14">rm -f /tmp/swapfull$$ 2&gt; /dev/null</text:span></text:p>
      <text:p text:style-name="P2">}</text:p>
      <text:p text:style-name="Text_20_body"> </text:p>
      <text:p text:style-name="P2">i=0</text:p>
      <text:p text:style-name="P2">for siz in `swap -l|grep -v free | awk '{p=(1 - $5/$4)*100; print p}'`</text:p>
      <text:p text:style-name="P2">do</text:p>
      <text:p text:style-name="Text_20_body">  <text:span text:style-name="T14">#echo  "siz= $siz i=$i"</text:span></text:p>
      <text:p text:style-name="Text_20_body">  <text:span text:style-name="T14">test $i -ge 0 &amp;&amp; test $siz -gt 95 &amp;&amp; si_swap_sup_90_then_mail $siz</text:span></text:p>
      <text:p text:style-name="Text_20_body">  <text:span text:style-name="T14">#echo "i=$i , siz=$siz"</text:span></text:p>
      <text:p text:style-name="Text_20_body">  <text:span text:style-name="T14">i=`expr $i + 1`</text:span></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2"/>57<text:span text:style-name="T1">     </text:span>Script de surveillance de la saturation des disques (HP)</text:h>
      <text:p text:style-name="Text_20_body"> </text:p>
      <text:p text:style-name="P13"># test si capa des disques est pleine (version pour HP).</text:p>
      <text:p text:style-name="P12"> </text:p>
      <text:p text:style-name="P2">for `bdf|grep -v capacity| awk '{print $5}' | sed "s:%::"`</text:p>
      <text:p text:style-name="P2">do</text:p>
      <text:p text:style-name="Text_20_body">  <text:span text:style-name="T14">if [ "$val" -gt "96" ]</text:span></text:p>
      <text:p text:style-name="Text_20_body">  <text:span text:style-name="T14">then</text:span></text:p>
      <text:p text:style-name="Text_20_body">     <text:span text:style-name="T14">val=`bdf|grep -v capacity| awk '{print $5}' | sed "s:%::"`</text:span></text:p>
      <text:p text:style-name="Text_20_body">     <text:span text:style-name="T14">part=`bdf|grep -v capacity| awk '{print $6}'`</text:span></text:p>
      <text:p text:style-name="Text_20_body">     echo "partition $part &gt; $val"</text:p>
      <text:p text:style-name="Text_20_body">done</text:p>
      <text:p text:style-name="P12"> </text:p>
      <text:p text:style-name="P13">#&gt;&gt;&gt;&gt;&gt;&gt;&gt;&gt;&gt;&gt;&gt;&gt;&gt;&gt;&gt;&gt;&gt;&gt;&gt;&gt;&gt;&gt;&gt;&gt;&gt;&gt;&gt;&gt;&gt;&gt;&gt;&gt;&gt;&gt;&gt;&gt;&gt;&gt;&gt;&gt;&gt;&gt;&gt;&gt;&gt;&gt;&gt;&gt;&gt;&gt;&gt;&gt;&gt;&gt;&gt;&gt;&gt;&gt;&gt;&gt;&gt;&gt;&gt;&gt;&gt;&gt;&gt;&gt;&gt;&gt;&gt;&gt;&gt;&gt;&gt;&gt;&gt;&gt;&gt;&gt;</text:p>
      <text:h text:style-name="P26" text:outline-level="1"><text:bookmark text:name="_Toc89775643"/>58<text:span text:style-name="T1">     </text:span>Exemple de script calculant le top 50 Mo des applications, les plus consommatrices (Sun)</text:h>
      <text:p text:style-name="P12"> </text:p>
      <text:p text:style-name="Text_20_body"># calcule le top 50 Mo des appl.les + consommatrices dans le repertoire /appli</text:p>
      <text:p text:style-name="Text_20_body"> </text:p>
      <text:p text:style-name="P2">test -f /tmp/top_50_dsk &amp;&amp; mv /tmp/top_50_dsk /tmp/top_50_dsk.old</text:p>
      <text:p text:style-name="Text_20_body">cd /appli</text:p>
      <text:p text:style-name="Text_20_body">echo "occupation disque de `pwd` sur `uname -n` sem.`date '+%W'` :" &gt;&gt; /tmp/top_50_dsk</text:p>
      <text:p text:style-name="P2">echo "-----------------------------------------"   &gt;&gt; /tmp/top_50_dsk</text:p>
      <text:p text:style-name="P2">echo " "                                           &gt;&gt; /tmp/top_50_dsk</text:p>
      <text:p text:style-name="Text_20_body"> </text:p>
      <text:p text:style-name="P2">echo "app\ttaille Mo" &gt; /tmp/top_50_dsk</text:p>
      <text:p text:style-name="P2">echo "---\t---------" &gt;&gt; /tmp/top_50_dsk</text:p>
      <text:p text:style-name="P2">du -s * |sort -rn| awk '{print $2 "\t" $1/2000 }' &gt;&gt; /tmp/top_50_dsk</text:p>
      <text:p text:style-name="P2">cat /tmp/top_50_dsk</text:p>
      <text:p text:style-name="Text_20_body"># reroutage du message d'alerte dans la mailbox de l'administrateur UNIX</text:p>
      <text:p text:style-name="Text_20_body">MAIL_ADDR=benjamin.lisan@toto.com</text:p>
      <text:p text:style-name="P2">test -f /tmp/top_50_dsk &amp;&amp; mailx -s "`uname -n` `/usr/ucb/whoami`" $MAIL_ADDR &lt; /tmp/top_50_dsk</text:p>
      <text:p text:style-name="P2">#rm -f /tmp/top_50_dsk 2&gt; /dev/null</text:p>
      <text:p text:style-name="P12"> </text:p>
      <text:p text:style-name="P13">#&gt;&gt;&gt;&gt;&gt;&gt;&gt;&gt;&gt;&gt;&gt;&gt;&gt;&gt;&gt;&gt;&gt;&gt;&gt;&gt;&gt;&gt;&gt;&gt;&gt;&gt;&gt;&gt;&gt;&gt;&gt;&gt;&gt;&gt;&gt;&gt;&gt;&gt;&gt;&gt;&gt;&gt;&gt;&gt;&gt;&gt;&gt;&gt;&gt;&gt;&gt;&gt;&gt;&gt;&gt;&gt;&gt;&gt;&gt;&gt;&gt;&gt;&gt;&gt;&gt;&gt;&gt;&gt;&gt;&gt;&gt;&gt;&gt;&gt;&gt;&gt;&gt;&gt;&gt;&gt;</text:p>
      <text:p text:style-name="P13"># variante du script ci-avant</text:p>
      <text:p text:style-name="P12"> </text:p>
      <text:p text:style-name="Text_20_body"># calcule le top 50 Mo des appl.les + consommatrices dans /intg</text:p>
      <text:p text:style-name="P2">#</text:p>
      <text:p text:style-name="P2">test -f /tmp/top_50_dsk &amp;&amp; mv /tmp/top_50_dsk /tmp/top_50_dsk.old</text:p>
      <text:p text:style-name="P2">test -f /tmp/top_50_app &amp;&amp; mv /tmp/top_50_app /tmp/top_50_app.old</text:p>
      <text:p text:style-name="P2">cd /intg</text:p>
      <text:p text:style-name="Text_20_body"> </text:p>
      <text:p text:style-name="P2">echo "occupation disque de `pwd` sur `uname -n` sem.`date '+%W'` :" |tee -a /tmp/top_50_app</text:p>
      <text:p text:style-name="P2">echo "-----------------------------------------"   |tee -a /tmp/top_50_app</text:p>
      <text:p text:style-name="P2">echo " "                                           |tee -a /tmp/top_50_app</text:p>
      <text:p text:style-name="P2">echo "appli\ttaille Mo"                         |tee -a /tmp/top_50_app</text:p>
      <text:p text:style-name="P2">echo "-----\t---------"                         |tee -a /tmp/top_50_app</text:p>
      <text:p text:style-name="Text_20_body"> </text:p>
      <text:p text:style-name="P2">du -s * |sort -nr| awk '{print $2 "\t" int($1/2000) }'  &gt;  /tmp/top_50_dsk</text:p>
      <text:p text:style-name="P2">#cat /tmp/top_50_dsk</text:p>
      <text:p text:style-name="Text_20_body"> </text:p>
      <text:p text:style-name="P2">vol=0</text:p>
      <text:p text:style-name="P2">for volcarn in `cat /tmp/top_50_dsk |grep carn| awk '{print int($2)}'`</text:p>
      <text:p text:style-name="P7">do</text:p>
      <text:p text:style-name="Text_20_body">   <text:span text:style-name="T17">vol=`expr $volcarn + $vol`</text:span></text:p>
      <text:p text:style-name="P2">done</text:p>
      <text:p text:style-name="P2">echo "carnets\t$vol" |tee -a /tmp/top_50_app</text:p>
      <text:p text:style-name="Text_20_body"> </text:p>
      <text:p text:style-name="P2">vol=0</text:p>
      <text:p text:style-name="P2">for volpilo in `cat /tmp/top_50_dsk |grep pilo| awk '{print int($2)}'`</text:p>
      <text:p text:style-name="P2">do</text:p>
      <text:p text:style-name="Text_20_body">   <text:span text:style-name="T14">vol=`expr $volpilo + $vol`</text:span></text:p>
      <text:p text:style-name="P2">done</text:p>
      <text:p text:style-name="P2">echo "pilotag\t$vol" |tee -a /tmp/top_50_app</text:p>
      <text:p text:style-name="Text_20_body"> </text:p>
      <text:p text:style-name="P2">vol=0</text:p>
      <text:p text:style-name="P2">for voldec in `cat /tmp/top_50_dsk |grep dec| awk '{print int($2)}'`</text:p>
      <text:p text:style-name="P7">do</text:p>
      <text:p text:style-name="Text_20_body">   <text:span text:style-name="T17">vol=`expr $voldec + $vol`</text:span></text:p>
      <text:p text:style-name="P2">done</text:p>
      <text:p text:style-name="P2">echo "decoupe\t$vol" |tee -a /tmp/top_50_app</text:p>
      <text:p text:style-name="Text_20_body"> </text:p>
      <text:p text:style-name="P2">cat /tmp/top_50_dsk|grep -v pilo|grep -v carn|\</text:p>
      <text:p text:style-name="Text_20_body">    <text:span text:style-name="T14">grep -v dec|grep -v NULL| grep -v lost|grep -v oc|grep -v TT|\</text:span></text:p>
      <text:p text:style-name="Text_20_body">    <text:span text:style-name="T14">grep -v saphir2| grep -v divers| tee -a /tmp/top_50_app</text:span></text:p>
      <text:p text:style-name="Text_20_body"> </text:p>
      <text:p text:style-name="Text_20_body"># reroutage du message d'alerte dans la mailbox de l'administrateur UNIX</text:p>
      <text:p text:style-name="Text_20_body">MAIL_ADDR=benjamin.lisan-tmaservices@renault.com</text:p>
      <text:p text:style-name="Text_20_body">#MAIL_ADDR=root@mlbadm.mlb.renault.fr</text:p>
      <text:p text:style-name="Text_20_body">#MAIL_ADDR=Olivier.Cornic@renault.com</text:p>
      <text:p text:style-name="P2">test -f /tmp/top_50_app &amp;&amp; mailx -s "`uname -n` top_50_place_disque" $MAIL_ADDR &lt; /tmp/top_50_app</text:p>
      <text:p text:style-name="Text_20_body"> </text:p>
      <text:p text:style-name="P2">#rm -f /tmp/top_50_dsk 2&gt; /dev/null</text:p>
      <text:p text:style-name="P2">#rm -f /tmp/top_50_app 2&gt; /dev/null</text:p>
      <text:p text:style-name="Text_20_body">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4"/><text:span text:style-name="T7">59</text:span><text:span text:style-name="T2">      </text:span>script pour tester la connexion avec les machines listées dans le fichier hosts</text:h>
      <text:p text:style-name="P12"> </text:p>
      <text:p text:style-name="Text_20_body"># ping_ux : script pour tester la connexion avec les machines listees dans le fichier hosts :</text:p>
      <text:p text:style-name="P2">for mach in `cat /etc/hosts|grep -v ^$|grep -v "^#"|awk '{print $2}'`</text:p>
      <text:p text:style-name="P2">do</text:p>
      <text:p text:style-name="Text_20_body">  <text:span text:style-name="T14">echo "$mach : \c"</text:span></text:p>
      <text:p text:style-name="Text_20_body">  <text:span text:style-name="T14">ping $mach 64 1 | head -1</text:span></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5"/>60<text:span text:style-name="T1">     </text:span>script de test de la commande mailx sur une machine donnee</text:h>
      <text:p text:style-name="P12"> </text:p>
      <text:p text:style-name="P13">#@ testmail : test de la commande mailx sur une machine donnee</text:p>
      <text:p text:style-name="P12"> </text:p>
      <text:p text:style-name="Text_20_body">MAIL_ADDR=benjamin.lisan@toto.com</text:p>
      <text:p text:style-name="P2">#mailx -s "`uname -n` `whoami`" $MAIL_ADDR &lt; /tmp/ficmail</text:p>
      <text:p text:style-name="P2">HOST=`uname -n`</text:p>
      <text:p text:style-name="P2">mailx -s "$HOST `whoami`" $MAIL_ADDR &lt;&lt; %%</text:p>
      <text:p text:style-name="Text_20_body">test mailx sur $HOST</text:p>
      <text:p text:style-name="Text_20_body">B.LISAN</text:p>
      <text:p text:style-name="Text_20_body">%%</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6"/>61<text:span text:style-name="T1">     </text:span>script de vérification du lancement du serveur http Netscape (sur Sun)</text:h>
      <text:p text:style-name="P12"> </text:p>
      <text:p text:style-name="P3">#!/sbin/sh</text:p>
      <text:p text:style-name="P3">#-----------------------------------------------------------------------------</text:p>
      <text:p text:style-name="P3"># @(#) verif_app_http</text:p>
      <text:p text:style-name="P3"># Nom / Name     : verif_app_http</text:p>
      <text:p text:style-name="P2"># Type / Type    : job shell (UNIX)                                           </text:p>
      <text:p text:style-name="Text_20_body"># But / Aim      : verif presence appli. netscape serveur http</text:p>
      <text:p text:style-name="Text_20_body"># Auteur / Author: Benjamin LISAN  -&gt;    date creation: 25/5/00</text:p>
      <text:p text:style-name="Text_20_body">#                                                                             </text:p>
      <text:p text:style-name="Text_20_body"># Usage / Usage  : verif_app_http</text:p>
      <text:p text:style-name="Text_20_body"># Exemple / Ex.  : "verif_app_http"                                           </text:p>
      <text:p text:style-name="Text_20_body"># Contexte / Co. : cron</text:p>
      <text:p text:style-name="Text_20_body"># Commentaires   : version pour machine SUN (et SOLARIS)</text:p>
      <text:p text:style-name="Text_20_body">#-----------------------------------------------------------------------------</text:p>
      <text:p text:style-name="Text_20_body">PATH=/usr/bin:/usr/sbin:/sbin:/home/root:/usr/local/bin:.:$PATH</text:p>
      <text:p text:style-name="Text_20_body"># liste des appli. netscape de la machine SUN</text:p>
      <text:p text:style-name="Text_20_body">list_proc="./uxwdog ns-httpd"</text:p>
      <text:p text:style-name="P2">nb_proc=`echo $list_proc|wc -w`</text:p>
      <text:p text:style-name="P2">#for appli in `ls -ld /appli/ns*|sed "s:.*appli/ns::"`</text:p>
      <text:p text:style-name="P2">for appli in `ls -d /logiciel/netscape/suitespot3.6/https-*|sed "s:.*https-::"`</text:p>
      <text:p text:style-name="P2">do</text:p>
      <text:p text:style-name="Text_20_body">   <text:span text:style-name="T14">cpt_proc=0</text:span></text:p>
      <text:p text:style-name="Text_20_body">   <text:span text:style-name="T14">for proc in `echo "$list_proc"`</text:span></text:p>
      <text:p text:style-name="Text_20_body">   <text:span text:style-name="T14">do</text:span></text:p>
      <text:p text:style-name="Text_20_body">     <text:span text:style-name="T14">ps -ef|grep $appli | grep $proc &gt; /dev/null</text:span></text:p>
      <text:p text:style-name="Text_20_body">     <text:span text:style-name="T14">test $? = 0 &amp;&amp; cpt_proc=`expr $cpt_proc + 1`</text:span></text:p>
      <text:p text:style-name="Text_20_body">   <text:span text:style-name="T14">done</text:span></text:p>
      <text:p text:style-name="Text_20_body">   </text:p>
      <text:p text:style-name="Text_20_body">   <text:span text:style-name="T14">if [ $cpt_proc -eq $nb_proc ]</text:span></text:p>
      <text:p text:style-name="Text_20_body">   <text:span text:style-name="T14">then</text:span></text:p>
      <text:p text:style-name="Text_20_body">      <text:span text:style-name="T14">echo "lancement appli netscape http $appli : OK ($cpt_proc proc)"</text:span></text:p>
      <text:p text:style-name="Text_20_body">   <text:span text:style-name="T14">else</text:span></text:p>
      <text:p text:style-name="Text_20_body">      <text:span text:style-name="T14">rm -f  /tmp/lancehttp.log &gt; /dev/null</text:span></text:p>
      <text:p text:style-name="Text_20_body">      <text:span text:style-name="T14">echo "lancement appli netscape http $appli : KO !!! ($cpt_proc proc)"|tee -a /tmp/lancehttp.log</text:span></text:p>
      <text:p text:style-name="Text_20_body">      <text:span text:style-name="T14">MAIL_ADDR=benjamin.lisan-tmaservices@renault.com</text:span></text:p>
      <text:p text:style-name="Text_20_body">      <text:span text:style-name="T14">mailx -s "`uname -n` lancment_appli_nestscape" $MAIL_ADDR &lt; /tmp/lancehttp.log</text:span></text:p>
      <text:p text:style-name="Text_20_body">   fi</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7"/>62<text:span text:style-name="T1">     </text:span>script de vérification du lancement des bases Oracle (sur machine SUN)</text:h>
      <text:p text:style-name="P12"> </text:p>
      <text:p text:style-name="P2">#!/sbin/sh</text:p>
      <text:p text:style-name="P2">#-----------------------------------------------------------------------------</text:p>
      <text:p text:style-name="P2"># @(#) verif_base_ora</text:p>
      <text:p text:style-name="P2"># Nom / Name     : verif_base_ora</text:p>
      <text:p text:style-name="P2"># Type / Type    : job shell (UNIX)                                           </text:p>
      <text:p text:style-name="P2"># But / Aim      : verif presence base oracle</text:p>
      <text:p text:style-name="P2"># Auteur / Author: Benjamin LISAN  -&gt;    date creation: 26/4/00</text:p>
      <text:p text:style-name="P2">#                                                                             </text:p>
      <text:p text:style-name="P2"># Usage / Usage  : verif_base_ora</text:p>
      <text:p text:style-name="P2"># Exemple / Ex.  : "verif_base_ora"                                           </text:p>
      <text:p text:style-name="Text_20_body"># Contexte / Co. : cron</text:p>
      <text:p text:style-name="Text_20_body"># Commentaires   : version pour machine SUN (SOLARIS)</text:p>
      <text:p text:style-name="Text_20_body">#-----------------------------------------------------------------------------</text:p>
      <text:p text:style-name="Text_20_body">PATH=/usr/bin:/usr/sbin:/sbin:/home/root:/usr/local/bin:.:$PATH</text:p>
      <text:p text:style-name="Text_20_body"># liste des bases oracle de la machine SUN</text:p>
      <text:p text:style-name="Text_20_body"># liste obtenue par la commande :</text:p>
      <text:p text:style-name="Text_20_body"># ps -ef|grep ora_pmon|grep -v grep| sed "s/.*ora_pmon_//"|grep -v "//"</text:p>
      <text:p text:style-name="P2">for SID in coac C barco # ALUR  : on a inhibe la base ALUR-WINCAP</text:p>
      <text:p text:style-name="P2">do</text:p>
      <text:p text:style-name="Text_20_body">   <text:span text:style-name="T14">VERS=`grep "^$SID:" /var/opt/oracle/oratab|grep -v "#"|sed -e "s:.*oracle_::" -e "s/:Y//" -e "s/:N//"`</text:span></text:p>
      <text:p text:style-name="Text_20_body">   <text:span text:style-name="T14">case $VERS in</text:span></text:p>
      <text:p text:style-name="Text_20_body">   <text:span text:style-name="T14">806)  # liste process residents base oracle</text:span></text:p>
      <text:p text:style-name="Text_20_body">         <text:span text:style-name="T14">list_proc="pmon dbw0 lgwr ckpt smon reco s000 d000 d001 d002"</text:span></text:p>
      <text:p text:style-name="Text_20_body">         <text:span text:style-name="T14">nb_proc=10 ;;</text:span></text:p>
      <text:p text:style-name="Text_20_body">   <text:span text:style-name="T14">734)  list_proc="dbwr pmon reco lgwr ckpt smon"</text:span></text:p>
      <text:p text:style-name="Text_20_body">         <text:span text:style-name="T14">nb_proc=6 ;;</text:span></text:p>
      <text:p text:style-name="Text_20_body">   <text:span text:style-name="T14">7162) list_proc="dbwr pmon lgwr ckpt smon"</text:span></text:p>
      <text:p text:style-name="Text_20_body">         nb_proc=5 ;;</text:p>
      <text:p text:style-name="Text_20_body">   *)    echo "base $SID non homologue VERS=$VERS"</text:p>
      <text:p text:style-name="Text_20_body">         exit 1 ;;</text:p>
      <text:p text:style-name="Text_20_body">   esac</text:p>
      <text:p text:style-name="Text_20_body"> </text:p>
      <text:p text:style-name="Text_20_body">   cpt_proc=0</text:p>
      <text:p text:style-name="Text_20_body">   <text:span text:style-name="T14">for proc in `echo "$list_proc"`</text:span></text:p>
      <text:p text:style-name="Text_20_body">   <text:span text:style-name="T14">do</text:span></text:p>
      <text:p text:style-name="Text_20_body">     <text:span text:style-name="T14">ps -ef|grep "ora_${proc}_${SID}" &gt; /dev/null</text:span></text:p>
      <text:p text:style-name="Text_20_body">     <text:span text:style-name="T14">test $? = 0 &amp;&amp; cpt_proc=`expr $cpt_proc + 1`</text:span></text:p>
      <text:p text:style-name="Text_20_body">   <text:span text:style-name="T14">done</text:span></text:p>
      <text:p text:style-name="Text_20_body">   </text:p>
      <text:p text:style-name="Text_20_body">   <text:span text:style-name="T14">if [ $cpt_proc -eq $nb_proc ]</text:span></text:p>
      <text:p text:style-name="Text_20_body">   then</text:p>
      <text:p text:style-name="Text_20_body">      # ce test evite que le message soit affiche si le script est utilise dans un cron</text:p>
      <text:p text:style-name="Text_20_body">      #test `tty` &amp;&amp; echo "lancement base oracle $SID (vers:$VERS) : OK ($cpt_proc proc)"</text:p>
      <text:p text:style-name="Text_20_body">   else</text:p>
      <text:p text:style-name="Text_20_body">      echo "lancement base oracle $SID (vers:$VERS) : KO !! ($cpt_proc proc)"</text:p>
      <text:p text:style-name="Text_20_body">      MAIL_ADDR=benjamin.lisan-tmaservices@renault.com</text:p>
      <text:p text:style-name="Text_20_body">      <text:span text:style-name="T14">mailx -s "`uname -n` `whoami`" $MAIL_ADDR &lt;&lt; %%</text:span></text:p>
      <text:p text:style-name="Text_20_body">base oracle $SID non lancee !!</text:p>
      <text:p text:style-name="Text_20_body">%%</text:p>
      <text:p text:style-name="Text_20_body">   fi</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8"/>63<text:span text:style-name="T1">     </text:span>script de vérification du lancement des bases Oracle (sur machine HP)</text:h>
      <text:p text:style-name="Text_20_body"> </text:p>
      <text:p text:style-name="P2">#!/sbin/sh</text:p>
      <text:p text:style-name="P2">#-----------------------------------------------------------------------------</text:p>
      <text:p text:style-name="P2"># @(#) verif_base_ora</text:p>
      <text:p text:style-name="P2"># Nom / Name     : verif_base_ora</text:p>
      <text:p text:style-name="P2"># Type / Type    : job shell (UNIX)                                           </text:p>
      <text:p text:style-name="P2"># But / Aim      : verif presence base oracle</text:p>
      <text:p text:style-name="P2"># Auteur / Author: Benjamin LISAN  -&gt;    date creation: 26/4/00</text:p>
      <text:p text:style-name="P2">#                                                                             </text:p>
      <text:p text:style-name="P2"># Usage / Usage  : verif_base_ora</text:p>
      <text:p text:style-name="P2"># Exemple / Ex.  : "verif_base_ora"                                           </text:p>
      <text:p text:style-name="Text_20_body"># Contexte / Co. : cron</text:p>
      <text:p text:style-name="Text_20_body"># Commentaires   : version pour machine HP (HPUX)</text:p>
      <text:p text:style-name="Text_20_body">#-----------------------------------------------------------------------------</text:p>
      <text:p text:style-name="Text_20_body">PATH=/usr/bin:/usr/sbin:/sbin:/home/root:/usr/local/bin:.:$PATH</text:p>
      <text:p text:style-name="Text_20_body"># liste des bases oracle de la machine HP</text:p>
      <text:p text:style-name="Text_20_body"># liste obtenue par la commande :</text:p>
      <text:p text:style-name="Text_20_body"># ps -ef|grep ora_pmon|grep -v grep| sed "s/.*ora_pmon_//"|grep -v "//"</text:p>
      <text:p text:style-name="Text_20_body">for SID in annu gemd sumeq gemr gemo siam ciraf orus PAM barco gbq c str</text:p>
      <text:p text:style-name="P2">do</text:p>
      <text:p text:style-name="Text_20_body">   <text:span text:style-name="T14">cpt_proc=0</text:span></text:p>
      <text:p text:style-name="Text_20_body">   <text:span text:style-name="T14">VERS=`grep "^$SID:" /etc/oratab|grep -v "#"|sed -e "s:.*oracle_::" -e "s/:Y//" -e "s/:N//"`</text:span></text:p>
      <text:p text:style-name="Text_20_body">   <text:span text:style-name="T14">case $VERS in</text:span></text:p>
      <text:p text:style-name="Text_20_body">   <text:span text:style-name="T14">806)  # liste process residents base oracle</text:span></text:p>
      <text:p text:style-name="Text_20_body">         <text:span text:style-name="T14">list_proc="pmon dbw0 lgwr ckpt smon reco s000 d000 d001 d002"</text:span></text:p>
      <text:p text:style-name="Text_20_body">         <text:span text:style-name="T14">nb_proc=10 ;;</text:span></text:p>
      <text:p text:style-name="Text_20_body">   <text:span text:style-name="T14">734)  list_proc="dbwr pmon reco lgwr ckpt smon"</text:span></text:p>
      <text:p text:style-name="Text_20_body">         <text:span text:style-name="T14">nb_proc=6 ;;</text:span></text:p>
      <text:p text:style-name="Text_20_body">   <text:span text:style-name="T14">7162) list_proc="dbwr pmon lgwr ckpt smon"</text:span></text:p>
      <text:p text:style-name="Text_20_body">         nb_proc=5 ;;</text:p>
      <text:p text:style-name="Text_20_body">   *)    echo "base $SID non homologue VERS=$VERS"</text:p>
      <text:p text:style-name="Text_20_body">         <text:span text:style-name="T14">exit 1 ;;</text:span></text:p>
      <text:p text:style-name="Text_20_body">   <text:span text:style-name="T14">esac</text:span></text:p>
      <text:p text:style-name="Text_20_body"> </text:p>
      <text:p text:style-name="Text_20_body">   <text:span text:style-name="T14">for proc in `echo "$list_proc"`</text:span></text:p>
      <text:p text:style-name="Text_20_body">   <text:span text:style-name="T14">do</text:span></text:p>
      <text:p text:style-name="Text_20_body">     <text:span text:style-name="T14">ps -ef|grep "ora_${proc}_${SID}" &gt; /dev/null</text:span></text:p>
      <text:p text:style-name="Text_20_body">     <text:span text:style-name="T14">test $? -eq 0 &amp;&amp; cpt_proc=`expr $cpt_proc + 1`</text:span></text:p>
      <text:p text:style-name="Text_20_body">   done</text:p>
      <text:p text:style-name="Text_20_body">   #echo "nb_proc=$nb_proc VERS=$VERS cpt_proc=$cpt_proc"</text:p>
      <text:p text:style-name="Text_20_body">   <text:span text:style-name="T14">if [ $cpt_proc -eq $nb_proc ]</text:span></text:p>
      <text:p text:style-name="Text_20_body">   then</text:p>
      <text:p text:style-name="Text_20_body">      echo "lancement base oracle $SID (vers:$VERS) : OK ($cpt_proc proc)"</text:p>
      <text:p text:style-name="Text_20_body">      # ce test evite que le message soit affiche si le script est utilise dans un cron</text:p>
      <text:p text:style-name="Text_20_body">      #test `tty` &amp;&amp; echo "lancement base oracle $SID (vers:$VERS) : OK ($cpt_proc proc)"</text:p>
      <text:p text:style-name="Text_20_body">   else</text:p>
      <text:p text:style-name="Text_20_body">      echo "lancement base oracle $SID (vers:$VERS) : KO !! ($cpt_proc proc)"</text:p>
      <text:p text:style-name="Text_20_body">      MAIL_ADDR=benjamin.lisan-tmaservices@renault.com</text:p>
      <text:p text:style-name="Text_20_body">      <text:span text:style-name="T14">mailx -s "`uname -n` `whoami`" $MAIL_ADDR &lt;&lt; %%</text:span></text:p>
      <text:p text:style-name="Text_20_body">base oracle $SID non lancee !!</text:p>
      <text:p text:style-name="Text_20_body">%%</text:p>
      <text:p text:style-name="Text_20_body">   fi</text:p>
      <text:p text:style-name="Text_20_body">don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49"/>64<text:span text:style-name="T1">     </text:span>script de vérification des processus occupant trop de mémoire et cpu (sur HP)</text:h>
      <text:p text:style-name="Text_20_body"> </text:p>
      <text:p text:style-name="P2">#!/sbin/sh</text:p>
      <text:p text:style-name="P2">#-----------------------------------------------------------------------------</text:p>
      <text:p text:style-name="P2"># @(#) verif_occup_cpu_hp</text:p>
      <text:p text:style-name="P2"># Nom / Name     :  verif_occup_cpu_hp</text:p>
      <text:p text:style-name="P2"># Type / Type    : job shell (UNIX)                                           </text:p>
      <text:p text:style-name="Text_20_body"># But / Aim      : recherche ce qui occupe trop de cpu ou trop de memoire</text:p>
      <text:p text:style-name="Text_20_body">#                  ou qui a trop d'occurence du meme job en memoire</text:p>
      <text:p text:style-name="Text_20_body"># Auteur / Author: Benjamin LISAN  -&gt;    date creation:  01/03/1999</text:p>
      <text:p text:style-name="Text_20_body"># Usage / Usage  : verif_occup_cpu_hp</text:p>
      <text:p text:style-name="Text_20_body"># Exemple / Ex.  : verif_occup_cpu_hp</text:p>
      <text:p text:style-name="Text_20_body"># Contexte / Co. : cron</text:p>
      <text:p text:style-name="Text_20_body"># Commentaires   : version pour HP 10.20 et &gt;</text:p>
      <text:p text:style-name="Text_20_body">#-----------------------------------------------------------------------------</text:p>
      <text:p text:style-name="Text_20_body">DAT="`date '+%y/%m/%d:%H:%M:%S'` \c"</text:p>
      <text:p text:style-name="Text_20_body"> </text:p>
      <text:p text:style-name="Text_20_body">vers=`uname -a | awk '{print $3}' | awk -F"." '{print $2}'`</text:p>
      <text:p text:style-name="Text_20_body">if [ "$vers" = "09" -o "$vers" = "9" ]</text:p>
      <text:p text:style-name="Text_20_body">then</text:p>
      <text:p text:style-name="Text_20_body">    test ! -d /usr/adm/log &amp;&amp; mkdir /usr/adm/log # si le repertoire n'existe pas on le cree</text:p>
      <text:p text:style-name="Text_20_body">    log=/usr/adm/log/surv.log; export log</text:p>
      <text:p text:style-name="Text_20_body">    UNIX95=XPG3; export UNIX95</text:p>
      <text:p text:style-name="Text_20_body">else</text:p>
      <text:p text:style-name="Text_20_body">    test ! -d /var/adm/log &amp;&amp; mkdir /var/adm/log # si le repertoire n'existe pas on le cree</text:p>
      <text:p text:style-name="Text_20_body">    log=/var/adm/log/surv.log; export log</text:p>
      <text:p text:style-name="Text_20_body">    UNIX95=XPG4; export UNIX95</text:p>
      <text:p text:style-name="Text_20_body">fi</text:p>
      <text:p text:style-name="Text_20_body"># pour eviter que le fichier log augmente trop</text:p>
      <text:p text:style-name="Text_20_body">tail -1000 $log &gt; /tmp/logcpu$$</text:p>
      <text:p text:style-name="Text_20_body">mv /tmp/logcpu$$ $log</text:p>
      <text:p text:style-name="Text_20_body"> </text:p>
      <text:p text:style-name="Text_20_body">if [ "$vers" = "10" ]</text:p>
      <text:p text:style-name="Text_20_body">then</text:p>
      <text:p text:style-name="Text_20_body">   ps -eo cpu,comm,ruser,etime,vsz,pid,state|sort -r -k 1,1|grep -v COMMAND|\</text:p>
      <text:p text:style-name="Text_20_body">   <text:span text:style-name="T14">#awk '{print $1" "$2" "$3" "$4" "$5" "$6" "$7}'| \</text:span></text:p>
      <text:p text:style-name="Text_20_body">   awk '</text:p>
      <text:p text:style-name="Text_20_body">   {</text:p>
      <text:p text:style-name="Text_20_body">    # si le % cpu &gt; 100 ou si memoire virtuelle &gt; 200 Mo alors alerte</text:p>
      <text:p text:style-name="Text_20_body">    <text:span text:style-name="T14">if ((int($1) &gt; 100) || (int($5) &gt; 200000))</text:span></text:p>
      <text:p text:style-name="Text_20_body">       <text:span text:style-name="T14">{</text:span></text:p>
      <text:p text:style-name="Text_20_body">        <text:span text:style-name="T14">system("echo \"`date '+%y/%m/%d:%H:%M:%S'` \\c\"");</text:span></text:p>
      <text:p text:style-name="Text_20_body">        <text:span text:style-name="T14">printf "cde: %s usr:%s pCPU:%s elapse:%s vsz:%s pid:%s st:%s\n",\</text:span></text:p>
      <text:p text:style-name="Text_20_body">              <text:span text:style-name="T14">$2,$3,$1,$4,$5,$6,$7</text:span></text:p>
      <text:p text:style-name="Text_20_body">       <text:span text:style-name="T14">}</text:span></text:p>
      <text:p text:style-name="Text_20_body">   <text:span text:style-name="T14">}</text:span></text:p>
      <text:p text:style-name="Text_20_body">   <text:span text:style-name="T14">' | tee -a $log </text:span></text:p>
      <text:p text:style-name="Text_20_body">   </text:p>
      <text:p text:style-name="Text_20_body">   # si nombre occurence du meme programme depasse 20 alors alerte</text:p>
      <text:p text:style-name="Text_20_body">   <text:span text:style-name="T14">for cmd in `ps -C comm|grep -v COMM| grep -v "sh"|grep -v "^$"|sort -u`</text:span></text:p>
      <text:p text:style-name="Text_20_body">   <text:span text:style-name="T14">do</text:span></text:p>
      <text:p text:style-name="Text_20_body">      <text:span text:style-name="T14">#echo "cmd: $cmd"</text:span></text:p>
      <text:p text:style-name="Text_20_body">      <text:span text:style-name="T14">nb_occur=`ps -eo comm|grep -v COMM| grep -v "sh"| grep "$cmd"| wc -l`</text:span></text:p>
      <text:p text:style-name="Text_20_body">      <text:span text:style-name="T14">if test $nb_occur -gt 20</text:span></text:p>
      <text:p text:style-name="Text_20_body">      <text:span text:style-name="T14">then</text:span></text:p>
      <text:p text:style-name="Text_20_body">           <text:span text:style-name="T14">echo "$DAT: $cmd nbre occurence: $nb_occur" | tee -a $log </text:span></text:p>
      <text:p text:style-name="Text_20_body">      fi</text:p>
      <text:p text:style-name="Text_20_body">   done</text:p>
      <text:p text:style-name="Text_20_body">fi</text:p>
      <text:p text:style-name="Text_20_body"> </text:p>
      <text:p text:style-name="Text_20_body"># si nombre moyens processus par mn &gt; a 5 alors alerte</text:p>
      <text:p text:style-name="P2">tx_cpu=`uptime | sed "s/.*load average: //"|awk '{print $3}'`</text:p>
      <text:p text:style-name="P2">if test $tx_cpu -gt 5</text:p>
      <text:p text:style-name="P2">then</text:p>
      <text:p text:style-name="Text_20_body">     <text:span text:style-name="T14">echo "$DAT: nb proc. par minute: $tx_cpu" | tee -a $log </text:span></text:p>
      <text:p text:style-name="Text_20_body">fi</text:p>
      <text:p text:style-name="Text_20_body">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0"/>65<text:span text:style-name="T1">     </text:span>script de vérification des processus occupant trop de mémoire et cpu (sur SUN)</text:h>
      <text:p text:style-name="Text_20_body"> </text:p>
      <text:p text:style-name="P2">#!/sbin/sh</text:p>
      <text:p text:style-name="P2">#-----------------------------------------------------------------------------</text:p>
      <text:p text:style-name="P2"># @(#) verif_occup_cpu_sun</text:p>
      <text:p text:style-name="P2"># Nom / Name     :  verif_occup_cpu_sun</text:p>
      <text:p text:style-name="P2"># Type / Type    : job shell (UNIX)                                           </text:p>
      <text:p text:style-name="Text_20_body"># But / Aim      : recherche ce qui occupe trop de cpu ou trop de memoire</text:p>
      <text:p text:style-name="Text_20_body">#                  ou qui a trop d'occurence du meme job en memoire</text:p>
      <text:p text:style-name="Text_20_body"># Auteur / Author: Benjamin LISAN  -&gt;    date creation:  01/03/1999</text:p>
      <text:p text:style-name="Text_20_body"># Usage / Usage  : verif_occup_cpu_sun</text:p>
      <text:p text:style-name="Text_20_body"># Exemple / Ex.  : verif_occup_cpu_sun</text:p>
      <text:p text:style-name="Text_20_body"># Contexte / Co. : cron</text:p>
      <text:p text:style-name="Text_20_body"># Commentaires   : version pour Solaris 2.5 et &gt;</text:p>
      <text:p text:style-name="Text_20_body">#-----------------------------------------------------------------------------</text:p>
      <text:p text:style-name="Text_20_body">DAT="`date '+%y/%m/%d:%H:%M:%S'` \c"</text:p>
      <text:p text:style-name="Text_20_body">test ! -d /var/adm/log &amp;&amp; mkdir /var/adm/log # si le repertoire n'existe pas on le cree</text:p>
      <text:p text:style-name="P7">log=/var/adm/log/surv.log</text:p>
      <text:p text:style-name="Text_20_body"> </text:p>
      <text:p text:style-name="Text_20_body"># pour eviter que le fichier log augmente trop</text:p>
      <text:p text:style-name="Text_20_body">tail -1000 $log &gt; /tmp/logcpu$$</text:p>
      <text:p text:style-name="Text_20_body">mv /tmp/logcpu$$ $log</text:p>
      <text:p text:style-name="Text_20_body"> </text:p>
      <text:p text:style-name="Text_20_body">ps -eo pcpu,comm,ruser,etime,vsz,pid,pmem,s|sort -r -k 1,1|grep -v COMM|\</text:p>
      <text:p text:style-name="P2">#awk '{print $1" "$2" "$3" "$4" "$5" "$6" "$7" "$8}'| \</text:p>
      <text:p text:style-name="Text_20_body">nawk '</text:p>
      <text:p text:style-name="Text_20_body">{</text:p>
      <text:p text:style-name="Text_20_body"> # si le % cpu &gt; 40 ou si memoire virtuelle &gt; 250 Mo alors alerte</text:p>
      <text:p text:style-name="Text_20_body"> <text:span text:style-name="T14">if ( (int($1) &gt; 40) || (int($5) &gt; 250000) || (int($7) &gt; 20) )</text:span></text:p>
      <text:p text:style-name="Text_20_body">    <text:span text:style-name="T14">{</text:span></text:p>
      <text:p text:style-name="Text_20_body">     <text:span text:style-name="T14">system("echo \"`date '+%y/%m/%d:%H:%M:%S'` \\c\"");</text:span></text:p>
      <text:p text:style-name="Text_20_body">     <text:span text:style-name="T14">printf "cde: %s usr:%s pCPU:%s elap:%s vsz:%s pid:%s pmem:%s st:%s\n",\</text:span></text:p>
      <text:p text:style-name="Text_20_body">           <text:span text:style-name="T14">$2,$3,$1,$4,$5,$6,$7,$8</text:span></text:p>
      <text:p text:style-name="Text_20_body">    <text:span text:style-name="T14">}</text:span></text:p>
      <text:p text:style-name="P2">}</text:p>
      <text:p text:style-name="P2">' | tee -a $log</text:p>
      <text:p text:style-name="Text_20_body"># si nombre occurence du meme programme (non carnet) depasse 20 alors alerte</text:p>
      <text:p text:style-name="P2">for cmd in \</text:p>
      <text:p text:style-name="P2">`ps -eo comm|grep -v COMM|grep -v sh|grep -v term|grep -v smbd|grep -v login|grep -v "^$"|sort -u`</text:p>
      <text:p text:style-name="P2">do</text:p>
      <text:p text:style-name="Text_20_body">   <text:span text:style-name="T14">#echo "cmd: $cmd"</text:span></text:p>
      <text:p text:style-name="Text_20_body">   <text:span text:style-name="T14">nb_occur=`ps -eo comm|grep -v COMM| grep -v "sh"| grep "$cmd"| wc -l`</text:span></text:p>
      <text:p text:style-name="Text_20_body">   <text:span text:style-name="T14">if test $nb_occur -gt 20 -a "$cmd" -ne "exeCarnets"</text:span></text:p>
      <text:p text:style-name="Text_20_body">   <text:span text:style-name="T14">then</text:span></text:p>
      <text:p text:style-name="Text_20_body">        <text:span text:style-name="T14">echo "$DAT:$cmd nbre occurence: $nb_occur" | tee -a $log</text:span></text:p>
      <text:p text:style-name="Text_20_body">   fi</text:p>
      <text:p text:style-name="Text_20_body">done</text:p>
      <text:p text:style-name="Text_20_body"> </text:p>
      <text:p text:style-name="Text_20_body"># si nombre moyens processus par mn &gt; a 5 alors alerte</text:p>
      <text:p text:style-name="P2">tx_cpu=`uptime | sed "s:,::g" | awk '{print $10}'`</text:p>
      <text:p text:style-name="P2">if test $tx_cpu -gt 5</text:p>
      <text:p text:style-name="P2">then</text:p>
      <text:p text:style-name="Text_20_body">     <text:span text:style-name="T14">echo "$DAT: nb proc. par minute: $tx_cpu" | tee -a $log</text:span></text:p>
      <text:p text:style-name="Text_20_body">fi</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1"/>66<text:span text:style-name="T1">     </text:span>script de vérification de la non saturation des partitions (sur HP)</text:h>
      <text:p text:style-name="Text_20_body"> </text:p>
      <text:p text:style-name="P2">#!/sbin/sh</text:p>
      <text:p text:style-name="P2">#-----------------------------------------------------------------------------</text:p>
      <text:p text:style-name="P2"># @(#) verif_parti_full_hp</text:p>
      <text:p text:style-name="P2"># Nom / Name     : verif_parti_full_hp</text:p>
      <text:p text:style-name="P2"># Type / Type    : job shell (UNIX)                                           </text:p>
      <text:p text:style-name="Text_20_body"># But / Aim      : faire une alerte si la partition est occupee a + de 95%</text:p>
      <text:p text:style-name="Text_20_body"># Auteur / Author: Benjamin LISAN  -&gt;    date creation:  01-AUG-90            </text:p>
      <text:p text:style-name="Text_20_body"># Usage / Usage  : verif_parti_full_hp</text:p>
      <text:p text:style-name="Text_20_body"># Exemple / Ex.  : verif_parti_full_hp</text:p>
      <text:p text:style-name="Text_20_body"># Contexte utili.: cron</text:p>
      <text:p text:style-name="Text_20_body"># Comment.       : version pour HPUX 10.20</text:p>
      <text:p text:style-name="Text_20_body"># avec reroutage du message d'alerte dans la mailbox de l'administrateur UNIX</text:p>
      <text:p text:style-name="P2">#-----------------------------------------------------------------------------</text:p>
      <text:p text:style-name="P2">rm -f  /tmp/partfull$$ 2&gt; /dev/null</text:p>
      <text:p text:style-name="P2">for part in `df -vl |  grep -v "^     " | awk '{print $1}'`</text:p>
      <text:p text:style-name="P2">do</text:p>
      <text:p text:style-name="Text_20_body">    <text:span text:style-name="T14">siz=`df -vl| grep -v "^      "|  grep "$part "| awk '{print $5}'`</text:span></text:p>
      <text:p text:style-name="Text_20_body">    <text:span text:style-name="T14">#echo "$part $siz"</text:span></text:p>
      <text:p text:style-name="Text_20_body">    <text:span text:style-name="T14">if [ $siz -ge 90 ]</text:span></text:p>
      <text:p text:style-name="Text_20_body">    <text:span text:style-name="T14">then</text:span></text:p>
      <text:p text:style-name="Text_20_body">        <text:span text:style-name="T14">echo "attention occupation partition $part a $siz %"| tee -a /tmp/partfull$$</text:span></text:p>
      <text:p text:style-name="Text_20_body">    fi</text:p>
      <text:p text:style-name="Text_20_body">done</text:p>
      <text:p text:style-name="Text_20_body"># reroutage du message d'alerte dans la mailbox de l'administrateur UNIX</text:p>
      <text:p text:style-name="Text_20_body">MAIL_ADDR=benjamin.lisan@toto.com</text:p>
      <text:p text:style-name="P2">test -f /tmp/partfull$$ &amp;&amp; mailx -s "`uname -n` `/usr/bin/whoami`" $MAIL_ADDR &lt; /tmp/partfull$$</text:p>
      <text:p text:style-name="P2">rm -f  /tmp/partfull$$ 2&gt; /dev/null</text:p>
      <text:p text:style-name="Text_20_body">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2"/>67<text:span text:style-name="T1">     </text:span>script de vérification de la non saturation des partitions (sur SUN)</text:h>
      <text:p text:style-name="P12"> </text:p>
      <text:p text:style-name="P2">#!/sbin/sh</text:p>
      <text:p text:style-name="P2">#-----------------------------------------------------------------------------</text:p>
      <text:p text:style-name="P2"># @(#) verif_parti_full_sun</text:p>
      <text:p text:style-name="P2"># Nom / Name     : verif_parti_full_sun</text:p>
      <text:p text:style-name="P2"># Type / Type    : job shell (UNIX SUN)                                           </text:p>
      <text:p text:style-name="Text_20_body"># But / Aim      : faire une alerte si la partition est occupee a + de 95%</text:p>
      <text:p text:style-name="Text_20_body"># Auteur / Author: Benjamin LISAN date creation:  1/6/98</text:p>
      <text:p text:style-name="Text_20_body"># Usage / Usage  : verif_parti_full_sun</text:p>
      <text:p text:style-name="Text_20_body"># Exemple / Ex.  : verif_parti_full_sun</text:p>
      <text:p text:style-name="Text_20_body"># Contexte utili.: cron</text:p>
      <text:p text:style-name="Text_20_body"># Comment.       : version pour Solaris 2.5/2.6...</text:p>
      <text:p text:style-name="Text_20_body"># avec reroutage du message d'alerte dans la mailbox de l'administrateur UNIX</text:p>
      <text:p text:style-name="P2">#-----------------------------------------------------------------------------</text:p>
      <text:p text:style-name="P2">rm -f /tmp/partfull$$ 2&gt; /dev/null</text:p>
      <text:p text:style-name="P2">for part in \</text:p>
      <text:p text:style-name="P2">`df -k|grep -v "^/proc"|grep -v datacar|grep -v kbytes|grep -v "^fd"|\</text:p>
      <text:p text:style-name="P2">grep -vi cdrom|grep -v /datagpi_0|awk '{print $6}'`</text:p>
      <text:p text:style-name="P2">do</text:p>
      <text:p text:style-name="Text_20_body">    <text:span text:style-name="T14">siz=`df -k|grep "$part\$" | awk '{print $5}' | sed -e 's:%::'`</text:span></text:p>
      <text:p text:style-name="Text_20_body">    <text:span text:style-name="T14">#echo "&lt;&lt;$part&gt;&gt; &lt;&lt;$siz&gt;&gt;"</text:span></text:p>
      <text:p text:style-name="Text_20_body">    <text:span text:style-name="T14">if test $siz -gt 95</text:span></text:p>
      <text:p text:style-name="Text_20_body">    <text:span text:style-name="T14">then</text:span></text:p>
      <text:p text:style-name="Text_20_body">        <text:span text:style-name="T14">echo "attention occupation partition $part a $siz %" | tee -a /tmp/partfull$$</text:span></text:p>
      <text:p text:style-name="Text_20_body">    fi</text:p>
      <text:p text:style-name="Text_20_body">done</text:p>
      <text:p text:style-name="Text_20_body"> </text:p>
      <text:p text:style-name="Text_20_body"># reroutage du message d'alerte dans la mailbox de l'administrateur UNIX</text:p>
      <text:p text:style-name="Text_20_body">MAIL_ADDR=benjamin.lisan-tmaservices@renault.com</text:p>
      <text:p text:style-name="Text_20_body">#MAIL_ADDR=root@mlbadm.mlb.renault.fr</text:p>
      <text:p text:style-name="Text_20_body">#MAIL_ADDR=Olivier.Cornic@renault.com</text:p>
      <text:p text:style-name="P2">test -f /tmp/partfull$$ &amp;&amp; \</text:p>
      <text:p text:style-name="Text_20_body">  <text:span text:style-name="T14">mailx -s "`uname -n` partition_full" $MAIL_ADDR &lt; /tmp/partfull$$</text:span></text:p>
      <text:p text:style-name="P2">rm -f /tmp/partfull$$ 2&gt; /dev/null</text:p>
      <text:p text:style-name="P12"> </text:p>
      <text:p text:style-name="P13">#&gt;&gt;&gt;&gt;&gt;&gt;&gt;&gt;&gt;&gt;&gt;&gt;&gt;&gt;&gt;&gt;&gt;&gt;&gt;&gt;&gt;&gt;&gt;&gt;&gt;&gt;&gt;&gt;&gt;&gt;&gt;&gt;&gt;&gt;&gt;&gt;&gt;&gt;&gt;&gt;&gt;&gt;&gt;&gt;&gt;&gt;&gt;&gt;&gt;&gt;&gt;&gt;&gt;&gt;&gt;&gt;&gt;&gt;&gt;&gt;&gt;&gt;&gt;&gt;&gt;&gt;&gt;&gt;&gt;&gt;&gt;&gt;&gt;&gt;&gt;&gt;&gt;&gt;&gt;&gt;</text:p>
      <text:p text:style-name="P18"> </text:p>
      <text:h text:style-name="P22" text:outline-level="1"><text:bookmark text:name="_Toc89775653"/>68<text:span text:style-name="T1">     </text:span>Exemple de script de vérification du lancement du serveurs Lotus Notes (sur SUN)</text:h>
      <text:p text:style-name="Text_20_body"> </text:p>
      <text:p text:style-name="P2">#!/sbin/sh</text:p>
      <text:p text:style-name="P2">#-----------------------------------------------------------------------------</text:p>
      <text:p text:style-name="P2"># @(#) verif_app_lotus</text:p>
      <text:p text:style-name="Text_20_body"># Nom / Name     : verif_app_lotus (verify du lancement des appli et demons ‘notes’)</text:p>
      <text:p text:style-name="P2"># Type / Type    : job shell (UNIX)                                           </text:p>
      <text:p text:style-name="Text_20_body"># But / Aim      : verif presence appli. notes serveur lotus</text:p>
      <text:p text:style-name="Text_20_body"># Auteur / Author: Benjamin LISAN  -&gt;    date creation: 25/5/00</text:p>
      <text:p text:style-name="Text_20_body">#                                                                             </text:p>
      <text:p text:style-name="Text_20_body"># Usage / Usage  : verif_app_lotus</text:p>
      <text:p text:style-name="Text_20_body"># Exemple / Ex.  : "verif_app_lotus"                                           </text:p>
      <text:p text:style-name="Text_20_body"># Contexte / Co. : cron</text:p>
      <text:p text:style-name="Text_20_body"># Commentaires   : version pour machine SUN (SOLARIS)</text:p>
      <text:p text:style-name="Text_20_body">#-----------------------------------------------------------------------------</text:p>
      <text:p text:style-name="Text_20_body">PATH=/usr/bin:/usr/sbin:/sbin:/home/root:/usr/local/bin:.:$PATH</text:p>
      <text:p text:style-name="Text_20_body"># liste des appli. notes de la machine JAVA</text:p>
      <text:p text:style-name="Text_20_body">rm -f /tmp/proc_notes.lis &gt; /dev/null</text:p>
      <text:p text:style-name="Text_20_body">list_proc="/opt/lotus/notes/latest/sunspa/replica</text:p>
      <text:p text:style-name="Text_20_body">/opt/lotus/notes/latest/sunspa/router</text:p>
      <text:p text:style-name="Text_20_body">/usr/bin/sh /logiciel/lotus/bin/server</text:p>
      <text:p text:style-name="Text_20_body">/opt/lotus/notes/latest/sunspa/server</text:p>
      <text:p text:style-name="Text_20_body">/opt/lotus/notes/latest/sunspa/update</text:p>
      <text:p text:style-name="Text_20_body">/opt/lotus/notes/latest/sunspa/stats</text:p>
      <text:p text:style-name="Text_20_body">/opt/lotus/notes/latest/sunspa/amgr</text:p>
      <text:p text:style-name="Text_20_body">/opt/lotus/notes/latest/sunspa/amgr</text:p>
      <text:p text:style-name="Text_20_body">/opt/lotus/notes/latest/sunspa/adminp</text:p>
      <text:p text:style-name="Text_20_body">/opt/lotus/notes/latest/sunspa/sched</text:p>
      <text:p text:style-name="Text_20_body">/opt/lotus/notes/latest/sunspa/calconn</text:p>
      <text:p text:style-name="Text_20_body">/opt/lotus/notes/latest/sunspa/update</text:p>
      <text:p text:style-name="Text_20_body">/opt/lotus/notes/latest/sunspa/stats</text:p>
      <text:p text:style-name="Text_20_body">/opt/lotus/notes/latest/sunspa/lotus"</text:p>
      <text:p text:style-name="Text_20_body">nb_proc=`echo $list_proc|wc -w`</text:p>
      <text:p text:style-name="P2">cpt_proc=0</text:p>
      <text:p text:style-name="P2">for proc in `echo "$list_proc"`</text:p>
      <text:p text:style-name="P2">do</text:p>
      <text:p text:style-name="Text_20_body">     <text:span text:style-name="T14">#echo "\"=== $proc ==\""</text:span></text:p>
      <text:p text:style-name="Text_20_body">     ps -ef|grep "$proc" &gt; /dev/null</text:p>
      <text:p text:style-name="Text_20_body">     <text:span text:style-name="T14">test $? = 0 &amp;&amp; cpt_proc=`expr $cpt_proc + 1`</text:span></text:p>
      <text:p text:style-name="P2">done</text:p>
      <text:p text:style-name="Text_20_body">   </text:p>
      <text:p text:style-name="P2">if [ $cpt_proc -eq $nb_proc ]</text:p>
      <text:p text:style-name="P2">then</text:p>
      <text:p text:style-name="Text_20_body">      <text:span text:style-name="T14">echo "lancement appli notes lotus $appli : OK ($cpt_proc proc)"</text:span></text:p>
      <text:p text:style-name="P2">else</text:p>
      <text:p text:style-name="Text_20_body">      <text:span text:style-name="T14">rm -f  /tmp/lancelotus.log &gt; /dev/null</text:span></text:p>
      <text:p text:style-name="Text_20_body">      <text:span text:style-name="T14">echo "lancement appli notes lotus $appli : KO !!! ($cpt_proc proc)"|tee -a /tmp/lancelotus.log</text:span></text:p>
      <text:p text:style-name="Text_20_body">      <text:span text:style-name="T14">MAIL_ADDR=benjamin.lisan-tmaservices@renault.com</text:span></text:p>
      <text:p text:style-name="Text_20_body">      <text:span text:style-name="T14">mailx -s "`uname -n` lancment_serveur_notes" $MAIL_ADDR &lt; /tmp/lancelotus.log</text:span></text:p>
      <text:p text:style-name="Text_20_body">fi</text:p>
      <text:p text:style-name="P12"> </text:p>
      <text:p text:style-name="P13">#&gt;&gt;&gt;&gt;&gt;&gt;&gt;&gt;&gt;&gt;&gt;&gt;&gt;&gt;&gt;&gt;&gt;&gt;&gt;&gt;&gt;&gt;&gt;&gt;&gt;&gt;&gt;&gt;&gt;&gt;&gt;&gt;&gt;&gt;&gt;&gt;&gt;&gt;&gt;&gt;&gt;&gt;&gt;&gt;&gt;&gt;&gt;&gt;&gt;&gt;&gt;&gt;&gt;&gt;&gt;&gt;&gt;&gt;&gt;&gt;&gt;&gt;&gt;&gt;&gt;&gt;&gt;&gt;&gt;&gt;&gt;&gt;&gt;&gt;&gt;&gt;&gt;&gt;&gt;&gt;</text:p>
      <text:h text:style-name="P26" text:outline-level="1"><text:bookmark text:name="_Toc89775654"/><text:span text:style-name="T7">69</text:span><text:span text:style-name="T2">      </text:span>script permettant de lancer à distance l’outil de gestion de configuration « PVCS »</text:h>
      <text:p text:style-name="P12"> </text:p>
      <text:p text:style-name="Text_20_body"># vm2 : script permettant de lancer a distance l outil de gestion de config PVCS</text:p>
      <text:p text:style-name="Text_20_body"># sur SUMATRA en conservant le meme groupe que sur</text:p>
      <text:p text:style-name="Text_20_body"># la machine UNIX ou l on est.  Dev de BL 1 juin 99</text:p>
      <text:p text:style-name="P2">GRP=`id -ng`;export GRP</text:p>
      <text:p text:style-name="P2">remsh sumatra "(</text:p>
      <text:p text:style-name="Text_20_body">newgrp $GRP &lt;&lt; FIN</text:p>
      <text:p text:style-name="Text_20_body"># ici adresse ip du PC de l utilisateur B LISAN</text:p>
      <text:p text:style-name="Text_20_body">export DISPLAY=172.25.49.133:0.0;</text:p>
      <text:p text:style-name="Text_20_body">/logiciel/pvcs/vm/pvcsvmux</text:p>
      <text:p text:style-name="Text_20_body">FIN</text:p>
      <text:p text:style-name="Text_20_body">)"</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5"/><text:span text:style-name="T7">70</text:span><text:span text:style-name="T2">      </text:span>Exemple de script de calcul du volume des donnees des applications sur une machine HP</text:h>
      <text:p text:style-name="P12"> </text:p>
      <text:p text:style-name="Text_20_body"># ------------------------------------------------------------------------- #</text:p>
      <text:p text:style-name="Text_20_body"># Projet        : FACTURATION UNIX   Sous-Projet  :                         #</text:p>
      <text:p text:style-name="Text_20_body"># Auteur        : B. LISAN           Date creation: 03/08/95  ..:..         #</text:p>
      <text:p text:style-name="Text_20_body"># Nom programme : vol_appli          Type Langage : Bourne SHELL            #</text:p>
      <text:p text:style-name="Text_20_body"># Objet du trait:                    Version      : 1.0                     #</text:p>
      <text:p text:style-name="Text_20_body"># Calcul du volume des donnees des applications sur une machine HP          #</text:p>
      <text:p text:style-name="Text_20_body"># ------------------------------------------------------------------------- #</text:p>
      <text:p text:style-name="Text_20_body">#echo "Calcul du volume des donnees des applications"</text:p>
      <text:p text:style-name="P7">#echo "---------------------------------------------"</text:p>
      <text:p text:style-name="P7">#echo " "</text:p>
      <text:p text:style-name="P7">#vol_tot_tt_appli=0</text:p>
      <text:p text:style-name="Text_20_body">rm /tmp/ls_appli /tmp/appli.vol 2&gt; /dev/null</text:p>
      <text:p text:style-name="Text_20_body"> </text:p>
      <text:p text:style-name="Text_20_body"># constitution d'un fichier listant les repertoires des applications ORACLE</text:p>
      <text:p text:style-name="Text_20_body"> </text:p>
      <text:p text:style-name="Text_20_body">cd /appli</text:p>
      <text:p text:style-name="Text_20_body">ls /appli | egrep -v \</text:p>
      <text:p text:style-name="Text_20_body">"best1|lost+found|peliunix|natural.old|svgbase|oracle|oratst|tst|exploit|toto|tr</text:p>
      <text:p text:style-name="Text_20_body">ansfert"\</text:p>
      <text:p text:style-name="Text_20_body"> &gt; /tmp/ls_appli</text:p>
      <text:p text:style-name="Text_20_body"> </text:p>
      <text:p text:style-name="Text_20_body"># calcul taille appli. CLIENT EFFECTIF FACTURE_UX </text:p>
      <text:p text:style-name="Text_20_body"># FOURNISSUR IMPACT INFOLOG STOCK PISTE RER RISQUE SAGE SEARCH</text:p>
      <text:p text:style-name="Text_20_body"># SIEL STATISTIQUES etc ...</text:p>
      <text:p text:style-name="Text_20_body"> </text:p>
      <text:p text:style-name="P2">for nom_appli in `cat /tmp/ls_appli`</text:p>
      <text:p text:style-name="Text_20_body">do</text:p>
      <text:p text:style-name="Text_20_body">    cd /appli/$nom_appli</text:p>
      <text:p text:style-name="Text_20_body">    vol_appli=`du -s /appli/$nom_appli 2&gt; /dev/null | awk '{print $1}'; `</text:p>
      <text:p text:style-name="Text_20_body">    <text:span text:style-name="T17">vol_esp=`expr $vol_appli \* 512`</text:span></text:p>
      <text:p text:style-name="Text_20_body"> </text:p>
      <text:p text:style-name="Text_20_body">    #echo "Volume des donnees en Mo (on divise par 1048576): $vol_esp"</text:p>
      <text:p text:style-name="Text_20_body"> </text:p>
      <text:p text:style-name="Text_20_body">    <text:span text:style-name="T17">vol_appli=`expr $vol_esp / 1048576`</text:span></text:p>
      <text:p text:style-name="Text_20_body"> </text:p>
      <text:p text:style-name="Text_20_body">    #echo "volume de tout le repertoire espace en octets : $vol_appli"</text:p>
      <text:p text:style-name="Text_20_body"> </text:p>
      <text:p text:style-name="Text_20_body">    echo "$nom_appli\t$vol_esp" | tee -a /tmp/appli.vol</text:p>
      <text:p text:style-name="Text_20_body">    #echo "$nom_appli $vol_esp" #&gt;&gt; /appli/factux/D/log/vol_appli.res</text:p>
      <text:p text:style-name="Text_20_body"> </text:p>
      <text:p text:style-name="Text_20_body">    <text:span text:style-name="T17">#vol_tot_tt_appli=`expr $vol_tot + $vol_appli`</text:span></text:p>
      <text:p text:style-name="Text_20_body">done </text:p>
      <text:p text:style-name="Text_20_body">echo "Le resultat des tailles en Mo des appli est dans fichier /tmp/appli.vol"</text:p>
      <text:p text:style-name="Text_20_body">echo "fin du programme $0 \007"</text:p>
      <text:p text:style-name="Text_20_body"> </text:p>
      <text:p text:style-name="Text_20_body"># ----------------------------------------------------------------------------</text:p>
      <text:p text:style-name="Text_20_body"># Nom procedure: extr_sid</text:p>
      <text:p text:style-name="Text_20_body"># ----------------------------------------------------------------------------</text:p>
      <text:p text:style-name="Text_20_body"># setting des variables ORACLE</text:p>
      <text:p text:style-name="Text_20_body">. /etc/opt/var.d/oracle.env</text:p>
      <text:p text:style-name="P2">FIC_SID=$ORACLE_HOME/network/admin/tnsnames.ora</text:p>
      <text:p text:style-name="P2">FIC_OUT=/tmp/appli_sid</text:p>
      <text:p text:style-name="P2">rm $FIC_OUT 2&gt; /dev/null</text:p>
      <text:p text:style-name="Text_20_body"> </text:p>
      <text:p text:style-name="Text_20_body"># extraction des donnees oracle</text:p>
      <text:p text:style-name="P2">nb_ligne=0</text:p>
      <text:p text:style-name="P2">for ligne in `awk '/\.world = /||/SID/ {print $1 $3}' $FIC_SID`</text:p>
      <text:p text:style-name="P2">do </text:p>
      <text:p text:style-name="Text_20_body">     <text:span text:style-name="T14">mod=`expr $nb_ligne % 2`</text:span></text:p>
      <text:p text:style-name="Text_20_body">     <text:span text:style-name="T14">if [ $mod = 0 ]</text:span></text:p>
      <text:p text:style-name="Text_20_body">     <text:span text:style-name="T14">then</text:span></text:p>
      <text:p text:style-name="Text_20_body">          <text:span text:style-name="T14">appli=`echo $ligne | sed -e "s:\.world::"`</text:span></text:p>
      <text:p text:style-name="Text_20_body">     <text:span text:style-name="T14">else</text:span></text:p>
      <text:p text:style-name="Text_20_body">          <text:span text:style-name="T14">data_SID=`echo $ligne | sed -e "s:(SID::" -e "s:)::"`</text:span></text:p>
      <text:p text:style-name="Text_20_body">          <text:span text:style-name="T14">echo "$appli\t$data_SID"</text:span></text:p>
      <text:p text:style-name="Text_20_body">          <text:span text:style-name="T14">echo "$appli\t$data_SID" &gt; $FIC_OUT</text:span></text:p>
      <text:p text:style-name="Text_20_body">     fi</text:p>
      <text:p text:style-name="Text_20_body">     nb_ligne=`expr $nb_ligne + 1`</text:p>
      <text:p text:style-name="Text_20_body">done</text:p>
      <text:p text:style-name="Text_20_body">grep "^[FTXZ][0-9]" /etc/passwd|awk -F: '{print $1}'| grep -v "Z000004" | \</text:p>
      <text:p text:style-name="Text_20_body">sort &gt; /tmp/USER_$hostname</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6"/>71<text:span text:style-name="T1">     </text:span>Script de vérification de la taille des fichiers de contrôle Oracle</text:h>
      <text:p text:style-name="P12"> </text:p>
      <text:p text:style-name="P13">#@verify_ora_sys</text:p>
      <text:p text:style-name="P12"> </text:p>
      <text:p text:style-name="Text_20_body">vol_ora=0</text:p>
      <text:p text:style-name="P2">for fic in `ls /data*/oracle_*/*.dbf /data*/oracle_*/*.rdo /data*/oracle_*/*.ctl`</text:p>
      <text:p text:style-name="P2">do</text:p>
      <text:p text:style-name="Text_20_body">   <text:span text:style-name="T14">vol_dbf=`ls -l $fic | awk '{print $5}'`</text:span></text:p>
      <text:p text:style-name="Text_20_body">   <text:span text:style-name="T17">vol_ora=`expr $vol_ora + $vol_dbf`</text:span></text:p>
      <text:p text:style-name="Text_20_body">   <text:span text:style-name="T17">vol_ora2=`expr $vol_ora / 1048576`</text:span></text:p>
      <text:p text:style-name="P2">done</text:p>
      <text:p text:style-name="P2">echo "volume total base oracle en Mo `uname -n`: $vol_ora2"</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7"/>72<text:span text:style-name="T1">     </text:span>Script de vérification de la taille restante des volumes disque sur une machine HP</text:h>
      <text:p text:style-name="Text_20_body"> </text:p>
      <text:p text:style-name="P14"># verify volume restant HP</text:p>
      <text:p text:style-name="P12"> </text:p>
      <text:p text:style-name="P2">i=0</text:p>
      <text:p text:style-name="P2">for vol in `bdf| grep -v kby| awk '{print $4}' `</text:p>
      <text:p text:style-name="P2">do</text:p>
      <text:p text:style-name="Text_20_body">  <text:span text:style-name="T14">i=`expr $i + $vol`</text:span></text:p>
      <text:p text:style-name="P2">done</text:p>
      <text:p text:style-name="P2">echo "volume restant: $i"</text:p>
      <text:p text:style-name="P2">for vol in `bdf| grep -v kby| awk '{print $2}' `</text:p>
      <text:p text:style-name="P2">do</text:p>
      <text:p text:style-name="Text_20_body">  <text:span text:style-name="T14">i=`expr $i + $vol`</text:span></text:p>
      <text:p text:style-name="P2">done</text:p>
      <text:p text:style-name="P2">echo "volume disques: $i"</text:p>
      <text:p text:style-name="P2">for vol in `bdf| grep -v kby| awk '{print $3}' `</text:p>
      <text:p text:style-name="P2">do</text:p>
      <text:p text:style-name="Text_20_body">  <text:span text:style-name="T14">i=`expr $i + $vol`</text:span></text:p>
      <text:p text:style-name="P2">done</text:p>
      <text:p text:style-name="P2">echo "volume utilise: $i"</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8"/>73<text:span text:style-name="T1">     </text:span>Script de vérification de la taille restante des volumes disque sur une machine Sun</text:h>
      <text:p text:style-name="Text_20_body"> </text:p>
      <text:p text:style-name="P14"># verify volume restant SUN</text:p>
      <text:p text:style-name="P12"> </text:p>
      <text:p text:style-name="P2">i=0</text:p>
      <text:p text:style-name="P2">for vol in `df -k | grep -v fd | grep -v proc| grep -v kby|grep -v swap| awk '{print $4}' `</text:p>
      <text:p text:style-name="P2">do</text:p>
      <text:p text:style-name="Text_20_body">  <text:span text:style-name="T14">i=`expr $i + $vol`</text:span></text:p>
      <text:p text:style-name="P2">done</text:p>
      <text:p text:style-name="P2">echo "volume restant: $i"</text:p>
      <text:p text:style-name="P2">for vol in `df -k | grep -v fd | grep -v proc| grep -v kby|grep -v swap| awk '{print $2}' `</text:p>
      <text:p text:style-name="P2">do</text:p>
      <text:p text:style-name="Text_20_body">  <text:span text:style-name="T14">i=`expr $i + $vol`</text:span></text:p>
      <text:p text:style-name="P2">done</text:p>
      <text:p text:style-name="P2">echo "volume disques: $i"</text:p>
      <text:p text:style-name="P2">for vol in `df -k | grep -v fd | grep -v proc| grep -v kby|grep -v swap| awk '{print $3}' `</text:p>
      <text:p text:style-name="P2">do</text:p>
      <text:p text:style-name="Text_20_body">  <text:span text:style-name="T14">i=`expr $i + $vol`</text:span></text:p>
      <text:p text:style-name="P2">done</text:p>
      <text:p text:style-name="P2">echo "volume utilise: $i"</text:p>
      <text:p text:style-name="P12"> </text:p>
      <text:p text:style-name="P13">#&gt;&gt;&gt;&gt;&gt;&gt;&gt;&gt;&gt;&gt;&gt;&gt;&gt;&gt;&gt;&gt;&gt;&gt;&gt;&gt;&gt;&gt;&gt;&gt;&gt;&gt;&gt;&gt;&gt;&gt;&gt;&gt;&gt;&gt;&gt;&gt;&gt;&gt;&gt;&gt;&gt;&gt;&gt;&gt;&gt;&gt;&gt;&gt;&gt;&gt;&gt;&gt;&gt;&gt;&gt;&gt;&gt;&gt;&gt;&gt;&gt;&gt;&gt;&gt;&gt;&gt;&gt;&gt;&gt;&gt;&gt;&gt;&gt;&gt;&gt;&gt;&gt;&gt;&gt;&gt;</text:p>
      <text:p text:style-name="P12"> </text:p>
      <text:h text:style-name="P22" text:outline-level="1"><text:bookmark text:name="_Toc89775659"/>74<text:span text:style-name="T1">     </text:span>Script de vérification du fonctionnement d’un processus (utilisable par le « cron »)</text:h>
      <text:p text:style-name="P12"> </text:p>
      <text:p text:style-name="P13">#!/bin/sh</text:p>
      <text:p text:style-name="P13"># Rev 1.0</text:p>
      <text:p text:style-name="P13"># proc_check - vérifie si un processus fonctionne, envoie le statut</text:p>
      <text:p text:style-name="P13"># à l'utilisateur principal et tente de redémarrer le processus s'il</text:p>
      <text:p text:style-name="P13"># ne fonctionne pas.</text:p>
      <text:p text:style-name="P14">#</text:p>
      <text:p text:style-name="P14"># usage: proc_check &lt;proc_to_check_as_reported_by_ps_command&gt;</text:p>
      <text:p text:style-name="P12"> </text:p>
      <text:p text:style-name="P13"># Modifie la variable MAILTO en conséquence</text:p>
      <text:p text:style-name="P12"> </text:p>
      <text:p text:style-name="P14">MAILTO="root"</text:p>
      <text:p text:style-name="P14">PROC_TO_CHECK= $1</text:p>
      <text:p text:style-name="P14">OPENWINHOME=/usr/openwin</text:p>
      <text:p text:style-name="P12"> </text:p>
      <text:p text:style-name="P14">CHECK_USAGE()</text:p>
      <text:p text:style-name="P14">{</text:p>
      <text:p text:style-name="P14">if [ "X$1" = "X" ]</text:p>
      <text:p text:style-name="P12">   <text:span text:style-name="T8">then</text:span></text:p>
      <text:p text:style-name="P12">      <text:span text:style-name="T8">echo "usage: $0 &lt;proc_name_from_ps&gt;"</text:span></text:p>
      <text:p text:style-name="P12">      <text:span text:style-name="T8">exit 1</text:span></text:p>
      <text:p text:style-name="P12">   <text:span text:style-name="T8">fi</text:span></text:p>
      <text:p text:style-name="P14">}</text:p>
      <text:p text:style-name="P12"> </text:p>
      <text:p text:style-name="P14">FETCH_PID()</text:p>
      <text:p text:style-name="P15">{</text:p>
      <text:p text:style-name="P12"> <text:span text:style-name="T9">pid=`/usr/bin/ps -e |</text:span></text:p>
      <text:p text:style-name="P12">      <text:span text:style-name="T9">/usr/bin/grep -w $1 |</text:span></text:p>
      <text:p text:style-name="P12">      <text:span text:style-name="T9">/usr/bin/sed -e 's/^  *//' -e 's/ .*//`</text:span></text:p>
      <text:p text:style-name="P14">}</text:p>
      <text:p text:style-name="P12"> </text:p>
      <text:p text:style-name="P14">MAIL_GOOD_NEWS()</text:p>
      <text:p text:style-name="P14">{</text:p>
      <text:p text:style-name="P14">echo "${PROC_TO_CHECK} on "uname -n" IS running at "date"" \</text:p>
      <text:p text:style-name="P14">| mailx -s" ${PROC_TO_CHECK} on "uname -n" \</text:p>
      <text:p text:style-name="P14">IS running at "date"" $MAILTO</text:p>
      <text:p text:style-name="P14">}</text:p>
      <text:p text:style-name="P12"> </text:p>
      <text:p text:style-name="P14">RESTART_PROCESS()</text:p>
      <text:p text:style-name="P14">{</text:p>
      <text:p text:style-name="P14">${OPENWINHOME}/bin/$1 &amp;</text:p>
      <text:p text:style-name="P14">}</text:p>
      <text:p text:style-name="P12"> </text:p>
      <text:p text:style-name="P14">MAIL_BAD_NEWS()</text:p>
      <text:p text:style-name="P14">{</text:p>
      <text:p text:style-name="P14">écho "${PROC_TO_CHECK} on "uname -n" NOT running at "date"" \</text:p>
      <text:p text:style-name="P14">| mailx -s" ${PROC_TO_CHECK} on "uname -n" \</text:p>
      <text:p text:style-name="P14">NOT running at "date"" $MAILTO</text:p>
      <text:p text:style-name="P12"> </text:p>
      <text:p text:style-name="P12">    <text:span text:style-name="T8">RESTART_PROCESS ${PROC_TO_CHECK}</text:span></text:p>
      <text:p text:style-name="P12">    <text:span text:style-name="T8">sleep 10</text:span></text:p>
      <text:p text:style-name="P12">    <text:span text:style-name="T8">CHECK_IF_RUNNING</text:span></text:p>
      <text:p text:style-name="P14">}</text:p>
      <text:p text:style-name="P12"> </text:p>
      <text:p text:style-name="P14">CHECK_IF_RUNNING()</text:p>
      <text:p text:style-name="P14">{</text:p>
      <text:p text:style-name="P12">    <text:span text:style-name="T8">FETCH_PID   ${PROC_TO_CHECK}</text:span></text:p>
      <text:p text:style-name="P12">    <text:span text:style-name="T8"># echo $pid</text:span></text:p>
      <text:p text:style-name="P12">    <text:span text:style-name="T8">if [ "${pid}" = "" ]</text:span></text:p>
      <text:p text:style-name="P12">    <text:span text:style-name="T8">then</text:span></text:p>
      <text:p text:style-name="P12">       <text:span text:style-name="T8">MAIL_BAD_NEWS</text:span></text:p>
      <text:p text:style-name="P12">    <text:span text:style-name="T8">else</text:span></text:p>
      <text:p text:style-name="P12">       <text:span text:style-name="T8">MAIL_GOOD_NEWS</text:span></text:p>
      <text:p text:style-name="P12">    <text:span text:style-name="T8">fi</text:span></text:p>
      <text:p text:style-name="P14">}</text:p>
      <text:p text:style-name="P12"> </text:p>
      <text:p text:style-name="P14"># main - it all starts here</text:p>
      <text:p text:style-name="P12"> </text:p>
      <text:p text:style-name="P14">CHECK_USAGE $1</text:p>
      <text:p text:style-name="P14">CHECK IF RUN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8S</meta:editing-duration>
    <meta:editing-cycles>3</meta:editing-cycles>
    <meta:generator>OpenOffice.org/3.4.1$Win32 OpenOffice.org_project/341m1$Build-9593</meta:generator>
    <dc:date>2013-01-31T17:09:33.77</dc:date>
    <meta:document-statistic meta:table-count="1" meta:image-count="0" meta:object-count="0" meta:page-count="3" meta:paragraph-count="3998" meta:word-count="19082" meta:character-count="163775"/>
    <meta:user-defined meta:name="Info 1"/>
    <meta:user-defined meta:name="Info 2"/>
    <meta:user-defined meta:name="Info 3"/>
    <meta:user-defined meta:name="Info 4"/>
  </office:meta>
</office:document-meta>
</file>